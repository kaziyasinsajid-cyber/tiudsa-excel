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48125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Product_ID</text:p>
          </table:table-cell>
          <table:table-cell office:value-type="string" table:style-name="ce1">
            <text:p>Sale_Date</text:p>
          </table:table-cell>
          <table:table-cell office:value-type="string" table:style-name="ce1">
            <text:p>Sales_Rep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Sales_Amount</text:p>
          </table:table-cell>
          <table:table-cell table:style-name="ce1"/>
          <table:table-cell office:value-type="string" table:style-name="ce1">
            <text:p>Quantity_Sold</text:p>
          </table:table-cell>
          <table:table-cell office:value-type="string" table:style-name="ce1">
            <text:p>Product_Category</text:p>
          </table:table-cell>
          <table:table-cell office:value-type="string" table:style-name="ce1">
            <text:p>Unit_Cost</text:p>
          </table:table-cell>
          <table:table-cell office:value-type="string" table:style-name="ce1">
            <text:p>Unit_Price</text:p>
          </table:table-cell>
          <table:table-cell office:value-type="string" table:style-name="ce1">
            <text:p>Customer_Type</text:p>
          </table:table-cell>
          <table:table-cell office:value-type="string" table:style-name="ce1">
            <text:p>Discount</text:p>
          </table:table-cell>
          <table:table-cell office:value-type="string" table:style-name="ce1">
            <text:p>Payment_Method</text:p>
          </table:table-cell>
          <table:table-cell office:value-type="string" table:style-name="ce1">
            <text:p>Sales_Channel</text:p>
          </table:table-cell>
          <table:table-cell office:value-type="string" table:style-name="ce1">
            <text:p>Region_and_Sales_Rep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02-03T00:00:00" table:style-name="ce2">
            <text:p>03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5053.97" table:style-name="ce1">
            <text:p>5053.97</text:p>
          </table:table-cell>
          <table:table-cell office:value-type="string" office:string-value="High" table:formula="of:=IF([.E2]&gt;[.$E$1003];&quot;High&quot;;&quot;Low&quot;)" table:style-name="ce1">
            <text:p>High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urniture</text:p>
          </table:table-cell>
          <table:table-cell office:value-type="float" office:value="152.75" table:style-name="ce1">
            <text:p>152.75</text:p>
          </table:table-cell>
          <table:table-cell office:value-type="float" office:value="267.22000000000003" table:style-name="ce1">
            <text:p>267.22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04-21T00:00:00" table:style-name="ce2">
            <text:p>21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4384.0200000000004" table:style-name="ce1">
            <text:p>4384.02</text:p>
          </table:table-cell>
          <table:table-cell office:value-type="string" office:string-value="Low" table:formula="of:=IF([.E3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3816.39" table:style-name="ce1">
            <text:p>3816.39</text:p>
          </table:table-cell>
          <table:table-cell office:value-type="float" office:value="4209.4399999999996" table:style-name="ce1">
            <text:p>4209.44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631.2299999999996" table:style-name="ce1">
            <text:p>4631.23</text:p>
          </table:table-cell>
          <table:table-cell office:value-type="string" office:string-value="Low" table:formula="of:=IF([.E4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ood</text:p>
          </table:table-cell>
          <table:table-cell office:value-type="float" office:value="261.56" table:style-name="ce1">
            <text:p>261.56</text:p>
          </table:table-cell>
          <table:table-cell office:value-type="float" office:value="371.4" table:style-name="ce1">
            <text:p>371.4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date" office:date-value="2023-08-24T00:00:00" table:style-name="ce2">
            <text:p>24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2167.94" table:style-name="ce1">
            <text:p>2167.94</text:p>
          </table:table-cell>
          <table:table-cell office:value-type="string" office:string-value="Low" table:formula="of:=IF([.E5]&gt;[.$E$1003];&quot;High&quot;;&quot;Low&quot;)" table:style-name="ce1">
            <text:p>Low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lothing</text:p>
          </table:table-cell>
          <table:table-cell office:value-type="float" office:value="4330.03" table:style-name="ce1">
            <text:p>4330.03</text:p>
          </table:table-cell>
          <table:table-cell office:value-type="float" office:value="4467.75" table:style-name="ce1">
            <text:p>4467.75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03-24T00:00:00" table:style-name="ce2">
            <text:p>24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3750.2" table:style-name="ce1">
            <text:p>3750.2</text:p>
          </table:table-cell>
          <table:table-cell office:value-type="string" office:string-value="Low" table:formula="of:=IF([.E6]&gt;[.$E$1003];&quot;High&quot;;&quot;Low&quot;)" table:style-name="ce1">
            <text:p>Low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lectronics</text:p>
          </table:table-cell>
          <table:table-cell office:value-type="float" office:value="637.37" table:style-name="ce1">
            <text:p>637.37</text:p>
          </table:table-cell>
          <table:table-cell office:value-type="float" office:value="692.71" table:style-name="ce1">
            <text:p>692.71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02-11T00:00:00" table:style-name="ce2">
            <text:p>11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3761.15" table:style-name="ce1">
            <text:p>3761.15</text:p>
          </table:table-cell>
          <table:table-cell office:value-type="string" office:string-value="Low" table:formula="of:=IF([.E7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ood</text:p>
          </table:table-cell>
          <table:table-cell office:value-type="float" office:value="900.79" table:style-name="ce1">
            <text:p>900.79</text:p>
          </table:table-cell>
          <table:table-cell office:value-type="float" office:value="1106.51" table:style-name="ce1">
            <text:p>1106.51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date" office:date-value="2023-04-11T00:00:00" table:style-name="ce2">
            <text:p>11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618.30999999999995" table:style-name="ce1">
            <text:p>618.31</text:p>
          </table:table-cell>
          <table:table-cell office:value-type="string" office:string-value="Low" table:formula="of:=IF([.E8]&gt;[.$E$1003];&quot;High&quot;;&quot;Low&quot;)" table:style-name="ce1">
            <text:p>Low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urniture</text:p>
          </table:table-cell>
          <table:table-cell office:value-type="float" office:value="2408.81" table:style-name="ce1">
            <text:p>2408.81</text:p>
          </table:table-cell>
          <table:table-cell office:value-type="float" office:value="2624.09" table:style-name="ce1">
            <text:p>2624.09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01-06T00:00:00" table:style-name="ce2">
            <text:p>06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7698.92" table:style-name="ce1">
            <text:p>7698.92</text:p>
          </table:table-cell>
          <table:table-cell office:value-type="string" office:string-value="High" table:formula="of:=IF([.E9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rniture</text:p>
          </table:table-cell>
          <table:table-cell office:value-type="float" office:value="3702.51" table:style-name="ce1">
            <text:p>3702.51</text:p>
          </table:table-cell>
          <table:table-cell office:value-type="float" office:value="3964.65" table:style-name="ce1">
            <text:p>3964.65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6-29T00:00:00" table:style-name="ce2">
            <text:p>29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223.3900000000003" table:style-name="ce1">
            <text:p>4223.39</text:p>
          </table:table-cell>
          <table:table-cell office:value-type="string" office:string-value="Low" table:formula="of:=IF([.E10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urniture</text:p>
          </table:table-cell>
          <table:table-cell office:value-type="float" office:value="738.06" table:style-name="ce1">
            <text:p>738.06</text:p>
          </table:table-cell>
          <table:table-cell office:value-type="float" office:value="1095.44999999999" table:style-name="ce1">
            <text:p>1095.45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10-09T00:00:00" table:style-name="ce2">
            <text:p>09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8239.58" table:style-name="ce1">
            <text:p>8239.58</text:p>
          </table:table-cell>
          <table:table-cell office:value-type="string" office:string-value="High" table:formula="of:=IF([.E11]&gt;[.$E$1003];&quot;High&quot;;&quot;Low&quot;)" table:style-name="ce1">
            <text:p>High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lothing</text:p>
          </table:table-cell>
          <table:table-cell office:value-type="float" office:value="2228.35" table:style-name="ce1">
            <text:p>2228.35</text:p>
          </table:table-cell>
          <table:table-cell office:value-type="float" office:value="2682.34" table:style-name="ce1">
            <text:p>2682.34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date" office:date-value="2023-11-16T00:00:00" table:style-name="ce2">
            <text:p>16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8518.4500000000007" table:style-name="ce1">
            <text:p>8518.45</text:p>
          </table:table-cell>
          <table:table-cell office:value-type="string" office:string-value="High" table:formula="of:=IF([.E12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urniture</text:p>
          </table:table-cell>
          <table:table-cell office:value-type="float" office:value="2440.11" table:style-name="ce1">
            <text:p>2440.11</text:p>
          </table:table-cell>
          <table:table-cell office:value-type="float" office:value="2517.6" table:style-name="ce1">
            <text:p>2517.6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date" office:date-value="2023-08-14T00:00:00" table:style-name="ce2">
            <text:p>14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2198.7399999999998" table:style-name="ce1">
            <text:p>2198.74</text:p>
          </table:table-cell>
          <table:table-cell office:value-type="string" office:string-value="Low" table:formula="of:=IF([.E13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ood</text:p>
          </table:table-cell>
          <table:table-cell office:value-type="float" office:value="1100.81" table:style-name="ce1">
            <text:p>1100.81</text:p>
          </table:table-cell>
          <table:table-cell office:value-type="float" office:value="1137.44" table:style-name="ce1">
            <text:p>1137.44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11-11T00:00:00" table:style-name="ce2">
            <text:p>11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6607.8" table:style-name="ce1">
            <text:p>6607.8</text:p>
          </table:table-cell>
          <table:table-cell office:value-type="string" office:string-value="High" table:formula="of:=IF([.E14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ood</text:p>
          </table:table-cell>
          <table:table-cell office:value-type="float" office:value="622.01" table:style-name="ce1">
            <text:p>622.01</text:p>
          </table:table-cell>
          <table:table-cell office:value-type="float" office:value="641.09" table:style-name="ce1">
            <text:p>641.09</text:p>
          </table:table-cell>
          <table:table-cell office:value-type="string" table:style-name="ce1">
            <text:p>Retur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12-31T00:00:00" table:style-name="ce2">
            <text:p>31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4775.59" table:style-name="ce1">
            <text:p>4775.59</text:p>
          </table:table-cell>
          <table:table-cell office:value-type="string" office:string-value="Low" table:formula="of:=IF([.E15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urniture</text:p>
          </table:table-cell>
          <table:table-cell office:value-type="float" office:value="4190.28" table:style-name="ce1">
            <text:p>4190.28</text:p>
          </table:table-cell>
          <table:table-cell office:value-type="float" office:value="4270.6499999999996" table:style-name="ce1">
            <text:p>4270.65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date" office:date-value="2023-08-17T00:00:00" table:style-name="ce2">
            <text:p>17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8813.5499999999993" table:style-name="ce1">
            <text:p>8813.55</text:p>
          </table:table-cell>
          <table:table-cell office:value-type="string" office:string-value="High" table:formula="of:=IF([.E16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ood</text:p>
          </table:table-cell>
          <table:table-cell office:value-type="float" office:value="2537.1999999999998" table:style-name="ce1">
            <text:p>2537.2</text:p>
          </table:table-cell>
          <table:table-cell office:value-type="float" office:value="2869.6" table:style-name="ce1">
            <text:p>2869.6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10-16T00:00:00" table:style-name="ce2">
            <text:p>16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2235.83" table:style-name="ce1">
            <text:p>2235.83</text:p>
          </table:table-cell>
          <table:table-cell office:value-type="string" office:string-value="Low" table:formula="of:=IF([.E17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urniture</text:p>
          </table:table-cell>
          <table:table-cell office:value-type="float" office:value="121.19" table:style-name="ce1">
            <text:p>121.19</text:p>
          </table:table-cell>
          <table:table-cell office:value-type="float" office:value="487.65" table:style-name="ce1">
            <text:p>487.65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5-30T00:00:00" table:style-name="ce2">
            <text:p>30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810.35" table:style-name="ce1">
            <text:p>6810.35</text:p>
          </table:table-cell>
          <table:table-cell office:value-type="string" office:string-value="High" table:formula="of:=IF([.E18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4024.76" table:style-name="ce1">
            <text:p>4024.76</text:p>
          </table:table-cell>
          <table:table-cell office:value-type="float" office:value="4420.1499999999996" table:style-name="ce1">
            <text:p>4420.15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date" office:date-value="2023-10-04T00:00:00" table:style-name="ce2">
            <text:p>04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116.75" table:style-name="ce1">
            <text:p>6116.75</text:p>
          </table:table-cell>
          <table:table-cell office:value-type="string" office:string-value="High" table:formula="of:=IF([.E19]&gt;[.$E$1003];&quot;High&quot;;&quot;Low&quot;)" table:style-name="ce1">
            <text:p>High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lectronics</text:p>
          </table:table-cell>
          <table:table-cell office:value-type="float" office:value="4904.93" table:style-name="ce1">
            <text:p>4904.93</text:p>
          </table:table-cell>
          <table:table-cell office:value-type="float" office:value="5034.3500000000004" table:style-name="ce1">
            <text:p>5034.35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07-17T00:00:00" table:style-name="ce2">
            <text:p>17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3023.48" table:style-name="ce1">
            <text:p>3023.48</text:p>
          </table:table-cell>
          <table:table-cell office:value-type="string" office:string-value="Low" table:formula="of:=IF([.E20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lothing</text:p>
          </table:table-cell>
          <table:table-cell office:value-type="float" office:value="3049.33" table:style-name="ce1">
            <text:p>3049.33</text:p>
          </table:table-cell>
          <table:table-cell office:value-type="float" office:value="3209.22" table:style-name="ce1">
            <text:p>3209.22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03-11T00:00:00" table:style-name="ce2">
            <text:p>11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1452.35" table:style-name="ce1">
            <text:p>1452.35</text:p>
          </table:table-cell>
          <table:table-cell office:value-type="string" office:string-value="Low" table:formula="of:=IF([.E21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othing</text:p>
          </table:table-cell>
          <table:table-cell office:value-type="float" office:value="2543.36" table:style-name="ce1">
            <text:p>2543.36</text:p>
          </table:table-cell>
          <table:table-cell office:value-type="float" office:value="2790.1" table:style-name="ce1">
            <text:p>2790.1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4-22T00:00:00" table:style-name="ce2">
            <text:p>22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6551.23" table:style-name="ce1">
            <text:p>6551.23</text:p>
          </table:table-cell>
          <table:table-cell office:value-type="string" office:string-value="High" table:formula="of:=IF([.E22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4398.16" table:style-name="ce1">
            <text:p>4398.16</text:p>
          </table:table-cell>
          <table:table-cell office:value-type="float" office:value="4439.12" table:style-name="ce1">
            <text:p>4439.12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date" office:date-value="2023-01-04T00:00:00" table:style-name="ce2">
            <text:p>04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7412.11" table:style-name="ce1">
            <text:p>7412.11</text:p>
          </table:table-cell>
          <table:table-cell office:value-type="string" office:string-value="High" table:formula="of:=IF([.E23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lectronics</text:p>
          </table:table-cell>
          <table:table-cell office:value-type="float" office:value="4764.96" table:style-name="ce1">
            <text:p>4764.96</text:p>
          </table:table-cell>
          <table:table-cell office:value-type="float" office:value="5074.42" table:style-name="ce1">
            <text:p>5074.42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12-16T00:00:00" table:style-name="ce2">
            <text:p>16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3224.71" table:style-name="ce1">
            <text:p>3224.71</text:p>
          </table:table-cell>
          <table:table-cell office:value-type="string" office:string-value="Low" table:formula="of:=IF([.E24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lothing</text:p>
          </table:table-cell>
          <table:table-cell office:value-type="float" office:value="3784.96" table:style-name="ce1">
            <text:p>3784.96</text:p>
          </table:table-cell>
          <table:table-cell office:value-type="float" office:value="4276.99" table:style-name="ce1">
            <text:p>4276.99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11-27T00:00:00" table:style-name="ce2">
            <text:p>27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6483.84" table:style-name="ce1">
            <text:p>6483.84</text:p>
          </table:table-cell>
          <table:table-cell office:value-type="string" office:string-value="High" table:formula="of:=IF([.E25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urniture</text:p>
          </table:table-cell>
          <table:table-cell office:value-type="float" office:value="2254.9899999999998" table:style-name="ce1">
            <text:p>2254.99</text:p>
          </table:table-cell>
          <table:table-cell office:value-type="float" office:value="2441.79" table:style-name="ce1">
            <text:p>2441.79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011.8" table:style-name="ce1">
            <text:p>4011.8</text:p>
          </table:table-cell>
          <table:table-cell office:value-type="string" office:string-value="Low" table:formula="of:=IF([.E26]&gt;[.$E$1003];&quot;High&quot;;&quot;Low&quot;)" table:style-name="ce1">
            <text:p>Low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urniture</text:p>
          </table:table-cell>
          <table:table-cell office:value-type="float" office:value="2981.5" table:style-name="ce1">
            <text:p>2981.5</text:p>
          </table:table-cell>
          <table:table-cell office:value-type="float" office:value="3360.4" table:style-name="ce1">
            <text:p>3360.4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date" office:date-value="2023-12-16T00:00:00" table:style-name="ce2">
            <text:p>16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7160.75" table:style-name="ce1">
            <text:p>7160.75</text:p>
          </table:table-cell>
          <table:table-cell office:value-type="string" office:string-value="High" table:formula="of:=IF([.E27]&gt;[.$E$1003];&quot;High&quot;;&quot;Low&quot;)" table:style-name="ce1">
            <text:p>High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lothing</text:p>
          </table:table-cell>
          <table:table-cell office:value-type="float" office:value="3519.63" table:style-name="ce1">
            <text:p>3519.63</text:p>
          </table:table-cell>
          <table:table-cell office:value-type="float" office:value="3774.65" table:style-name="ce1">
            <text:p>3774.65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4-05T00:00:00" table:style-name="ce2">
            <text:p>05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2072.23" table:style-name="ce1">
            <text:p>2072.23</text:p>
          </table:table-cell>
          <table:table-cell office:value-type="string" office:string-value="Low" table:formula="of:=IF([.E28]&gt;[.$E$1003];&quot;High&quot;;&quot;Low&quot;)" table:style-name="ce1">
            <text:p>Low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urniture</text:p>
          </table:table-cell>
          <table:table-cell office:value-type="float" office:value="1011.65" table:style-name="ce1">
            <text:p>1011.65</text:p>
          </table:table-cell>
          <table:table-cell office:value-type="float" office:value="1084.28" table:style-name="ce1">
            <text:p>1084.28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date" office:date-value="2023-06-01T00:00:00" table:style-name="ce2">
            <text:p>01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8913.1299999999992" table:style-name="ce1">
            <text:p>8913.13</text:p>
          </table:table-cell>
          <table:table-cell office:value-type="string" office:string-value="High" table:formula="of:=IF([.E29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2263.65" table:style-name="ce1">
            <text:p>2263.65</text:p>
          </table:table-cell>
          <table:table-cell office:value-type="float" office:value="2558.9499999999998" table:style-name="ce1">
            <text:p>2558.95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2945.36" table:style-name="ce1">
            <text:p>2945.36</text:p>
          </table:table-cell>
          <table:table-cell office:value-type="string" office:string-value="Low" table:formula="of:=IF([.E30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4157.62" table:style-name="ce1">
            <text:p>4157.62</text:p>
          </table:table-cell>
          <table:table-cell office:value-type="float" office:value="4314.5599999999904" table:style-name="ce1">
            <text:p>4314.56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date" office:date-value="2023-05-17T00:00:00" table:style-name="ce2">
            <text:p>17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3741.08" table:style-name="ce1">
            <text:p>3741.08</text:p>
          </table:table-cell>
          <table:table-cell office:value-type="string" office:string-value="Low" table:formula="of:=IF([.E31]&gt;[.$E$1003];&quot;High&quot;;&quot;Low&quot;)" table:style-name="ce1">
            <text:p>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rniture</text:p>
          </table:table-cell>
          <table:table-cell office:value-type="float" office:value="3290.89" table:style-name="ce1">
            <text:p>3290.89</text:p>
          </table:table-cell>
          <table:table-cell office:value-type="float" office:value="3317.75" table:style-name="ce1">
            <text:p>3317.75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date" office:date-value="2023-09-04T00:00:00" table:style-name="ce2">
            <text:p>04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675.11" table:style-name="ce1">
            <text:p>675.11</text:p>
          </table:table-cell>
          <table:table-cell office:value-type="string" office:string-value="Low" table:formula="of:=IF([.E32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ood</text:p>
          </table:table-cell>
          <table:table-cell office:value-type="float" office:value="2085.46" table:style-name="ce1">
            <text:p>2085.46</text:p>
          </table:table-cell>
          <table:table-cell office:value-type="float" office:value="2406.58" table:style-name="ce1">
            <text:p>2406.58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08-31T00:00:00" table:style-name="ce2">
            <text:p>31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1203.97" table:style-name="ce1">
            <text:p>1203.97</text:p>
          </table:table-cell>
          <table:table-cell office:value-type="string" office:string-value="Low" table:formula="of:=IF([.E33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ood</text:p>
          </table:table-cell>
          <table:table-cell office:value-type="float" office:value="3333.64" table:style-name="ce1">
            <text:p>3333.64</text:p>
          </table:table-cell>
          <table:table-cell office:value-type="float" office:value="3764.52" table:style-name="ce1">
            <text:p>3764.52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date" office:date-value="2023-01-31T00:00:00" table:style-name="ce2">
            <text:p>31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5207.03" table:style-name="ce1">
            <text:p>5207.03</text:p>
          </table:table-cell>
          <table:table-cell office:value-type="string" office:string-value="High" table:formula="of:=IF([.E34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ood</text:p>
          </table:table-cell>
          <table:table-cell office:value-type="float" office:value="635.20000000000005" table:style-name="ce1">
            <text:p>635.2</text:p>
          </table:table-cell>
          <table:table-cell office:value-type="float" office:value="814.14" table:style-name="ce1">
            <text:p>814.14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2-09T00:00:00" table:style-name="ce2">
            <text:p>09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2749.17" table:style-name="ce1">
            <text:p>2749.17</text:p>
          </table:table-cell>
          <table:table-cell office:value-type="string" office:string-value="Low" table:formula="of:=IF([.E35]&gt;[.$E$1003];&quot;High&quot;;&quot;Low&quot;)" table:style-name="ce1">
            <text:p>L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urniture</text:p>
          </table:table-cell>
          <table:table-cell office:value-type="float" office:value="2037.41" table:style-name="ce1">
            <text:p>2037.41</text:p>
          </table:table-cell>
          <table:table-cell office:value-type="float" office:value="2238.65" table:style-name="ce1">
            <text:p>2238.65</text:p>
          </table:table-cell>
          <table:table-cell office:value-type="string" table:style-name="ce1">
            <text:p>New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08-17T00:00:00" table:style-name="ce2">
            <text:p>17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8371.25" table:style-name="ce1">
            <text:p>8371.25</text:p>
          </table:table-cell>
          <table:table-cell office:value-type="string" office:string-value="High" table:formula="of:=IF([.E36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3975.99" table:style-name="ce1">
            <text:p>3975.99</text:p>
          </table:table-cell>
          <table:table-cell office:value-type="float" office:value="4422.59" table:style-name="ce1">
            <text:p>4422.59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date" office:date-value="2023-02-05T00:00:00" table:style-name="ce2">
            <text:p>05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245.46" table:style-name="ce1">
            <text:p>245.46</text:p>
          </table:table-cell>
          <table:table-cell office:value-type="string" office:string-value="Low" table:formula="of:=IF([.E37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1141.52" table:style-name="ce1">
            <text:p>1141.52</text:p>
          </table:table-cell>
          <table:table-cell office:value-type="float" office:value="1550.19" table:style-name="ce1">
            <text:p>1550.19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08-11T00:00:00" table:style-name="ce2">
            <text:p>11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3853.03" table:style-name="ce1">
            <text:p>3853.03</text:p>
          </table:table-cell>
          <table:table-cell office:value-type="string" office:string-value="Low" table:formula="of:=IF([.E38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urniture</text:p>
          </table:table-cell>
          <table:table-cell office:value-type="float" office:value="970.51" table:style-name="ce1">
            <text:p>970.51</text:p>
          </table:table-cell>
          <table:table-cell office:value-type="float" office:value="1330.84" table:style-name="ce1">
            <text:p>1330.84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1-06T00:00:00" table:style-name="ce2">
            <text:p>06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3439.72" table:style-name="ce1">
            <text:p>3439.72</text:p>
          </table:table-cell>
          <table:table-cell office:value-type="string" office:string-value="Low" table:formula="of:=IF([.E39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othing</text:p>
          </table:table-cell>
          <table:table-cell office:value-type="float" office:value="4756.55" table:style-name="ce1">
            <text:p>4756.55</text:p>
          </table:table-cell>
          <table:table-cell office:value-type="float" office:value="4888.46" table:style-name="ce1">
            <text:p>4888.46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11-18T00:00:00" table:style-name="ce2">
            <text:p>18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291.33999999999997" table:style-name="ce1">
            <text:p>291.34</text:p>
          </table:table-cell>
          <table:table-cell office:value-type="string" office:string-value="Low" table:formula="of:=IF([.E40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urniture</text:p>
          </table:table-cell>
          <table:table-cell office:value-type="float" office:value="1088.99" table:style-name="ce1">
            <text:p>1088.99</text:p>
          </table:table-cell>
          <table:table-cell office:value-type="float" office:value="1545" table:style-name="ce1">
            <text:p>1545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8-08T00:00:00" table:style-name="ce2">
            <text:p>08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1331.25" table:style-name="ce1">
            <text:p>1331.25</text:p>
          </table:table-cell>
          <table:table-cell office:value-type="string" office:string-value="Low" table:formula="of:=IF([.E41]&gt;[.$E$1003];&quot;High&quot;;&quot;Low&quot;)" table:style-name="ce1">
            <text:p>Low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lectronics</text:p>
          </table:table-cell>
          <table:table-cell office:value-type="float" office:value="1341.55" table:style-name="ce1">
            <text:p>1341.55</text:p>
          </table:table-cell>
          <table:table-cell office:value-type="float" office:value="1427.21" table:style-name="ce1">
            <text:p>1427.21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3-16T00:00:00" table:style-name="ce2">
            <text:p>16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195.0600000000004" table:style-name="ce1">
            <text:p>4195.06</text:p>
          </table:table-cell>
          <table:table-cell office:value-type="string" office:string-value="Low" table:formula="of:=IF([.E42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urniture</text:p>
          </table:table-cell>
          <table:table-cell office:value-type="float" office:value="4849.6000000000004" table:style-name="ce1">
            <text:p>4849.6</text:p>
          </table:table-cell>
          <table:table-cell office:value-type="float" office:value="5166.72" table:style-name="ce1">
            <text:p>5166.72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01-04T00:00:00" table:style-name="ce2">
            <text:p>04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4979.3599999999997" table:style-name="ce1">
            <text:p>4979.36</text:p>
          </table:table-cell>
          <table:table-cell office:value-type="string" office:string-value="Low" table:formula="of:=IF([.E43]&gt;[.$E$1003];&quot;High&quot;;&quot;Low&quot;)" table:style-name="ce1">
            <text:p>Low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lectronics</text:p>
          </table:table-cell>
          <table:table-cell office:value-type="float" office:value="3686.81" table:style-name="ce1">
            <text:p>3686.81</text:p>
          </table:table-cell>
          <table:table-cell office:value-type="float" office:value="3710.92" table:style-name="ce1">
            <text:p>3710.92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date" office:date-value="2023-12-01T00:00:00" table:style-name="ce2">
            <text:p>01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4102.47" table:style-name="ce1">
            <text:p>4102.47</text:p>
          </table:table-cell>
          <table:table-cell office:value-type="string" office:string-value="Low" table:formula="of:=IF([.E44]&gt;[.$E$1003];&quot;High&quot;;&quot;Low&quot;)" table:style-name="ce1">
            <text:p>Lo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urniture</text:p>
          </table:table-cell>
          <table:table-cell office:value-type="float" office:value="3513" table:style-name="ce1">
            <text:p>3513</text:p>
          </table:table-cell>
          <table:table-cell office:value-type="float" office:value="3838.42" table:style-name="ce1">
            <text:p>3838.42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date" office:date-value="2023-05-14T00:00:00" table:style-name="ce2">
            <text:p>14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5356.28" table:style-name="ce1">
            <text:p>5356.28</text:p>
          </table:table-cell>
          <table:table-cell office:value-type="string" office:string-value="High" table:formula="of:=IF([.E45]&gt;[.$E$1003];&quot;High&quot;;&quot;Low&quot;)" table:style-name="ce1">
            <text:p>Hig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lectronics</text:p>
          </table:table-cell>
          <table:table-cell office:value-type="float" office:value="4271.99" table:style-name="ce1">
            <text:p>4271.99</text:p>
          </table:table-cell>
          <table:table-cell office:value-type="float" office:value="4417.79" table:style-name="ce1">
            <text:p>4417.79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04-28T00:00:00" table:style-name="ce2">
            <text:p>28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5991.8" table:style-name="ce1">
            <text:p>5991.8</text:p>
          </table:table-cell>
          <table:table-cell office:value-type="string" office:string-value="High" table:formula="of:=IF([.E46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urniture</text:p>
          </table:table-cell>
          <table:table-cell office:value-type="float" office:value="623.32000000000005" table:style-name="ce1">
            <text:p>623.32</text:p>
          </table:table-cell>
          <table:table-cell office:value-type="float" office:value="853.66" table:style-name="ce1">
            <text:p>853.66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04-04T00:00:00" table:style-name="ce2">
            <text:p>04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198.25" table:style-name="ce1">
            <text:p>198.25</text:p>
          </table:table-cell>
          <table:table-cell office:value-type="string" office:string-value="Low" table:formula="of:=IF([.E47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lectronics</text:p>
          </table:table-cell>
          <table:table-cell office:value-type="float" office:value="3544.48" table:style-name="ce1">
            <text:p>3544.48</text:p>
          </table:table-cell>
          <table:table-cell office:value-type="float" office:value="3723.66" table:style-name="ce1">
            <text:p>3723.66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date" office:date-value="2023-03-03T00:00:00" table:style-name="ce2">
            <text:p>03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4694.54" table:style-name="ce1">
            <text:p>4694.54</text:p>
          </table:table-cell>
          <table:table-cell office:value-type="string" office:string-value="Low" table:formula="of:=IF([.E48]&gt;[.$E$1003];&quot;High&quot;;&quot;Low&quot;)" table:style-name="ce1">
            <text:p>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od</text:p>
          </table:table-cell>
          <table:table-cell office:value-type="float" office:value="2543.2600000000002" table:style-name="ce1">
            <text:p>2543.26</text:p>
          </table:table-cell>
          <table:table-cell office:value-type="float" office:value="2637.91" table:style-name="ce1">
            <text:p>2637.91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07-13T00:00:00" table:style-name="ce2">
            <text:p>13/07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9638.64" table:style-name="ce1">
            <text:p>9638.64</text:p>
          </table:table-cell>
          <table:table-cell office:value-type="string" office:string-value="High" table:formula="of:=IF([.E49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4154.3" table:style-name="ce1">
            <text:p>4154.3</text:p>
          </table:table-cell>
          <table:table-cell office:value-type="float" office:value="4469.07" table:style-name="ce1">
            <text:p>4469.07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date" office:date-value="2023-12-01T00:00:00" table:style-name="ce2">
            <text:p>01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5238.42" table:style-name="ce1">
            <text:p>5238.42</text:p>
          </table:table-cell>
          <table:table-cell office:value-type="string" office:string-value="High" table:formula="of:=IF([.E50]&gt;[.$E$1003];&quot;High&quot;;&quot;Low&quot;)" table:style-name="ce1">
            <text:p>High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urniture</text:p>
          </table:table-cell>
          <table:table-cell office:value-type="float" office:value="2565.3000000000002" table:style-name="ce1">
            <text:p>2565.3</text:p>
          </table:table-cell>
          <table:table-cell office:value-type="float" office:value="3007.47" table:style-name="ce1">
            <text:p>3007.47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7-22T00:00:00" table:style-name="ce2">
            <text:p>22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6807.67" table:style-name="ce1">
            <text:p>6807.67</text:p>
          </table:table-cell>
          <table:table-cell office:value-type="string" office:string-value="High" table:formula="of:=IF([.E51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lothing</text:p>
          </table:table-cell>
          <table:table-cell office:value-type="float" office:value="3120.19" table:style-name="ce1">
            <text:p>3120.19</text:p>
          </table:table-cell>
          <table:table-cell office:value-type="float" office:value="3600.14" table:style-name="ce1">
            <text:p>3600.14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date" office:date-value="2023-01-26T00:00:00" table:style-name="ce2">
            <text:p>26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3187.45" table:style-name="ce1">
            <text:p>3187.45</text:p>
          </table:table-cell>
          <table:table-cell office:value-type="string" office:string-value="Low" table:formula="of:=IF([.E52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othing</text:p>
          </table:table-cell>
          <table:table-cell office:value-type="float" office:value="2414.8200000000002" table:style-name="ce1">
            <text:p>2414.82</text:p>
          </table:table-cell>
          <table:table-cell office:value-type="float" office:value="2519.0700000000002" table:style-name="ce1">
            <text:p>2519.07</text:p>
          </table:table-cell>
          <table:table-cell office:value-type="string" table:style-name="ce1">
            <text:p>Retur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06-22T00:00:00" table:style-name="ce2">
            <text:p>22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7762.51" table:style-name="ce1">
            <text:p>7762.51</text:p>
          </table:table-cell>
          <table:table-cell office:value-type="string" office:string-value="High" table:formula="of:=IF([.E53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lectronics</text:p>
          </table:table-cell>
          <table:table-cell office:value-type="float" office:value="2416.89" table:style-name="ce1">
            <text:p>2416.89</text:p>
          </table:table-cell>
          <table:table-cell office:value-type="float" office:value="2778.3999999999901" table:style-name="ce1">
            <text:p>2778.4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10-27T00:00:00" table:style-name="ce2">
            <text:p>27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751.92" table:style-name="ce1">
            <text:p>7751.92</text:p>
          </table:table-cell>
          <table:table-cell office:value-type="string" office:string-value="High" table:formula="of:=IF([.E54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3851.45" table:style-name="ce1">
            <text:p>3851.45</text:p>
          </table:table-cell>
          <table:table-cell office:value-type="float" office:value="4186.9799999999996" table:style-name="ce1">
            <text:p>4186.98</text:p>
          </table:table-cell>
          <table:table-cell office:value-type="string" table:style-name="ce1">
            <text:p>Returnin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05-13T00:00:00" table:style-name="ce2">
            <text:p>13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5260.83" table:style-name="ce1">
            <text:p>5260.83</text:p>
          </table:table-cell>
          <table:table-cell office:value-type="string" office:string-value="High" table:formula="of:=IF([.E55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lectronics</text:p>
          </table:table-cell>
          <table:table-cell office:value-type="float" office:value="3161.4" table:style-name="ce1">
            <text:p>3161.4</text:p>
          </table:table-cell>
          <table:table-cell office:value-type="float" office:value="3339.66" table:style-name="ce1">
            <text:p>3339.66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11-22T00:00:00" table:style-name="ce2">
            <text:p>22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9762.5400000000009" table:style-name="ce1">
            <text:p>9762.54</text:p>
          </table:table-cell>
          <table:table-cell office:value-type="string" office:string-value="High" table:formula="of:=IF([.E56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ood</text:p>
          </table:table-cell>
          <table:table-cell office:value-type="float" office:value="3184.65" table:style-name="ce1">
            <text:p>3184.65</text:p>
          </table:table-cell>
          <table:table-cell office:value-type="float" office:value="3204.01" table:style-name="ce1">
            <text:p>3204.01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04-28T00:00:00" table:style-name="ce2">
            <text:p>28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1342.95" table:style-name="ce1">
            <text:p>1342.95</text:p>
          </table:table-cell>
          <table:table-cell office:value-type="string" office:string-value="Low" table:formula="of:=IF([.E57]&gt;[.$E$1003];&quot;High&quot;;&quot;Low&quot;)" table:style-name="ce1">
            <text:p>Low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lothing</text:p>
          </table:table-cell>
          <table:table-cell office:value-type="float" office:value="2278.9" table:style-name="ce1">
            <text:p>2278.9</text:p>
          </table:table-cell>
          <table:table-cell office:value-type="float" office:value="2626.9" table:style-name="ce1">
            <text:p>2626.9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11-20T00:00:00" table:style-name="ce2">
            <text:p>20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267.77999999999997" table:style-name="ce1">
            <text:p>267.78</text:p>
          </table:table-cell>
          <table:table-cell office:value-type="string" office:string-value="Low" table:formula="of:=IF([.E58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onics</text:p>
          </table:table-cell>
          <table:table-cell office:value-type="float" office:value="2678.99" table:style-name="ce1">
            <text:p>2678.99</text:p>
          </table:table-cell>
          <table:table-cell office:value-type="float" office:value="3152.2799999999902" table:style-name="ce1">
            <text:p>3152.28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10-02T00:00:00" table:style-name="ce2">
            <text:p>02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7724.57" table:style-name="ce1">
            <text:p>7724.57</text:p>
          </table:table-cell>
          <table:table-cell office:value-type="string" office:string-value="High" table:formula="of:=IF([.E59]&gt;[.$E$1003];&quot;High&quot;;&quot;Low&quot;)" table:style-name="ce1">
            <text:p>High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lectronics</text:p>
          </table:table-cell>
          <table:table-cell office:value-type="float" office:value="3741.3" table:style-name="ce1">
            <text:p>3741.3</text:p>
          </table:table-cell>
          <table:table-cell office:value-type="float" office:value="4061.04" table:style-name="ce1">
            <text:p>4061.04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7-31T00:00:00" table:style-name="ce2">
            <text:p>31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8090.84" table:style-name="ce1">
            <text:p>8090.84</text:p>
          </table:table-cell>
          <table:table-cell office:value-type="string" office:string-value="High" table:formula="of:=IF([.E60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lothing</text:p>
          </table:table-cell>
          <table:table-cell office:value-type="float" office:value="4138.41" table:style-name="ce1">
            <text:p>4138.41</text:p>
          </table:table-cell>
          <table:table-cell office:value-type="float" office:value="4361.7" table:style-name="ce1">
            <text:p>4361.7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date" office:date-value="2023-08-13T00:00:00" table:style-name="ce2">
            <text:p>13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290.05" table:style-name="ce1">
            <text:p>1290.05</text:p>
          </table:table-cell>
          <table:table-cell office:value-type="string" office:string-value="Low" table:formula="of:=IF([.E61]&gt;[.$E$1003];&quot;High&quot;;&quot;Low&quot;)" table:style-name="ce1">
            <text:p>Low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urniture</text:p>
          </table:table-cell>
          <table:table-cell office:value-type="float" office:value="3497.98" table:style-name="ce1">
            <text:p>3497.98</text:p>
          </table:table-cell>
          <table:table-cell office:value-type="float" office:value="3765.31" table:style-name="ce1">
            <text:p>3765.31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1-20T00:00:00" table:style-name="ce2">
            <text:p>20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729.27" table:style-name="ce1">
            <text:p>2729.27</text:p>
          </table:table-cell>
          <table:table-cell office:value-type="string" office:string-value="Low" table:formula="of:=IF([.E62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lectronics</text:p>
          </table:table-cell>
          <table:table-cell office:value-type="float" office:value="4624.16" table:style-name="ce1">
            <text:p>4624.16</text:p>
          </table:table-cell>
          <table:table-cell office:value-type="float" office:value="4731.9799999999996" table:style-name="ce1">
            <text:p>4731.98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04-23T00:00:00" table:style-name="ce2">
            <text:p>23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73.77" table:style-name="ce1">
            <text:p>273.77</text:p>
          </table:table-cell>
          <table:table-cell office:value-type="string" office:string-value="Low" table:formula="of:=IF([.E63]&gt;[.$E$1003];&quot;High&quot;;&quot;Low&quot;)" table:style-name="ce1">
            <text:p>Low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lothing</text:p>
          </table:table-cell>
          <table:table-cell office:value-type="float" office:value="4110.6000000000004" table:style-name="ce1">
            <text:p>4110.6</text:p>
          </table:table-cell>
          <table:table-cell office:value-type="float" office:value="4488.37" table:style-name="ce1">
            <text:p>4488.37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date" office:date-value="2023-05-20T00:00:00" table:style-name="ce2">
            <text:p>20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3003.76" table:style-name="ce1">
            <text:p>3003.76</text:p>
          </table:table-cell>
          <table:table-cell office:value-type="string" office:string-value="Low" table:formula="of:=IF([.E64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urniture</text:p>
          </table:table-cell>
          <table:table-cell office:value-type="float" office:value="2831.23" table:style-name="ce1">
            <text:p>2831.23</text:p>
          </table:table-cell>
          <table:table-cell office:value-type="float" office:value="3206.98" table:style-name="ce1">
            <text:p>3206.98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7754.1" table:style-name="ce1">
            <text:p>7754.1</text:p>
          </table:table-cell>
          <table:table-cell office:value-type="string" office:string-value="High" table:formula="of:=IF([.E65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ood</text:p>
          </table:table-cell>
          <table:table-cell office:value-type="float" office:value="3373.46" table:style-name="ce1">
            <text:p>3373.46</text:p>
          </table:table-cell>
          <table:table-cell office:value-type="float" office:value="3454.76" table:style-name="ce1">
            <text:p>3454.76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01-01T00:00:00" table:style-name="ce2">
            <text:p>01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5227.8100000000004" table:style-name="ce1">
            <text:p>5227.81</text:p>
          </table:table-cell>
          <table:table-cell office:value-type="string" office:string-value="High" table:formula="of:=IF([.E66]&gt;[.$E$1003];&quot;High&quot;;&quot;Low&quot;)" table:style-name="ce1">
            <text:p>High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lothing</text:p>
          </table:table-cell>
          <table:table-cell office:value-type="float" office:value="4635.2299999999996" table:style-name="ce1">
            <text:p>4635.23</text:p>
          </table:table-cell>
          <table:table-cell office:value-type="float" office:value="5075.4399999999996" table:style-name="ce1">
            <text:p>5075.44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3-31T00:00:00" table:style-name="ce2">
            <text:p>31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3546.15" table:style-name="ce1">
            <text:p>3546.15</text:p>
          </table:table-cell>
          <table:table-cell office:value-type="string" office:string-value="Low" table:formula="of:=IF([.E67]&gt;[.$E$1003];&quot;High&quot;;&quot;Low&quot;)" table:style-name="ce1">
            <text:p>Low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lectronics</text:p>
          </table:table-cell>
          <table:table-cell office:value-type="float" office:value="3114.88" table:style-name="ce1">
            <text:p>3114.88</text:p>
          </table:table-cell>
          <table:table-cell office:value-type="float" office:value="3256.78" table:style-name="ce1">
            <text:p>3256.78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05-22T00:00:00" table:style-name="ce2">
            <text:p>22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780.22" table:style-name="ce1">
            <text:p>3780.22</text:p>
          </table:table-cell>
          <table:table-cell office:value-type="string" office:string-value="Low" table:formula="of:=IF([.E68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ood</text:p>
          </table:table-cell>
          <table:table-cell office:value-type="float" office:value="4132.79" table:style-name="ce1">
            <text:p>4132.79</text:p>
          </table:table-cell>
          <table:table-cell office:value-type="float" office:value="4624.1000000000004" table:style-name="ce1">
            <text:p>4624.1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date" office:date-value="2023-11-16T00:00:00" table:style-name="ce2">
            <text:p>16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113.4" table:style-name="ce1">
            <text:p>113.4</text:p>
          </table:table-cell>
          <table:table-cell office:value-type="string" office:string-value="Low" table:formula="of:=IF([.E69]&gt;[.$E$1003];&quot;High&quot;;&quot;Low&quot;)" table:style-name="ce1">
            <text:p>Lo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urniture</text:p>
          </table:table-cell>
          <table:table-cell office:value-type="float" office:value="3459.61" table:style-name="ce1">
            <text:p>3459.61</text:p>
          </table:table-cell>
          <table:table-cell office:value-type="float" office:value="3657.23" table:style-name="ce1">
            <text:p>3657.23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date" office:date-value="2023-02-07T00:00:00" table:style-name="ce2">
            <text:p>07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3068.03" table:style-name="ce1">
            <text:p>3068.03</text:p>
          </table:table-cell>
          <table:table-cell office:value-type="string" office:string-value="Low" table:formula="of:=IF([.E70]&gt;[.$E$1003];&quot;High&quot;;&quot;Low&quot;)" table:style-name="ce1">
            <text:p>Low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urniture</text:p>
          </table:table-cell>
          <table:table-cell office:value-type="float" office:value="2782.08" table:style-name="ce1">
            <text:p>2782.08</text:p>
          </table:table-cell>
          <table:table-cell office:value-type="float" office:value="2879.24" table:style-name="ce1">
            <text:p>2879.24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499.94" table:style-name="ce1">
            <text:p>6499.94</text:p>
          </table:table-cell>
          <table:table-cell office:value-type="string" office:string-value="High" table:formula="of:=IF([.E71]&gt;[.$E$1003];&quot;High&quot;;&quot;Low&quot;)" table:style-name="ce1">
            <text:p>High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lothing</text:p>
          </table:table-cell>
          <table:table-cell office:value-type="float" office:value="1247.0999999999999" table:style-name="ce1">
            <text:p>1247.1</text:p>
          </table:table-cell>
          <table:table-cell office:value-type="float" office:value="1429.4399999999901" table:style-name="ce1">
            <text:p>1429.44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date" office:date-value="2023-05-19T00:00:00" table:style-name="ce2">
            <text:p>19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9744.52" table:style-name="ce1">
            <text:p>9744.52</text:p>
          </table:table-cell>
          <table:table-cell office:value-type="string" office:string-value="High" table:formula="of:=IF([.E72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lothing</text:p>
          </table:table-cell>
          <table:table-cell office:value-type="float" office:value="2158.69" table:style-name="ce1">
            <text:p>2158.69</text:p>
          </table:table-cell>
          <table:table-cell office:value-type="float" office:value="2384.38" table:style-name="ce1">
            <text:p>2384.38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8485.9" table:style-name="ce1">
            <text:p>8485.9</text:p>
          </table:table-cell>
          <table:table-cell office:value-type="string" office:string-value="High" table:formula="of:=IF([.E73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othing</text:p>
          </table:table-cell>
          <table:table-cell office:value-type="float" office:value="4840.33" table:style-name="ce1">
            <text:p>4840.33</text:p>
          </table:table-cell>
          <table:table-cell office:value-type="float" office:value="4884.29" table:style-name="ce1">
            <text:p>4884.29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11-29T00:00:00" table:style-name="ce2">
            <text:p>29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333.59" table:style-name="ce1">
            <text:p>333.59</text:p>
          </table:table-cell>
          <table:table-cell office:value-type="string" office:string-value="Low" table:formula="of:=IF([.E74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urniture</text:p>
          </table:table-cell>
          <table:table-cell office:value-type="float" office:value="3305.94" table:style-name="ce1">
            <text:p>3305.94</text:p>
          </table:table-cell>
          <table:table-cell office:value-type="float" office:value="3599.27" table:style-name="ce1">
            <text:p>3599.27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date" office:date-value="2023-09-16T00:00:00" table:style-name="ce2">
            <text:p>16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8995.75" table:style-name="ce1">
            <text:p>8995.75</text:p>
          </table:table-cell>
          <table:table-cell office:value-type="string" office:string-value="High" table:formula="of:=IF([.E75]&gt;[.$E$1003];&quot;High&quot;;&quot;Low&quot;)" table:style-name="ce1">
            <text:p>High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ood</text:p>
          </table:table-cell>
          <table:table-cell office:value-type="float" office:value="2843.76" table:style-name="ce1">
            <text:p>2843.76</text:p>
          </table:table-cell>
          <table:table-cell office:value-type="float" office:value="3146.6" table:style-name="ce1">
            <text:p>3146.6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06-10T00:00:00" table:style-name="ce2">
            <text:p>10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7853.66" table:style-name="ce1">
            <text:p>7853.66</text:p>
          </table:table-cell>
          <table:table-cell office:value-type="string" office:string-value="High" table:formula="of:=IF([.E76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urniture</text:p>
          </table:table-cell>
          <table:table-cell office:value-type="float" office:value="4668.1400000000003" table:style-name="ce1">
            <text:p>4668.14</text:p>
          </table:table-cell>
          <table:table-cell office:value-type="float" office:value="5040.22" table:style-name="ce1">
            <text:p>5040.22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06-27T00:00:00" table:style-name="ce2">
            <text:p>27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7825.72" table:style-name="ce1">
            <text:p>7825.72</text:p>
          </table:table-cell>
          <table:table-cell office:value-type="string" office:string-value="High" table:formula="of:=IF([.E77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office:value-type="float" office:value="2953.23" table:style-name="ce1">
            <text:p>2953.23</text:p>
          </table:table-cell>
          <table:table-cell office:value-type="float" office:value="2977.52" table:style-name="ce1">
            <text:p>2977.52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01-10T00:00:00" table:style-name="ce2">
            <text:p>10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4634.16" table:style-name="ce1">
            <text:p>4634.16</text:p>
          </table:table-cell>
          <table:table-cell office:value-type="string" office:string-value="Low" table:formula="of:=IF([.E78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urniture</text:p>
          </table:table-cell>
          <table:table-cell office:value-type="float" office:value="2654.11" table:style-name="ce1">
            <text:p>2654.11</text:p>
          </table:table-cell>
          <table:table-cell office:value-type="float" office:value="2929.32" table:style-name="ce1">
            <text:p>2929.32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09-18T00:00:00" table:style-name="ce2">
            <text:p>18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040.25" table:style-name="ce1">
            <text:p>4040.25</text:p>
          </table:table-cell>
          <table:table-cell office:value-type="string" office:string-value="Low" table:formula="of:=IF([.E79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lectronics</text:p>
          </table:table-cell>
          <table:table-cell office:value-type="float" office:value="3808.59" table:style-name="ce1">
            <text:p>3808.59</text:p>
          </table:table-cell>
          <table:table-cell office:value-type="float" office:value="3844.51" table:style-name="ce1">
            <text:p>3844.51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05-18T00:00:00" table:style-name="ce2">
            <text:p>18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3098.87" table:style-name="ce1">
            <text:p>3098.87</text:p>
          </table:table-cell>
          <table:table-cell office:value-type="string" office:string-value="Low" table:formula="of:=IF([.E80]&gt;[.$E$1003];&quot;High&quot;;&quot;Low&quot;)" table:style-name="ce1">
            <text:p>Low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ood</text:p>
          </table:table-cell>
          <table:table-cell office:value-type="float" office:value="3577.69" table:style-name="ce1">
            <text:p>3577.69</text:p>
          </table:table-cell>
          <table:table-cell office:value-type="float" office:value="3931.25" table:style-name="ce1">
            <text:p>3931.25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date" office:date-value="2023-06-21T00:00:00" table:style-name="ce2">
            <text:p>21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750.38" table:style-name="ce1">
            <text:p>750.38</text:p>
          </table:table-cell>
          <table:table-cell office:value-type="string" office:string-value="Low" table:formula="of:=IF([.E81]&gt;[.$E$1003];&quot;High&quot;;&quot;Low&quot;)" table:style-name="ce1">
            <text:p>Low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1006.14" table:style-name="ce1">
            <text:p>1006.14</text:p>
          </table:table-cell>
          <table:table-cell office:value-type="float" office:value="1043.45" table:style-name="ce1">
            <text:p>1043.45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1-13T00:00:00" table:style-name="ce2">
            <text:p>13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2359.5300000000002" table:style-name="ce1">
            <text:p>2359.53</text:p>
          </table:table-cell>
          <table:table-cell office:value-type="string" office:string-value="Low" table:formula="of:=IF([.E82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othing</text:p>
          </table:table-cell>
          <table:table-cell office:value-type="float" office:value="2382.98" table:style-name="ce1">
            <text:p>2382.98</text:p>
          </table:table-cell>
          <table:table-cell office:value-type="float" office:value="2839.73" table:style-name="ce1">
            <text:p>2839.73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06-17T00:00:00" table:style-name="ce2">
            <text:p>17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2541.38" table:style-name="ce1">
            <text:p>2541.38</text:p>
          </table:table-cell>
          <table:table-cell office:value-type="string" office:string-value="Low" table:formula="of:=IF([.E83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urniture</text:p>
          </table:table-cell>
          <table:table-cell office:value-type="float" office:value="2388.9499999999998" table:style-name="ce1">
            <text:p>2388.95</text:p>
          </table:table-cell>
          <table:table-cell office:value-type="float" office:value="2742.97" table:style-name="ce1">
            <text:p>2742.97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4892.3599999999997" table:style-name="ce1">
            <text:p>4892.36</text:p>
          </table:table-cell>
          <table:table-cell office:value-type="string" office:string-value="Low" table:formula="of:=IF([.E84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lothing</text:p>
          </table:table-cell>
          <table:table-cell office:value-type="float" office:value="1922.21" table:style-name="ce1">
            <text:p>1922.21</text:p>
          </table:table-cell>
          <table:table-cell office:value-type="float" office:value="2180.83" table:style-name="ce1">
            <text:p>2180.83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03-25T00:00:00" table:style-name="ce2">
            <text:p>25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7499.7" table:style-name="ce1">
            <text:p>7499.7</text:p>
          </table:table-cell>
          <table:table-cell office:value-type="string" office:string-value="High" table:formula="of:=IF([.E85]&gt;[.$E$1003];&quot;High&quot;;&quot;Low&quot;)" table:style-name="ce1">
            <text:p>High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ood</text:p>
          </table:table-cell>
          <table:table-cell office:value-type="float" office:value="2610.6" table:style-name="ce1">
            <text:p>2610.6</text:p>
          </table:table-cell>
          <table:table-cell office:value-type="float" office:value="2836.94" table:style-name="ce1">
            <text:p>2836.94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11-17T00:00:00" table:style-name="ce2">
            <text:p>17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4790.72" table:style-name="ce1">
            <text:p>4790.72</text:p>
          </table:table-cell>
          <table:table-cell office:value-type="string" office:string-value="Low" table:formula="of:=IF([.E86]&gt;[.$E$1003];&quot;High&quot;;&quot;Low&quot;)" table:style-name="ce1">
            <text:p>Low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2094.88" table:style-name="ce1">
            <text:p>2094.88</text:p>
          </table:table-cell>
          <table:table-cell office:value-type="float" office:value="2168.91" table:style-name="ce1">
            <text:p>2168.91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date" office:date-value="2023-11-15T00:00:00" table:style-name="ce2">
            <text:p>15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672.66" table:style-name="ce1">
            <text:p>672.66</text:p>
          </table:table-cell>
          <table:table-cell office:value-type="string" office:string-value="Low" table:formula="of:=IF([.E87]&gt;[.$E$1003];&quot;High&quot;;&quot;Low&quot;)" table:style-name="ce1">
            <text:p>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rniture</text:p>
          </table:table-cell>
          <table:table-cell office:value-type="float" office:value="1036.76" table:style-name="ce1">
            <text:p>1036.76</text:p>
          </table:table-cell>
          <table:table-cell office:value-type="float" office:value="1189.3499999999999" table:style-name="ce1">
            <text:p>1189.35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04-11T00:00:00" table:style-name="ce2">
            <text:p>11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9582.1200000000008" table:style-name="ce1">
            <text:p>9582.12</text:p>
          </table:table-cell>
          <table:table-cell office:value-type="string" office:string-value="High" table:formula="of:=IF([.E88]&gt;[.$E$1003];&quot;High&quot;;&quot;Low&quot;)" table:style-name="ce1">
            <text:p>High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ood</text:p>
          </table:table-cell>
          <table:table-cell office:value-type="float" office:value="2091.21" table:style-name="ce1">
            <text:p>2091.21</text:p>
          </table:table-cell>
          <table:table-cell office:value-type="float" office:value="2527" table:style-name="ce1">
            <text:p>2527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11-25T00:00:00" table:style-name="ce2">
            <text:p>25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9432.9699999999993" table:style-name="ce1">
            <text:p>9432.97</text:p>
          </table:table-cell>
          <table:table-cell office:value-type="string" office:string-value="High" table:formula="of:=IF([.E89]&gt;[.$E$1003];&quot;High&quot;;&quot;Low&quot;)" table:style-name="ce1">
            <text:p>Hig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lectronics</text:p>
          </table:table-cell>
          <table:table-cell office:value-type="float" office:value="407.77" table:style-name="ce1">
            <text:p>407.77</text:p>
          </table:table-cell>
          <table:table-cell office:value-type="float" office:value="860.95" table:style-name="ce1">
            <text:p>860.95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09-30T00:00:00" table:style-name="ce2">
            <text:p>30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7873.38" table:style-name="ce1">
            <text:p>7873.38</text:p>
          </table:table-cell>
          <table:table-cell office:value-type="string" office:string-value="High" table:formula="of:=IF([.E90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urniture</text:p>
          </table:table-cell>
          <table:table-cell office:value-type="float" office:value="2900.14" table:style-name="ce1">
            <text:p>2900.14</text:p>
          </table:table-cell>
          <table:table-cell office:value-type="float" office:value="2910.5099999999902" table:style-name="ce1">
            <text:p>2910.51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09-22T00:00:00" table:style-name="ce2">
            <text:p>22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9914.15" table:style-name="ce1">
            <text:p>9914.15</text:p>
          </table:table-cell>
          <table:table-cell office:value-type="string" office:string-value="High" table:formula="of:=IF([.E91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ectronics</text:p>
          </table:table-cell>
          <table:table-cell office:value-type="float" office:value="4275.59" table:style-name="ce1">
            <text:p>4275.59</text:p>
          </table:table-cell>
          <table:table-cell office:value-type="float" office:value="4576.72" table:style-name="ce1">
            <text:p>4576.72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date" office:date-value="2023-02-07T00:00:00" table:style-name="ce2">
            <text:p>07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5490.38" table:style-name="ce1">
            <text:p>5490.38</text:p>
          </table:table-cell>
          <table:table-cell office:value-type="string" office:string-value="High" table:formula="of:=IF([.E92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ood</text:p>
          </table:table-cell>
          <table:table-cell office:value-type="float" office:value="3640.17" table:style-name="ce1">
            <text:p>3640.17</text:p>
          </table:table-cell>
          <table:table-cell office:value-type="float" office:value="4002.63" table:style-name="ce1">
            <text:p>4002.63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date" office:date-value="2023-04-04T00:00:00" table:style-name="ce2">
            <text:p>04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9631.41" table:style-name="ce1">
            <text:p>9631.41</text:p>
          </table:table-cell>
          <table:table-cell office:value-type="string" office:string-value="High" table:formula="of:=IF([.E93]&gt;[.$E$1003];&quot;High&quot;;&quot;Low&quot;)" table:style-name="ce1">
            <text:p>High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urniture</text:p>
          </table:table-cell>
          <table:table-cell office:value-type="float" office:value="1833.95" table:style-name="ce1">
            <text:p>1833.95</text:p>
          </table:table-cell>
          <table:table-cell office:value-type="float" office:value="2147.14" table:style-name="ce1">
            <text:p>2147.14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04-05T00:00:00" table:style-name="ce2">
            <text:p>05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848.49" table:style-name="ce1">
            <text:p>848.49</text:p>
          </table:table-cell>
          <table:table-cell office:value-type="string" office:string-value="Low" table:formula="of:=IF([.E94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481" table:style-name="ce1">
            <text:p>481</text:p>
          </table:table-cell>
          <table:table-cell office:value-type="float" office:value="531.02" table:style-name="ce1">
            <text:p>531.02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3720.24" table:style-name="ce1">
            <text:p>3720.24</text:p>
          </table:table-cell>
          <table:table-cell office:value-type="string" office:string-value="Low" table:formula="of:=IF([.E95]&gt;[.$E$1003];&quot;High&quot;;&quot;Low&quot;)" table:style-name="ce1">
            <text:p>Low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ood</text:p>
          </table:table-cell>
          <table:table-cell office:value-type="float" office:value="1050.6400000000001" table:style-name="ce1">
            <text:p>1050.64</text:p>
          </table:table-cell>
          <table:table-cell office:value-type="float" office:value="1167.33" table:style-name="ce1">
            <text:p>1167.33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date" office:date-value="2023-03-10T00:00:00" table:style-name="ce2">
            <text:p>10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331.27" table:style-name="ce1">
            <text:p>2331.27</text:p>
          </table:table-cell>
          <table:table-cell office:value-type="string" office:string-value="Low" table:formula="of:=IF([.E96]&gt;[.$E$1003];&quot;High&quot;;&quot;Low&quot;)" table:style-name="ce1">
            <text:p>Low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othing</text:p>
          </table:table-cell>
          <table:table-cell office:value-type="float" office:value="2750.18" table:style-name="ce1">
            <text:p>2750.18</text:p>
          </table:table-cell>
          <table:table-cell office:value-type="float" office:value="2882.85" table:style-name="ce1">
            <text:p>2882.85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2038.75" table:style-name="ce1">
            <text:p>2038.75</text:p>
          </table:table-cell>
          <table:table-cell office:value-type="string" office:string-value="Low" table:formula="of:=IF([.E97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urniture</text:p>
          </table:table-cell>
          <table:table-cell office:value-type="float" office:value="1074.93" table:style-name="ce1">
            <text:p>1074.93</text:p>
          </table:table-cell>
          <table:table-cell office:value-type="float" office:value="1492.48" table:style-name="ce1">
            <text:p>1492.48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date" office:date-value="2023-08-24T00:00:00" table:style-name="ce2">
            <text:p>24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1493.95" table:style-name="ce1">
            <text:p>1493.95</text:p>
          </table:table-cell>
          <table:table-cell office:value-type="string" office:string-value="Low" table:formula="of:=IF([.E98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2742.67" table:style-name="ce1">
            <text:p>2742.67</text:p>
          </table:table-cell>
          <table:table-cell office:value-type="float" office:value="2979.64" table:style-name="ce1">
            <text:p>2979.64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date" office:date-value="2023-11-30T00:00:00" table:style-name="ce2">
            <text:p>30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6261.9" table:style-name="ce1">
            <text:p>6261.9</text:p>
          </table:table-cell>
          <table:table-cell office:value-type="string" office:string-value="High" table:formula="of:=IF([.E99]&gt;[.$E$1003];&quot;High&quot;;&quot;Low&quot;)" table:style-name="ce1">
            <text:p>High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lectronics</text:p>
          </table:table-cell>
          <table:table-cell office:value-type="float" office:value="1196.42" table:style-name="ce1">
            <text:p>1196.42</text:p>
          </table:table-cell>
          <table:table-cell office:value-type="float" office:value="1444.97" table:style-name="ce1">
            <text:p>1444.97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05-17T00:00:00" table:style-name="ce2">
            <text:p>17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7835.09" table:style-name="ce1">
            <text:p>7835.09</text:p>
          </table:table-cell>
          <table:table-cell office:value-type="string" office:string-value="High" table:formula="of:=IF([.E100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lothing</text:p>
          </table:table-cell>
          <table:table-cell office:value-type="float" office:value="4252.17" table:style-name="ce1">
            <text:p>4252.17</text:p>
          </table:table-cell>
          <table:table-cell office:value-type="float" office:value="4720.2700000000004" table:style-name="ce1">
            <text:p>4720.27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3-17T00:00:00" table:style-name="ce2">
            <text:p>17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5825.15" table:style-name="ce1">
            <text:p>5825.15</text:p>
          </table:table-cell>
          <table:table-cell office:value-type="string" office:string-value="High" table:formula="of:=IF([.E101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lectronics</text:p>
          </table:table-cell>
          <table:table-cell office:value-type="float" office:value="2016.49" table:style-name="ce1">
            <text:p>2016.49</text:p>
          </table:table-cell>
          <table:table-cell office:value-type="float" office:value="2338.66" table:style-name="ce1">
            <text:p>2338.66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date" office:date-value="2023-02-04T00:00:00" table:style-name="ce2">
            <text:p>04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554.93" table:style-name="ce1">
            <text:p>1554.93</text:p>
          </table:table-cell>
          <table:table-cell office:value-type="string" office:string-value="Low" table:formula="of:=IF([.E102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lectronics</text:p>
          </table:table-cell>
          <table:table-cell office:value-type="float" office:value="1265.48" table:style-name="ce1">
            <text:p>1265.48</text:p>
          </table:table-cell>
          <table:table-cell office:value-type="float" office:value="1715.83" table:style-name="ce1">
            <text:p>1715.83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01-01T00:00:00" table:style-name="ce2">
            <text:p>01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8130.13" table:style-name="ce1">
            <text:p>8130.13</text:p>
          </table:table-cell>
          <table:table-cell office:value-type="string" office:string-value="High" table:formula="of:=IF([.E103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lothing</text:p>
          </table:table-cell>
          <table:table-cell office:value-type="float" office:value="4071.01" table:style-name="ce1">
            <text:p>4071.01</text:p>
          </table:table-cell>
          <table:table-cell office:value-type="float" office:value="4304.7" table:style-name="ce1">
            <text:p>4304.7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10-23T00:00:00" table:style-name="ce2">
            <text:p>23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6395.95" table:style-name="ce1">
            <text:p>6395.95</text:p>
          </table:table-cell>
          <table:table-cell office:value-type="string" office:string-value="High" table:formula="of:=IF([.E104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lothing</text:p>
          </table:table-cell>
          <table:table-cell office:value-type="float" office:value="1747.05" table:style-name="ce1">
            <text:p>1747.05</text:p>
          </table:table-cell>
          <table:table-cell office:value-type="float" office:value="1830.27" table:style-name="ce1">
            <text:p>1830.27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date" office:date-value="2023-11-16T00:00:00" table:style-name="ce2">
            <text:p>16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3942.84" table:style-name="ce1">
            <text:p>3942.84</text:p>
          </table:table-cell>
          <table:table-cell office:value-type="string" office:string-value="Low" table:formula="of:=IF([.E105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ood</text:p>
          </table:table-cell>
          <table:table-cell office:value-type="float" office:value="601.86" table:style-name="ce1">
            <text:p>601.86</text:p>
          </table:table-cell>
          <table:table-cell office:value-type="float" office:value="1067.53" table:style-name="ce1">
            <text:p>1067.53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date" office:date-value="2023-03-01T00:00:00" table:style-name="ce2">
            <text:p>01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773.89" table:style-name="ce1">
            <text:p>6773.89</text:p>
          </table:table-cell>
          <table:table-cell office:value-type="string" office:string-value="High" table:formula="of:=IF([.E106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2873.53" table:style-name="ce1">
            <text:p>2873.53</text:p>
          </table:table-cell>
          <table:table-cell office:value-type="float" office:value="3108.3" table:style-name="ce1">
            <text:p>3108.3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11-16T00:00:00" table:style-name="ce2">
            <text:p>16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673.06" table:style-name="ce1">
            <text:p>2673.06</text:p>
          </table:table-cell>
          <table:table-cell office:value-type="string" office:string-value="Low" table:formula="of:=IF([.E107]&gt;[.$E$1003];&quot;High&quot;;&quot;Low&quot;)" table:style-name="ce1">
            <text:p>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rniture</text:p>
          </table:table-cell>
          <table:table-cell office:value-type="float" office:value="2928.74" table:style-name="ce1">
            <text:p>2928.74</text:p>
          </table:table-cell>
          <table:table-cell office:value-type="float" office:value="3027.74" table:style-name="ce1">
            <text:p>3027.74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date" office:date-value="2023-12-15T00:00:00" table:style-name="ce2">
            <text:p>15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3517.4" table:style-name="ce1">
            <text:p>3517.4</text:p>
          </table:table-cell>
          <table:table-cell office:value-type="string" office:string-value="Low" table:formula="of:=IF([.E108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lothing</text:p>
          </table:table-cell>
          <table:table-cell office:value-type="float" office:value="3587.74" table:style-name="ce1">
            <text:p>3587.74</text:p>
          </table:table-cell>
          <table:table-cell office:value-type="float" office:value="3745.91" table:style-name="ce1">
            <text:p>3745.91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date" office:date-value="2023-11-24T00:00:00" table:style-name="ce2">
            <text:p>24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9183.11" table:style-name="ce1">
            <text:p>9183.11</text:p>
          </table:table-cell>
          <table:table-cell office:value-type="string" office:string-value="High" table:formula="of:=IF([.E109]&gt;[.$E$1003];&quot;High&quot;;&quot;Low&quot;)" table:style-name="ce1">
            <text:p>High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ood</text:p>
          </table:table-cell>
          <table:table-cell office:value-type="float" office:value="1239.0899999999999" table:style-name="ce1">
            <text:p>1239.09</text:p>
          </table:table-cell>
          <table:table-cell office:value-type="float" office:value="1273.98" table:style-name="ce1">
            <text:p>1273.98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2975.99" table:style-name="ce1">
            <text:p>2975.99</text:p>
          </table:table-cell>
          <table:table-cell office:value-type="string" office:string-value="Low" table:formula="of:=IF([.E110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ood</text:p>
          </table:table-cell>
          <table:table-cell office:value-type="float" office:value="2246.67" table:style-name="ce1">
            <text:p>2246.67</text:p>
          </table:table-cell>
          <table:table-cell office:value-type="float" office:value="2486.14" table:style-name="ce1">
            <text:p>2486.14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date" office:date-value="2023-12-27T00:00:00" table:style-name="ce2">
            <text:p>27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4752.88" table:style-name="ce1">
            <text:p>4752.88</text:p>
          </table:table-cell>
          <table:table-cell office:value-type="string" office:string-value="Low" table:formula="of:=IF([.E111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ood</text:p>
          </table:table-cell>
          <table:table-cell office:value-type="float" office:value="1447.72" table:style-name="ce1">
            <text:p>1447.72</text:p>
          </table:table-cell>
          <table:table-cell office:value-type="float" office:value="1875.75" table:style-name="ce1">
            <text:p>1875.75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08-17T00:00:00" table:style-name="ce2">
            <text:p>17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8912.4" table:style-name="ce1">
            <text:p>8912.4</text:p>
          </table:table-cell>
          <table:table-cell office:value-type="string" office:string-value="High" table:formula="of:=IF([.E112]&gt;[.$E$1003];&quot;High&quot;;&quot;Low&quot;)" table:style-name="ce1">
            <text:p>High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lothing</text:p>
          </table:table-cell>
          <table:table-cell office:value-type="float" office:value="450.72" table:style-name="ce1">
            <text:p>450.72</text:p>
          </table:table-cell>
          <table:table-cell office:value-type="float" office:value="918.17" table:style-name="ce1">
            <text:p>918.17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date" office:date-value="2023-09-27T00:00:00" table:style-name="ce2">
            <text:p>27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7106.44" table:style-name="ce1">
            <text:p>7106.44</text:p>
          </table:table-cell>
          <table:table-cell office:value-type="string" office:string-value="High" table:formula="of:=IF([.E113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lothing</text:p>
          </table:table-cell>
          <table:table-cell office:value-type="float" office:value="4389.24" table:style-name="ce1">
            <text:p>4389.24</text:p>
          </table:table-cell>
          <table:table-cell office:value-type="float" office:value="4856.2199999999903" table:style-name="ce1">
            <text:p>4856.22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11-12T00:00:00" table:style-name="ce2">
            <text:p>12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715.81" table:style-name="ce1">
            <text:p>715.81</text:p>
          </table:table-cell>
          <table:table-cell office:value-type="string" office:string-value="Low" table:formula="of:=IF([.E114]&gt;[.$E$1003];&quot;High&quot;;&quot;Low&quot;)" table:style-name="ce1">
            <text:p>Lo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lectronics</text:p>
          </table:table-cell>
          <table:table-cell office:value-type="float" office:value="3657.91" table:style-name="ce1">
            <text:p>3657.91</text:p>
          </table:table-cell>
          <table:table-cell office:value-type="float" office:value="3729.27" table:style-name="ce1">
            <text:p>3729.27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10-13T00:00:00" table:style-name="ce2">
            <text:p>13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1558.3" table:style-name="ce1">
            <text:p>1558.3</text:p>
          </table:table-cell>
          <table:table-cell office:value-type="string" office:string-value="Low" table:formula="of:=IF([.E115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ectronics</text:p>
          </table:table-cell>
          <table:table-cell office:value-type="float" office:value="1542.24" table:style-name="ce1">
            <text:p>1542.24</text:p>
          </table:table-cell>
          <table:table-cell office:value-type="float" office:value="1739.45" table:style-name="ce1">
            <text:p>1739.45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date" office:date-value="2023-10-18T00:00:00" table:style-name="ce2">
            <text:p>18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177.63" table:style-name="ce1">
            <text:p>177.63</text:p>
          </table:table-cell>
          <table:table-cell office:value-type="string" office:string-value="Low" table:formula="of:=IF([.E116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3016.9" table:style-name="ce1">
            <text:p>3016.9</text:p>
          </table:table-cell>
          <table:table-cell office:value-type="float" office:value="3040.73" table:style-name="ce1">
            <text:p>3040.73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08-01T00:00:00" table:style-name="ce2">
            <text:p>01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6346.13" table:style-name="ce1">
            <text:p>6346.13</text:p>
          </table:table-cell>
          <table:table-cell office:value-type="string" office:string-value="High" table:formula="of:=IF([.E117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float" office:value="1046.26" table:style-name="ce1">
            <text:p>1046.26</text:p>
          </table:table-cell>
          <table:table-cell office:value-type="float" office:value="1475.29" table:style-name="ce1">
            <text:p>1475.29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date" office:date-value="2023-06-14T00:00:00" table:style-name="ce2">
            <text:p>14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4531.97" table:style-name="ce1">
            <text:p>4531.97</text:p>
          </table:table-cell>
          <table:table-cell office:value-type="string" office:string-value="Low" table:formula="of:=IF([.E118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urniture</text:p>
          </table:table-cell>
          <table:table-cell office:value-type="float" office:value="4456.67" table:style-name="ce1">
            <text:p>4456.67</text:p>
          </table:table-cell>
          <table:table-cell office:value-type="float" office:value="4642.46" table:style-name="ce1">
            <text:p>4642.46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date" office:date-value="2023-01-05T00:00:00" table:style-name="ce2">
            <text:p>05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1429.32" table:style-name="ce1">
            <text:p>1429.32</text:p>
          </table:table-cell>
          <table:table-cell office:value-type="string" office:string-value="Low" table:formula="of:=IF([.E119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ood</text:p>
          </table:table-cell>
          <table:table-cell office:value-type="float" office:value="618.79" table:style-name="ce1">
            <text:p>618.79</text:p>
          </table:table-cell>
          <table:table-cell office:value-type="float" office:value="938.04" table:style-name="ce1">
            <text:p>938.04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12-05T00:00:00" table:style-name="ce2">
            <text:p>05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9583.5499999999993" table:style-name="ce1">
            <text:p>9583.55</text:p>
          </table:table-cell>
          <table:table-cell office:value-type="string" office:string-value="High" table:formula="of:=IF([.E120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lectronics</text:p>
          </table:table-cell>
          <table:table-cell office:value-type="float" office:value="68.989999999999995" table:style-name="ce1">
            <text:p>68.99</text:p>
          </table:table-cell>
          <table:table-cell office:value-type="float" office:value="429.29" table:style-name="ce1">
            <text:p>429.29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03-19T00:00:00" table:style-name="ce2">
            <text:p>19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5343.63" table:style-name="ce1">
            <text:p>5343.63</text:p>
          </table:table-cell>
          <table:table-cell office:value-type="string" office:string-value="High" table:formula="of:=IF([.E121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lothing</text:p>
          </table:table-cell>
          <table:table-cell office:value-type="float" office:value="2534.94" table:style-name="ce1">
            <text:p>2534.94</text:p>
          </table:table-cell>
          <table:table-cell office:value-type="float" office:value="2755.56" table:style-name="ce1">
            <text:p>2755.56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03-03T00:00:00" table:style-name="ce2">
            <text:p>03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2494.7399999999998" table:style-name="ce1">
            <text:p>2494.74</text:p>
          </table:table-cell>
          <table:table-cell office:value-type="string" office:string-value="Low" table:formula="of:=IF([.E122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ectronics</text:p>
          </table:table-cell>
          <table:table-cell office:value-type="float" office:value="2936.48" table:style-name="ce1">
            <text:p>2936.48</text:p>
          </table:table-cell>
          <table:table-cell office:value-type="float" office:value="3096.64" table:style-name="ce1">
            <text:p>3096.64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5-12T00:00:00" table:style-name="ce2">
            <text:p>12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5055.9799999999996" table:style-name="ce1">
            <text:p>5055.98</text:p>
          </table:table-cell>
          <table:table-cell office:value-type="string" office:string-value="High" table:formula="of:=IF([.E123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2915.88" table:style-name="ce1">
            <text:p>2915.88</text:p>
          </table:table-cell>
          <table:table-cell office:value-type="float" office:value="3397.36" table:style-name="ce1">
            <text:p>3397.36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03-30T00:00:00" table:style-name="ce2">
            <text:p>30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6828.24" table:style-name="ce1">
            <text:p>6828.24</text:p>
          </table:table-cell>
          <table:table-cell office:value-type="string" office:string-value="High" table:formula="of:=IF([.E124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lectronics</text:p>
          </table:table-cell>
          <table:table-cell office:value-type="float" office:value="319.83" table:style-name="ce1">
            <text:p>319.83</text:p>
          </table:table-cell>
          <table:table-cell office:value-type="float" office:value="802.43" table:style-name="ce1">
            <text:p>802.43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date" office:date-value="2023-08-25T00:00:00" table:style-name="ce2">
            <text:p>25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854.77" table:style-name="ce1">
            <text:p>854.77</text:p>
          </table:table-cell>
          <table:table-cell office:value-type="string" office:string-value="Low" table:formula="of:=IF([.E125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ood</text:p>
          </table:table-cell>
          <table:table-cell office:value-type="float" office:value="1604.52" table:style-name="ce1">
            <text:p>1604.52</text:p>
          </table:table-cell>
          <table:table-cell office:value-type="float" office:value="1756.34" table:style-name="ce1">
            <text:p>1756.34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02-11T00:00:00" table:style-name="ce2">
            <text:p>11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2819.57" table:style-name="ce1">
            <text:p>2819.57</text:p>
          </table:table-cell>
          <table:table-cell office:value-type="string" office:string-value="Low" table:formula="of:=IF([.E126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lothing</text:p>
          </table:table-cell>
          <table:table-cell office:value-type="float" office:value="2521.0300000000002" table:style-name="ce1">
            <text:p>2521.03</text:p>
          </table:table-cell>
          <table:table-cell office:value-type="float" office:value="2766.05" table:style-name="ce1">
            <text:p>2766.05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date" office:date-value="2023-03-30T00:00:00" table:style-name="ce2">
            <text:p>30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8088.96" table:style-name="ce1">
            <text:p>8088.96</text:p>
          </table:table-cell>
          <table:table-cell office:value-type="string" office:string-value="High" table:formula="of:=IF([.E127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urniture</text:p>
          </table:table-cell>
          <table:table-cell office:value-type="float" office:value="1122.07" table:style-name="ce1">
            <text:p>1122.07</text:p>
          </table:table-cell>
          <table:table-cell office:value-type="float" office:value="1608.76" table:style-name="ce1">
            <text:p>1608.76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date" office:date-value="2023-10-23T00:00:00" table:style-name="ce2">
            <text:p>23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4650.68" table:style-name="ce1">
            <text:p>4650.68</text:p>
          </table:table-cell>
          <table:table-cell office:value-type="string" office:string-value="Low" table:formula="of:=IF([.E128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4369.5" table:style-name="ce1">
            <text:p>4369.5</text:p>
          </table:table-cell>
          <table:table-cell office:value-type="float" office:value="4381.8900000000003" table:style-name="ce1">
            <text:p>4381.89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date" office:date-value="2023-11-24T00:00:00" table:style-name="ce2">
            <text:p>24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5511.11" table:style-name="ce1">
            <text:p>5511.11</text:p>
          </table:table-cell>
          <table:table-cell office:value-type="string" office:string-value="High" table:formula="of:=IF([.E129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lothing</text:p>
          </table:table-cell>
          <table:table-cell office:value-type="float" office:value="481.19" table:style-name="ce1">
            <text:p>481.19</text:p>
          </table:table-cell>
          <table:table-cell office:value-type="float" office:value="693.4" table:style-name="ce1">
            <text:p>693.4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10-22T00:00:00" table:style-name="ce2">
            <text:p>22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4384.88" table:style-name="ce1">
            <text:p>4384.88</text:p>
          </table:table-cell>
          <table:table-cell office:value-type="string" office:string-value="Low" table:formula="of:=IF([.E130]&gt;[.$E$1003];&quot;High&quot;;&quot;Low&quot;)" table:style-name="ce1">
            <text:p>L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urniture</text:p>
          </table:table-cell>
          <table:table-cell office:value-type="float" office:value="2462.5500000000002" table:style-name="ce1">
            <text:p>2462.55</text:p>
          </table:table-cell>
          <table:table-cell office:value-type="float" office:value="2521.77" table:style-name="ce1">
            <text:p>2521.77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date" office:date-value="2023-04-14T00:00:00" table:style-name="ce2">
            <text:p>14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534.61" table:style-name="ce1">
            <text:p>534.61</text:p>
          </table:table-cell>
          <table:table-cell office:value-type="string" office:string-value="Low" table:formula="of:=IF([.E131]&gt;[.$E$1003];&quot;High&quot;;&quot;Low&quot;)" table:style-name="ce1">
            <text:p>Lo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othing</text:p>
          </table:table-cell>
          <table:table-cell office:value-type="float" office:value="3472.51" table:style-name="ce1">
            <text:p>3472.51</text:p>
          </table:table-cell>
          <table:table-cell office:value-type="float" office:value="3732" table:style-name="ce1">
            <text:p>3732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1-14T00:00:00" table:style-name="ce2">
            <text:p>14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740.92" table:style-name="ce1">
            <text:p>1740.92</text:p>
          </table:table-cell>
          <table:table-cell office:value-type="string" office:string-value="Low" table:formula="of:=IF([.E132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lothing</text:p>
          </table:table-cell>
          <table:table-cell office:value-type="float" office:value="1345.67" table:style-name="ce1">
            <text:p>1345.67</text:p>
          </table:table-cell>
          <table:table-cell office:value-type="float" office:value="1367.76" table:style-name="ce1">
            <text:p>1367.76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10-15T00:00:00" table:style-name="ce2">
            <text:p>15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4510.8599999999997" table:style-name="ce1">
            <text:p>4510.86</text:p>
          </table:table-cell>
          <table:table-cell office:value-type="string" office:string-value="Low" table:formula="of:=IF([.E133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lectronics</text:p>
          </table:table-cell>
          <table:table-cell office:value-type="float" office:value="3139.99" table:style-name="ce1">
            <text:p>3139.99</text:p>
          </table:table-cell>
          <table:table-cell office:value-type="float" office:value="3349.37" table:style-name="ce1">
            <text:p>3349.37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6-28T00:00:00" table:style-name="ce2">
            <text:p>28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170.94" table:style-name="ce1">
            <text:p>2170.94</text:p>
          </table:table-cell>
          <table:table-cell office:value-type="string" office:string-value="Low" table:formula="of:=IF([.E134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lothing</text:p>
          </table:table-cell>
          <table:table-cell office:value-type="float" office:value="4155.46" table:style-name="ce1">
            <text:p>4155.46</text:p>
          </table:table-cell>
          <table:table-cell office:value-type="float" office:value="4273.6000000000004" table:style-name="ce1">
            <text:p>4273.6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5-05T00:00:00" table:style-name="ce2">
            <text:p>05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594.79" table:style-name="ce1">
            <text:p>594.79</text:p>
          </table:table-cell>
          <table:table-cell office:value-type="string" office:string-value="Low" table:formula="of:=IF([.E135]&gt;[.$E$1003];&quot;High&quot;;&quot;Low&quot;)" table:style-name="ce1">
            <text:p>Low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lothing</text:p>
          </table:table-cell>
          <table:table-cell office:value-type="float" office:value="992.17" table:style-name="ce1">
            <text:p>992.17</text:p>
          </table:table-cell>
          <table:table-cell office:value-type="float" office:value="1263.49" table:style-name="ce1">
            <text:p>1263.49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date" office:date-value="2023-12-19T00:00:00" table:style-name="ce2">
            <text:p>19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8452.1299999999992" table:style-name="ce1">
            <text:p>8452.13</text:p>
          </table:table-cell>
          <table:table-cell office:value-type="string" office:string-value="High" table:formula="of:=IF([.E136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othing</text:p>
          </table:table-cell>
          <table:table-cell office:value-type="float" office:value="4590.24" table:style-name="ce1">
            <text:p>4590.24</text:p>
          </table:table-cell>
          <table:table-cell office:value-type="float" office:value="5088.28" table:style-name="ce1">
            <text:p>5088.28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9813.81" table:style-name="ce1">
            <text:p>9813.81</text:p>
          </table:table-cell>
          <table:table-cell office:value-type="string" office:string-value="High" table:formula="of:=IF([.E137]&gt;[.$E$1003];&quot;High&quot;;&quot;Low&quot;)" table:style-name="ce1">
            <text:p>High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lothing</text:p>
          </table:table-cell>
          <table:table-cell office:value-type="float" office:value="2790.11" table:style-name="ce1">
            <text:p>2790.11</text:p>
          </table:table-cell>
          <table:table-cell office:value-type="float" office:value="3192.37" table:style-name="ce1">
            <text:p>3192.37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3-04T00:00:00" table:style-name="ce2">
            <text:p>04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7952.11" table:style-name="ce1">
            <text:p>7952.11</text:p>
          </table:table-cell>
          <table:table-cell office:value-type="string" office:string-value="High" table:formula="of:=IF([.E138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rniture</text:p>
          </table:table-cell>
          <table:table-cell office:value-type="float" office:value="1531.2" table:style-name="ce1">
            <text:p>1531.2</text:p>
          </table:table-cell>
          <table:table-cell office:value-type="float" office:value="1955.56" table:style-name="ce1">
            <text:p>1955.56</text:p>
          </table:table-cell>
          <table:table-cell office:value-type="string" table:style-name="ce1">
            <text:p>New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05-23T00:00:00" table:style-name="ce2">
            <text:p>23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8552.4699999999993" table:style-name="ce1">
            <text:p>8552.47</text:p>
          </table:table-cell>
          <table:table-cell office:value-type="string" office:string-value="High" table:formula="of:=IF([.E139]&gt;[.$E$1003];&quot;High&quot;;&quot;Low&quot;)" table:style-name="ce1">
            <text:p>Hig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ood</text:p>
          </table:table-cell>
          <table:table-cell office:value-type="float" office:value="2182.75" table:style-name="ce1">
            <text:p>2182.75</text:p>
          </table:table-cell>
          <table:table-cell office:value-type="float" office:value="2504.0299999999902" table:style-name="ce1">
            <text:p>2504.03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6-02T00:00:00" table:style-name="ce2">
            <text:p>02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2495.5700000000002" table:style-name="ce1">
            <text:p>2495.57</text:p>
          </table:table-cell>
          <table:table-cell office:value-type="string" office:string-value="Low" table:formula="of:=IF([.E140]&gt;[.$E$1003];&quot;High&quot;;&quot;Low&quot;)" table:style-name="ce1">
            <text:p>Lo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ectronics</text:p>
          </table:table-cell>
          <table:table-cell office:value-type="float" office:value="1595.35" table:style-name="ce1">
            <text:p>1595.35</text:p>
          </table:table-cell>
          <table:table-cell office:value-type="float" office:value="1625.70999999999" table:style-name="ce1">
            <text:p>1625.71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date" office:date-value="2023-05-25T00:00:00" table:style-name="ce2">
            <text:p>25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9610.2099999999991" table:style-name="ce1">
            <text:p>9610.21</text:p>
          </table:table-cell>
          <table:table-cell office:value-type="string" office:string-value="High" table:formula="of:=IF([.E141]&gt;[.$E$1003];&quot;High&quot;;&quot;Low&quot;)" table:style-name="ce1">
            <text:p>High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lothing</text:p>
          </table:table-cell>
          <table:table-cell office:value-type="float" office:value="3639.3" table:style-name="ce1">
            <text:p>3639.3</text:p>
          </table:table-cell>
          <table:table-cell office:value-type="float" office:value="3750.63" table:style-name="ce1">
            <text:p>3750.63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08-13T00:00:00" table:style-name="ce2">
            <text:p>13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2049.56" table:style-name="ce1">
            <text:p>2049.56</text:p>
          </table:table-cell>
          <table:table-cell office:value-type="string" office:string-value="Low" table:formula="of:=IF([.E142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othing</text:p>
          </table:table-cell>
          <table:table-cell office:value-type="float" office:value="3991.69" table:style-name="ce1">
            <text:p>3991.69</text:p>
          </table:table-cell>
          <table:table-cell office:value-type="float" office:value="4454.97" table:style-name="ce1">
            <text:p>4454.97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date" office:date-value="2023-11-05T00:00:00" table:style-name="ce2">
            <text:p>05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9519.16" table:style-name="ce1">
            <text:p>9519.16</text:p>
          </table:table-cell>
          <table:table-cell office:value-type="string" office:string-value="High" table:formula="of:=IF([.E143]&gt;[.$E$1003];&quot;High&quot;;&quot;Low&quot;)" table:style-name="ce1">
            <text:p>Hig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urniture</text:p>
          </table:table-cell>
          <table:table-cell office:value-type="float" office:value="4173.04" table:style-name="ce1">
            <text:p>4173.04</text:p>
          </table:table-cell>
          <table:table-cell office:value-type="float" office:value="4362.4399999999996" table:style-name="ce1">
            <text:p>4362.44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4-14T00:00:00" table:style-name="ce2">
            <text:p>14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9948.7099999999991" table:style-name="ce1">
            <text:p>9948.71</text:p>
          </table:table-cell>
          <table:table-cell office:value-type="string" office:string-value="High" table:formula="of:=IF([.E144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ood</text:p>
          </table:table-cell>
          <table:table-cell office:value-type="float" office:value="4929.55" table:style-name="ce1">
            <text:p>4929.55</text:p>
          </table:table-cell>
          <table:table-cell office:value-type="float" office:value="4990.33" table:style-name="ce1">
            <text:p>4990.33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4-14T00:00:00" table:style-name="ce2">
            <text:p>14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7146.06" table:style-name="ce1">
            <text:p>7146.06</text:p>
          </table:table-cell>
          <table:table-cell office:value-type="string" office:string-value="High" table:formula="of:=IF([.E145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3966.86" table:style-name="ce1">
            <text:p>3966.86</text:p>
          </table:table-cell>
          <table:table-cell office:value-type="float" office:value="4321.04" table:style-name="ce1">
            <text:p>4321.04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date" office:date-value="2023-02-08T00:00:00" table:style-name="ce2">
            <text:p>08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9813.32" table:style-name="ce1">
            <text:p>9813.32</text:p>
          </table:table-cell>
          <table:table-cell office:value-type="string" office:string-value="High" table:formula="of:=IF([.E146]&gt;[.$E$1003];&quot;High&quot;;&quot;Low&quot;)" table:style-name="ce1">
            <text:p>High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urniture</text:p>
          </table:table-cell>
          <table:table-cell office:value-type="float" office:value="3026.85" table:style-name="ce1">
            <text:p>3026.85</text:p>
          </table:table-cell>
          <table:table-cell office:value-type="float" office:value="3183.58" table:style-name="ce1">
            <text:p>3183.58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07-17T00:00:00" table:style-name="ce2">
            <text:p>17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5738.44" table:style-name="ce1">
            <text:p>5738.44</text:p>
          </table:table-cell>
          <table:table-cell office:value-type="string" office:string-value="High" table:formula="of:=IF([.E147]&gt;[.$E$1003];&quot;High&quot;;&quot;Low&quot;)" table:style-name="ce1">
            <text:p>Hig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lectronics</text:p>
          </table:table-cell>
          <table:table-cell office:value-type="float" office:value="1729.14" table:style-name="ce1">
            <text:p>1729.14</text:p>
          </table:table-cell>
          <table:table-cell office:value-type="float" office:value="1870.88" table:style-name="ce1">
            <text:p>1870.88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5-14T00:00:00" table:style-name="ce2">
            <text:p>14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2669.46" table:style-name="ce1">
            <text:p>2669.46</text:p>
          </table:table-cell>
          <table:table-cell office:value-type="string" office:string-value="Low" table:formula="of:=IF([.E148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lectronics</text:p>
          </table:table-cell>
          <table:table-cell office:value-type="float" office:value="2745.75" table:style-name="ce1">
            <text:p>2745.75</text:p>
          </table:table-cell>
          <table:table-cell office:value-type="float" office:value="3244.76" table:style-name="ce1">
            <text:p>3244.76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03-08T00:00:00" table:style-name="ce2">
            <text:p>08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4426.26" table:style-name="ce1">
            <text:p>4426.26</text:p>
          </table:table-cell>
          <table:table-cell office:value-type="string" office:string-value="Low" table:formula="of:=IF([.E149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lothing</text:p>
          </table:table-cell>
          <table:table-cell office:value-type="float" office:value="253.29" table:style-name="ce1">
            <text:p>253.29</text:p>
          </table:table-cell>
          <table:table-cell office:value-type="float" office:value="683.78" table:style-name="ce1">
            <text:p>683.78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6-28T00:00:00" table:style-name="ce2">
            <text:p>28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5976.25" table:style-name="ce1">
            <text:p>5976.25</text:p>
          </table:table-cell>
          <table:table-cell office:value-type="string" office:string-value="High" table:formula="of:=IF([.E150]&gt;[.$E$1003];&quot;High&quot;;&quot;Low&quot;)" table:style-name="ce1">
            <text:p>High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lothing</text:p>
          </table:table-cell>
          <table:table-cell office:value-type="float" office:value="3736.88" table:style-name="ce1">
            <text:p>3736.88</text:p>
          </table:table-cell>
          <table:table-cell office:value-type="float" office:value="3946.77" table:style-name="ce1">
            <text:p>3946.77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02-11T00:00:00" table:style-name="ce2">
            <text:p>11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823.51" table:style-name="ce1">
            <text:p>823.51</text:p>
          </table:table-cell>
          <table:table-cell office:value-type="string" office:string-value="Low" table:formula="of:=IF([.E151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ood</text:p>
          </table:table-cell>
          <table:table-cell office:value-type="float" office:value="2257.48" table:style-name="ce1">
            <text:p>2257.48</text:p>
          </table:table-cell>
          <table:table-cell office:value-type="float" office:value="2747.81" table:style-name="ce1">
            <text:p>2747.81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1-15T00:00:00" table:style-name="ce2">
            <text:p>15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6261.2" table:style-name="ce1">
            <text:p>6261.2</text:p>
          </table:table-cell>
          <table:table-cell office:value-type="string" office:string-value="High" table:formula="of:=IF([.E152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ood</text:p>
          </table:table-cell>
          <table:table-cell office:value-type="float" office:value="149.11000000000001" table:style-name="ce1">
            <text:p>149.11</text:p>
          </table:table-cell>
          <table:table-cell office:value-type="float" office:value="477.67" table:style-name="ce1">
            <text:p>477.67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04-21T00:00:00" table:style-name="ce2">
            <text:p>21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813.66" table:style-name="ce1">
            <text:p>9813.66</text:p>
          </table:table-cell>
          <table:table-cell office:value-type="string" office:string-value="High" table:formula="of:=IF([.E153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lothing</text:p>
          </table:table-cell>
          <table:table-cell office:value-type="float" office:value="359.41" table:style-name="ce1">
            <text:p>359.41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date" office:date-value="2023-06-06T00:00:00" table:style-name="ce2">
            <text:p>06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1982.07" table:style-name="ce1">
            <text:p>1982.07</text:p>
          </table:table-cell>
          <table:table-cell office:value-type="string" office:string-value="Low" table:formula="of:=IF([.E154]&gt;[.$E$1003];&quot;High&quot;;&quot;Low&quot;)" table:style-name="ce1">
            <text:p>L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urniture</text:p>
          </table:table-cell>
          <table:table-cell office:value-type="float" office:value="1967.96" table:style-name="ce1">
            <text:p>1967.96</text:p>
          </table:table-cell>
          <table:table-cell office:value-type="float" office:value="1993.4" table:style-name="ce1">
            <text:p>1993.4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10-16T00:00:00" table:style-name="ce2">
            <text:p>16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7946.69" table:style-name="ce1">
            <text:p>7946.69</text:p>
          </table:table-cell>
          <table:table-cell office:value-type="string" office:string-value="High" table:formula="of:=IF([.E155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ood</text:p>
          </table:table-cell>
          <table:table-cell office:value-type="float" office:value="2937.94" table:style-name="ce1">
            <text:p>2937.94</text:p>
          </table:table-cell>
          <table:table-cell office:value-type="float" office:value="3007.53" table:style-name="ce1">
            <text:p>3007.53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8-19T00:00:00" table:style-name="ce2">
            <text:p>19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9088.2000000000007" table:style-name="ce1">
            <text:p>9088.2</text:p>
          </table:table-cell>
          <table:table-cell office:value-type="string" office:string-value="High" table:formula="of:=IF([.E156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lothing</text:p>
          </table:table-cell>
          <table:table-cell office:value-type="float" office:value="2347.81" table:style-name="ce1">
            <text:p>2347.81</text:p>
          </table:table-cell>
          <table:table-cell office:value-type="float" office:value="2668.02" table:style-name="ce1">
            <text:p>2668.02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date" office:date-value="2023-06-06T00:00:00" table:style-name="ce2">
            <text:p>06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9442.65" table:style-name="ce1">
            <text:p>9442.65</text:p>
          </table:table-cell>
          <table:table-cell office:value-type="string" office:string-value="High" table:formula="of:=IF([.E157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ood</text:p>
          </table:table-cell>
          <table:table-cell office:value-type="float" office:value="3115.06" table:style-name="ce1">
            <text:p>3115.06</text:p>
          </table:table-cell>
          <table:table-cell office:value-type="float" office:value="3565.58" table:style-name="ce1">
            <text:p>3565.58</text:p>
          </table:table-cell>
          <table:table-cell office:value-type="string" table:style-name="ce1">
            <text:p>Returnin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date" office:date-value="2023-02-07T00:00:00" table:style-name="ce2">
            <text:p>07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9605.34" table:style-name="ce1">
            <text:p>9605.34</text:p>
          </table:table-cell>
          <table:table-cell office:value-type="string" office:string-value="High" table:formula="of:=IF([.E158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lothing</text:p>
          </table:table-cell>
          <table:table-cell office:value-type="float" office:value="2427.46" table:style-name="ce1">
            <text:p>2427.46</text:p>
          </table:table-cell>
          <table:table-cell office:value-type="float" office:value="2743.09" table:style-name="ce1">
            <text:p>2743.09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04-07T00:00:00" table:style-name="ce2">
            <text:p>07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5262.45" table:style-name="ce1">
            <text:p>5262.45</text:p>
          </table:table-cell>
          <table:table-cell office:value-type="string" office:string-value="High" table:formula="of:=IF([.E159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3325.43" table:style-name="ce1">
            <text:p>3325.43</text:p>
          </table:table-cell>
          <table:table-cell office:value-type="float" office:value="3401.1" table:style-name="ce1">
            <text:p>3401.1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10-16T00:00:00" table:style-name="ce2">
            <text:p>16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9775.35" table:style-name="ce1">
            <text:p>9775.35</text:p>
          </table:table-cell>
          <table:table-cell office:value-type="string" office:string-value="High" table:formula="of:=IF([.E160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othing</text:p>
          </table:table-cell>
          <table:table-cell office:value-type="float" office:value="1134.67" table:style-name="ce1">
            <text:p>1134.67</text:p>
          </table:table-cell>
          <table:table-cell office:value-type="float" office:value="1201.3900000000001" table:style-name="ce1">
            <text:p>1201.39</text:p>
          </table:table-cell>
          <table:table-cell office:value-type="string" table:style-name="ce1">
            <text:p>New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9-11T00:00:00" table:style-name="ce2">
            <text:p>11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7597.37" table:style-name="ce1">
            <text:p>7597.37</text:p>
          </table:table-cell>
          <table:table-cell office:value-type="string" office:string-value="High" table:formula="of:=IF([.E161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608.57000000000005" table:style-name="ce1">
            <text:p>608.57</text:p>
          </table:table-cell>
          <table:table-cell office:value-type="float" office:value="1032.22" table:style-name="ce1">
            <text:p>1032.22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07-15T00:00:00" table:style-name="ce2">
            <text:p>15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1700.55" table:style-name="ce1">
            <text:p>1700.55</text:p>
          </table:table-cell>
          <table:table-cell office:value-type="string" office:string-value="Low" table:formula="of:=IF([.E162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ood</text:p>
          </table:table-cell>
          <table:table-cell office:value-type="float" office:value="3002.35" table:style-name="ce1">
            <text:p>3002.35</text:p>
          </table:table-cell>
          <table:table-cell office:value-type="float" office:value="3080.61" table:style-name="ce1">
            <text:p>3080.61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3-27T00:00:00" table:style-name="ce2">
            <text:p>27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4821.3100000000004" table:style-name="ce1">
            <text:p>4821.31</text:p>
          </table:table-cell>
          <table:table-cell office:value-type="string" office:string-value="Low" table:formula="of:=IF([.E163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lothing</text:p>
          </table:table-cell>
          <table:table-cell office:value-type="float" office:value="2449.21" table:style-name="ce1">
            <text:p>2449.21</text:p>
          </table:table-cell>
          <table:table-cell office:value-type="float" office:value="2714.12" table:style-name="ce1">
            <text:p>2714.12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11-18T00:00:00" table:style-name="ce2">
            <text:p>18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7211.48" table:style-name="ce1">
            <text:p>7211.48</text:p>
          </table:table-cell>
          <table:table-cell office:value-type="string" office:string-value="High" table:formula="of:=IF([.E164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od</text:p>
          </table:table-cell>
          <table:table-cell office:value-type="float" office:value="182.99" table:style-name="ce1">
            <text:p>182.99</text:p>
          </table:table-cell>
          <table:table-cell office:value-type="float" office:value="211.18" table:style-name="ce1">
            <text:p>211.18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date" office:date-value="2023-01-10T00:00:00" table:style-name="ce2">
            <text:p>10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548.67" table:style-name="ce1">
            <text:p>2548.67</text:p>
          </table:table-cell>
          <table:table-cell office:value-type="string" office:string-value="Low" table:formula="of:=IF([.E165]&gt;[.$E$1003];&quot;High&quot;;&quot;Low&quot;)" table:style-name="ce1">
            <text:p>Lo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nics</text:p>
          </table:table-cell>
          <table:table-cell office:value-type="float" office:value="1933.39" table:style-name="ce1">
            <text:p>1933.39</text:p>
          </table:table-cell>
          <table:table-cell office:value-type="float" office:value="1982.92" table:style-name="ce1">
            <text:p>1982.92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1-05T00:00:00" table:style-name="ce2">
            <text:p>05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6442.09" table:style-name="ce1">
            <text:p>6442.09</text:p>
          </table:table-cell>
          <table:table-cell office:value-type="string" office:string-value="High" table:formula="of:=IF([.E166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othing</text:p>
          </table:table-cell>
          <table:table-cell office:value-type="float" office:value="575.32000000000005" table:style-name="ce1">
            <text:p>575.32</text:p>
          </table:table-cell>
          <table:table-cell office:value-type="float" office:value="914.77" table:style-name="ce1">
            <text:p>914.77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05-03T00:00:00" table:style-name="ce2">
            <text:p>03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6699.34" table:style-name="ce1">
            <text:p>6699.34</text:p>
          </table:table-cell>
          <table:table-cell office:value-type="string" office:string-value="High" table:formula="of:=IF([.E167]&gt;[.$E$1003];&quot;High&quot;;&quot;Low&quot;)" table:style-name="ce1">
            <text:p>High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ood</text:p>
          </table:table-cell>
          <table:table-cell office:value-type="float" office:value="2680.22" table:style-name="ce1">
            <text:p>2680.22</text:p>
          </table:table-cell>
          <table:table-cell office:value-type="float" office:value="3027.9199999999901" table:style-name="ce1">
            <text:p>3027.92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date" office:date-value="2023-11-26T00:00:00" table:style-name="ce2">
            <text:p>26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1710.73" table:style-name="ce1">
            <text:p>1710.73</text:p>
          </table:table-cell>
          <table:table-cell office:value-type="string" office:string-value="Low" table:formula="of:=IF([.E168]&gt;[.$E$1003];&quot;High&quot;;&quot;Low&quot;)" table:style-name="ce1">
            <text:p>Lo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ectronics</text:p>
          </table:table-cell>
          <table:table-cell office:value-type="float" office:value="2009.1" table:style-name="ce1">
            <text:p>2009.1</text:p>
          </table:table-cell>
          <table:table-cell office:value-type="float" office:value="2186.42" table:style-name="ce1">
            <text:p>2186.42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date" office:date-value="2023-12-19T00:00:00" table:style-name="ce2">
            <text:p>19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5694.34" table:style-name="ce1">
            <text:p>5694.34</text:p>
          </table:table-cell>
          <table:table-cell office:value-type="string" office:string-value="High" table:formula="of:=IF([.E169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ood</text:p>
          </table:table-cell>
          <table:table-cell office:value-type="float" office:value="3085.1" table:style-name="ce1">
            <text:p>3085.1</text:p>
          </table:table-cell>
          <table:table-cell office:value-type="float" office:value="3200.75" table:style-name="ce1">
            <text:p>3200.75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04-28T00:00:00" table:style-name="ce2">
            <text:p>28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7739.11" table:style-name="ce1">
            <text:p>7739.11</text:p>
          </table:table-cell>
          <table:table-cell office:value-type="string" office:string-value="High" table:formula="of:=IF([.E170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rniture</text:p>
          </table:table-cell>
          <table:table-cell office:value-type="float" office:value="4037.73" table:style-name="ce1">
            <text:p>4037.73</text:p>
          </table:table-cell>
          <table:table-cell office:value-type="float" office:value="4446.45" table:style-name="ce1">
            <text:p>4446.45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10-21T00:00:00" table:style-name="ce2">
            <text:p>21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5039.07" table:style-name="ce1">
            <text:p>5039.07</text:p>
          </table:table-cell>
          <table:table-cell office:value-type="string" office:string-value="High" table:formula="of:=IF([.E171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lectronics</text:p>
          </table:table-cell>
          <table:table-cell office:value-type="float" office:value="1533.36" table:style-name="ce1">
            <text:p>1533.36</text:p>
          </table:table-cell>
          <table:table-cell office:value-type="float" office:value="1649.73999999999" table:style-name="ce1">
            <text:p>1649.74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06-08T00:00:00" table:style-name="ce2">
            <text:p>08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219.82" table:style-name="ce1">
            <text:p>219.82</text:p>
          </table:table-cell>
          <table:table-cell office:value-type="string" office:string-value="Low" table:formula="of:=IF([.E172]&gt;[.$E$1003];&quot;High&quot;;&quot;Low&quot;)" table:style-name="ce1">
            <text:p>Low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lectronics</text:p>
          </table:table-cell>
          <table:table-cell office:value-type="float" office:value="4812.41" table:style-name="ce1">
            <text:p>4812.41</text:p>
          </table:table-cell>
          <table:table-cell office:value-type="float" office:value="5088" table:style-name="ce1">
            <text:p>5088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89.48" table:style-name="ce1">
            <text:p>189.48</text:p>
          </table:table-cell>
          <table:table-cell office:value-type="string" office:string-value="Low" table:formula="of:=IF([.E173]&gt;[.$E$1003];&quot;High&quot;;&quot;Low&quot;)" table:style-name="ce1">
            <text:p>Low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ectronics</text:p>
          </table:table-cell>
          <table:table-cell office:value-type="float" office:value="2701.39" table:style-name="ce1">
            <text:p>2701.39</text:p>
          </table:table-cell>
          <table:table-cell office:value-type="float" office:value="3185.81" table:style-name="ce1">
            <text:p>3185.81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08-16T00:00:00" table:style-name="ce2">
            <text:p>16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3634.59" table:style-name="ce1">
            <text:p>3634.59</text:p>
          </table:table-cell>
          <table:table-cell office:value-type="string" office:string-value="Low" table:formula="of:=IF([.E174]&gt;[.$E$1003];&quot;High&quot;;&quot;Low&quot;)" table:style-name="ce1">
            <text:p>Low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lothing</text:p>
          </table:table-cell>
          <table:table-cell office:value-type="float" office:value="3110.54" table:style-name="ce1">
            <text:p>3110.54</text:p>
          </table:table-cell>
          <table:table-cell office:value-type="float" office:value="3192.99" table:style-name="ce1">
            <text:p>3192.99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12-31T00:00:00" table:style-name="ce2">
            <text:p>31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9269.32" table:style-name="ce1">
            <text:p>9269.32</text:p>
          </table:table-cell>
          <table:table-cell office:value-type="string" office:string-value="High" table:formula="of:=IF([.E175]&gt;[.$E$1003];&quot;High&quot;;&quot;Low&quot;)" table:style-name="ce1">
            <text:p>High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lothing</text:p>
          </table:table-cell>
          <table:table-cell office:value-type="float" office:value="3419.33" table:style-name="ce1">
            <text:p>3419.33</text:p>
          </table:table-cell>
          <table:table-cell office:value-type="float" office:value="3890.3599999999901" table:style-name="ce1">
            <text:p>3890.36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08-04T00:00:00" table:style-name="ce2">
            <text:p>04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2363.9" table:style-name="ce1">
            <text:p>2363.9</text:p>
          </table:table-cell>
          <table:table-cell office:value-type="string" office:string-value="Low" table:formula="of:=IF([.E176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lothing</text:p>
          </table:table-cell>
          <table:table-cell office:value-type="float" office:value="3350.32" table:style-name="ce1">
            <text:p>3350.32</text:p>
          </table:table-cell>
          <table:table-cell office:value-type="float" office:value="3449.94" table:style-name="ce1">
            <text:p>3449.94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date" office:date-value="2023-07-03T00:00:00" table:style-name="ce2">
            <text:p>03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6380.2" table:style-name="ce1">
            <text:p>6380.2</text:p>
          </table:table-cell>
          <table:table-cell office:value-type="string" office:string-value="High" table:formula="of:=IF([.E177]&gt;[.$E$1003];&quot;High&quot;;&quot;Low&quot;)" table:style-name="ce1">
            <text:p>Hig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urniture</text:p>
          </table:table-cell>
          <table:table-cell office:value-type="float" office:value="2579.31" table:style-name="ce1">
            <text:p>2579.31</text:p>
          </table:table-cell>
          <table:table-cell office:value-type="float" office:value="2867.36" table:style-name="ce1">
            <text:p>2867.36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date" office:date-value="2023-01-15T00:00:00" table:style-name="ce2">
            <text:p>15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2298.5500000000002" table:style-name="ce1">
            <text:p>2298.55</text:p>
          </table:table-cell>
          <table:table-cell office:value-type="string" office:string-value="Low" table:formula="of:=IF([.E178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rniture</text:p>
          </table:table-cell>
          <table:table-cell office:value-type="float" office:value="2172.38" table:style-name="ce1">
            <text:p>2172.38</text:p>
          </table:table-cell>
          <table:table-cell office:value-type="float" office:value="2367.11" table:style-name="ce1">
            <text:p>2367.11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date" office:date-value="2023-06-06T00:00:00" table:style-name="ce2">
            <text:p>06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3284.53" table:style-name="ce1">
            <text:p>3284.53</text:p>
          </table:table-cell>
          <table:table-cell office:value-type="string" office:string-value="Low" table:formula="of:=IF([.E179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lectronics</text:p>
          </table:table-cell>
          <table:table-cell office:value-type="float" office:value="316.22000000000003" table:style-name="ce1">
            <text:p>316.22</text:p>
          </table:table-cell>
          <table:table-cell office:value-type="float" office:value="799.04" table:style-name="ce1">
            <text:p>799.04</text:p>
          </table:table-cell>
          <table:table-cell office:value-type="string" table:style-name="ce1">
            <text:p>New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5-16T00:00:00" table:style-name="ce2">
            <text:p>16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8495.6200000000008" table:style-name="ce1">
            <text:p>8495.62</text:p>
          </table:table-cell>
          <table:table-cell office:value-type="string" office:string-value="High" table:formula="of:=IF([.E180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rniture</text:p>
          </table:table-cell>
          <table:table-cell office:value-type="float" office:value="159.32" table:style-name="ce1">
            <text:p>159.32</text:p>
          </table:table-cell>
          <table:table-cell office:value-type="float" office:value="303.36" table:style-name="ce1">
            <text:p>303.36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date" office:date-value="2023-09-18T00:00:00" table:style-name="ce2">
            <text:p>18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7315.73" table:style-name="ce1">
            <text:p>7315.73</text:p>
          </table:table-cell>
          <table:table-cell office:value-type="string" office:string-value="High" table:formula="of:=IF([.E181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ood</text:p>
          </table:table-cell>
          <table:table-cell office:value-type="float" office:value="1821.91" table:style-name="ce1">
            <text:p>1821.91</text:p>
          </table:table-cell>
          <table:table-cell office:value-type="float" office:value="2027.74" table:style-name="ce1">
            <text:p>2027.74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date" office:date-value="2023-06-06T00:00:00" table:style-name="ce2">
            <text:p>06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1044.45" table:style-name="ce1">
            <text:p>1044.45</text:p>
          </table:table-cell>
          <table:table-cell office:value-type="string" office:string-value="Low" table:formula="of:=IF([.E182]&gt;[.$E$1003];&quot;High&quot;;&quot;Low&quot;)" table:style-name="ce1">
            <text:p>Low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lectronics</text:p>
          </table:table-cell>
          <table:table-cell office:value-type="float" office:value="1701.62" table:style-name="ce1">
            <text:p>1701.62</text:p>
          </table:table-cell>
          <table:table-cell office:value-type="float" office:value="2193.2199999999998" table:style-name="ce1">
            <text:p>2193.22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4344.1499999999996" table:style-name="ce1">
            <text:p>4344.15</text:p>
          </table:table-cell>
          <table:table-cell office:value-type="string" office:string-value="Low" table:formula="of:=IF([.E183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ectronics</text:p>
          </table:table-cell>
          <table:table-cell office:value-type="float" office:value="1969.09" table:style-name="ce1">
            <text:p>1969.09</text:p>
          </table:table-cell>
          <table:table-cell office:value-type="float" office:value="2241.96" table:style-name="ce1">
            <text:p>2241.96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11-20T00:00:00" table:style-name="ce2">
            <text:p>20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388.78" table:style-name="ce1">
            <text:p>388.78</text:p>
          </table:table-cell>
          <table:table-cell office:value-type="string" office:string-value="Low" table:formula="of:=IF([.E184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od</text:p>
          </table:table-cell>
          <table:table-cell office:value-type="float" office:value="734.92" table:style-name="ce1">
            <text:p>734.92</text:p>
          </table:table-cell>
          <table:table-cell office:value-type="float" office:value="991.21" table:style-name="ce1">
            <text:p>991.21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11-28T00:00:00" table:style-name="ce2">
            <text:p>28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4860.8100000000004" table:style-name="ce1">
            <text:p>4860.81</text:p>
          </table:table-cell>
          <table:table-cell office:value-type="string" office:string-value="Low" table:formula="of:=IF([.E185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lectronics</text:p>
          </table:table-cell>
          <table:table-cell office:value-type="float" office:value="3703.93" table:style-name="ce1">
            <text:p>3703.93</text:p>
          </table:table-cell>
          <table:table-cell office:value-type="float" office:value="3840.24" table:style-name="ce1">
            <text:p>3840.24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date" office:date-value="2023-06-22T00:00:00" table:style-name="ce2">
            <text:p>22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6658.1" table:style-name="ce1">
            <text:p>6658.1</text:p>
          </table:table-cell>
          <table:table-cell office:value-type="string" office:string-value="High" table:formula="of:=IF([.E186]&gt;[.$E$1003];&quot;High&quot;;&quot;Low&quot;)" table:style-name="ce1">
            <text:p>High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urniture</text:p>
          </table:table-cell>
          <table:table-cell office:value-type="float" office:value="4291.97" table:style-name="ce1">
            <text:p>4291.97</text:p>
          </table:table-cell>
          <table:table-cell office:value-type="float" office:value="4645.6400000000003" table:style-name="ce1">
            <text:p>4645.64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1273.18" table:style-name="ce1">
            <text:p>1273.18</text:p>
          </table:table-cell>
          <table:table-cell office:value-type="string" office:string-value="Low" table:formula="of:=IF([.E187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lothing</text:p>
          </table:table-cell>
          <table:table-cell office:value-type="float" office:value="4696.6400000000003" table:style-name="ce1">
            <text:p>4696.64</text:p>
          </table:table-cell>
          <table:table-cell office:value-type="float" office:value="4713.68" table:style-name="ce1">
            <text:p>4713.68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4-05T00:00:00" table:style-name="ce2">
            <text:p>05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2959.96" table:style-name="ce1">
            <text:p>2959.96</text:p>
          </table:table-cell>
          <table:table-cell office:value-type="string" office:string-value="Low" table:formula="of:=IF([.E188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ood</text:p>
          </table:table-cell>
          <table:table-cell office:value-type="float" office:value="2487.19" table:style-name="ce1">
            <text:p>2487.19</text:p>
          </table:table-cell>
          <table:table-cell office:value-type="float" office:value="2521.4499999999998" table:style-name="ce1">
            <text:p>2521.45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4-25T00:00:00" table:style-name="ce2">
            <text:p>25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038.58" table:style-name="ce1">
            <text:p>4038.58</text:p>
          </table:table-cell>
          <table:table-cell office:value-type="string" office:string-value="Low" table:formula="of:=IF([.E189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urniture</text:p>
          </table:table-cell>
          <table:table-cell office:value-type="float" office:value="3519.29" table:style-name="ce1">
            <text:p>3519.29</text:p>
          </table:table-cell>
          <table:table-cell office:value-type="float" office:value="3822.98" table:style-name="ce1">
            <text:p>3822.98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8-31T00:00:00" table:style-name="ce2">
            <text:p>31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9203.36" table:style-name="ce1">
            <text:p>9203.36</text:p>
          </table:table-cell>
          <table:table-cell office:value-type="string" office:string-value="High" table:formula="of:=IF([.E190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ood</text:p>
          </table:table-cell>
          <table:table-cell office:value-type="float" office:value="4284.9799999999996" table:style-name="ce1">
            <text:p>4284.98</text:p>
          </table:table-cell>
          <table:table-cell office:value-type="float" office:value="4462.3999999999996" table:style-name="ce1">
            <text:p>4462.4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9933.2199999999993" table:style-name="ce1">
            <text:p>9933.22</text:p>
          </table:table-cell>
          <table:table-cell office:value-type="string" office:string-value="High" table:formula="of:=IF([.E191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ood</text:p>
          </table:table-cell>
          <table:table-cell office:value-type="float" office:value="2120.54" table:style-name="ce1">
            <text:p>2120.54</text:p>
          </table:table-cell>
          <table:table-cell office:value-type="float" office:value="2597.67" table:style-name="ce1">
            <text:p>2597.67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10-09T00:00:00" table:style-name="ce2">
            <text:p>09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544.62" table:style-name="ce1">
            <text:p>544.62</text:p>
          </table:table-cell>
          <table:table-cell office:value-type="string" office:string-value="Low" table:formula="of:=IF([.E192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float" office:value="1581.59" table:style-name="ce1">
            <text:p>1581.59</text:p>
          </table:table-cell>
          <table:table-cell office:value-type="float" office:value="2034.1499999999901" table:style-name="ce1">
            <text:p>2034.15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date" office:date-value="2023-10-26T00:00:00" table:style-name="ce2">
            <text:p>26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7633.98" table:style-name="ce1">
            <text:p>7633.98</text:p>
          </table:table-cell>
          <table:table-cell office:value-type="string" office:string-value="High" table:formula="of:=IF([.E193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lectronics</text:p>
          </table:table-cell>
          <table:table-cell office:value-type="float" office:value="4686.79" table:style-name="ce1">
            <text:p>4686.79</text:p>
          </table:table-cell>
          <table:table-cell office:value-type="float" office:value="5046.51" table:style-name="ce1">
            <text:p>5046.51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10-10T00:00:00" table:style-name="ce2">
            <text:p>10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3780.07" table:style-name="ce1">
            <text:p>3780.07</text:p>
          </table:table-cell>
          <table:table-cell office:value-type="string" office:string-value="Low" table:formula="of:=IF([.E194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urniture</text:p>
          </table:table-cell>
          <table:table-cell office:value-type="float" office:value="2602.6" table:style-name="ce1">
            <text:p>2602.6</text:p>
          </table:table-cell>
          <table:table-cell office:value-type="float" office:value="3013.49" table:style-name="ce1">
            <text:p>3013.49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3-10T00:00:00" table:style-name="ce2">
            <text:p>10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3985.34" table:style-name="ce1">
            <text:p>3985.34</text:p>
          </table:table-cell>
          <table:table-cell office:value-type="string" office:string-value="Low" table:formula="of:=IF([.E195]&gt;[.$E$1003];&quot;High&quot;;&quot;Low&quot;)" table:style-name="ce1">
            <text:p>Low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ood</text:p>
          </table:table-cell>
          <table:table-cell office:value-type="float" office:value="2511.41" table:style-name="ce1">
            <text:p>2511.41</text:p>
          </table:table-cell>
          <table:table-cell office:value-type="float" office:value="2848.3999999999901" table:style-name="ce1">
            <text:p>2848.4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5-28T00:00:00" table:style-name="ce2">
            <text:p>28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7567.22" table:style-name="ce1">
            <text:p>7567.22</text:p>
          </table:table-cell>
          <table:table-cell office:value-type="string" office:string-value="High" table:formula="of:=IF([.E196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lectronics</text:p>
          </table:table-cell>
          <table:table-cell office:value-type="float" office:value="933.16" table:style-name="ce1">
            <text:p>933.16</text:p>
          </table:table-cell>
          <table:table-cell office:value-type="float" office:value="1004.69999999999" table:style-name="ce1">
            <text:p>1004.7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date" office:date-value="2023-01-11T00:00:00" table:style-name="ce2">
            <text:p>11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192.42" table:style-name="ce1">
            <text:p>9192.42</text:p>
          </table:table-cell>
          <table:table-cell office:value-type="string" office:string-value="High" table:formula="of:=IF([.E197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lectronics</text:p>
          </table:table-cell>
          <table:table-cell office:value-type="float" office:value="585.37" table:style-name="ce1">
            <text:p>585.37</text:p>
          </table:table-cell>
          <table:table-cell office:value-type="float" office:value="970.49" table:style-name="ce1">
            <text:p>970.49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09-11T00:00:00" table:style-name="ce2">
            <text:p>11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9514.19" table:style-name="ce1">
            <text:p>9514.19</text:p>
          </table:table-cell>
          <table:table-cell office:value-type="string" office:string-value="High" table:formula="of:=IF([.E198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ood</text:p>
          </table:table-cell>
          <table:table-cell office:value-type="float" office:value="4218.43" table:style-name="ce1">
            <text:p>4218.43</text:p>
          </table:table-cell>
          <table:table-cell office:value-type="float" office:value="4331.42" table:style-name="ce1">
            <text:p>4331.42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date" office:date-value="2023-11-26T00:00:00" table:style-name="ce2">
            <text:p>26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5813.51" table:style-name="ce1">
            <text:p>5813.51</text:p>
          </table:table-cell>
          <table:table-cell office:value-type="string" office:string-value="High" table:formula="of:=IF([.E199]&gt;[.$E$1003];&quot;High&quot;;&quot;Low&quot;)" table:style-name="ce1">
            <text:p>High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urniture</text:p>
          </table:table-cell>
          <table:table-cell office:value-type="float" office:value="3089.96" table:style-name="ce1">
            <text:p>3089.96</text:p>
          </table:table-cell>
          <table:table-cell office:value-type="float" office:value="3258.45" table:style-name="ce1">
            <text:p>3258.45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3635.5" table:style-name="ce1">
            <text:p>3635.5</text:p>
          </table:table-cell>
          <table:table-cell office:value-type="string" office:string-value="Low" table:formula="of:=IF([.E200]&gt;[.$E$1003];&quot;High&quot;;&quot;Low&quot;)" table:style-name="ce1">
            <text:p>Low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urniture</text:p>
          </table:table-cell>
          <table:table-cell office:value-type="float" office:value="1662.83" table:style-name="ce1">
            <text:p>1662.83</text:p>
          </table:table-cell>
          <table:table-cell office:value-type="float" office:value="2074.25" table:style-name="ce1">
            <text:p>2074.25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2-07T00:00:00" table:style-name="ce2">
            <text:p>07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7896.74" table:style-name="ce1">
            <text:p>7896.74</text:p>
          </table:table-cell>
          <table:table-cell office:value-type="string" office:string-value="High" table:formula="of:=IF([.E201]&gt;[.$E$1003];&quot;High&quot;;&quot;Low&quot;)" table:style-name="ce1">
            <text:p>Hig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od</text:p>
          </table:table-cell>
          <table:table-cell office:value-type="float" office:value="999.09" table:style-name="ce1">
            <text:p>999.09</text:p>
          </table:table-cell>
          <table:table-cell office:value-type="float" office:value="1271.99" table:style-name="ce1">
            <text:p>1271.99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05-14T00:00:00" table:style-name="ce2">
            <text:p>14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2584.91" table:style-name="ce1">
            <text:p>2584.91</text:p>
          </table:table-cell>
          <table:table-cell office:value-type="string" office:string-value="Low" table:formula="of:=IF([.E202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urniture</text:p>
          </table:table-cell>
          <table:table-cell office:value-type="float" office:value="2799.71" table:style-name="ce1">
            <text:p>2799.71</text:p>
          </table:table-cell>
          <table:table-cell office:value-type="float" office:value="3231.08" table:style-name="ce1">
            <text:p>3231.08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7-19T00:00:00" table:style-name="ce2">
            <text:p>19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5684.33" table:style-name="ce1">
            <text:p>5684.33</text:p>
          </table:table-cell>
          <table:table-cell office:value-type="string" office:string-value="High" table:formula="of:=IF([.E203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lectronics</text:p>
          </table:table-cell>
          <table:table-cell office:value-type="float" office:value="2940.4" table:style-name="ce1">
            <text:p>2940.4</text:p>
          </table:table-cell>
          <table:table-cell office:value-type="float" office:value="3054.79" table:style-name="ce1">
            <text:p>3054.79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3649.93" table:style-name="ce1">
            <text:p>3649.93</text:p>
          </table:table-cell>
          <table:table-cell office:value-type="string" office:string-value="Low" table:formula="of:=IF([.E204]&gt;[.$E$1003];&quot;High&quot;;&quot;Low&quot;)" table:style-name="ce1">
            <text:p>Lo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ood</text:p>
          </table:table-cell>
          <table:table-cell office:value-type="float" office:value="1074.6199999999999" table:style-name="ce1">
            <text:p>1074.62</text:p>
          </table:table-cell>
          <table:table-cell office:value-type="float" office:value="1382.4299999999901" table:style-name="ce1">
            <text:p>1382.43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6600.65" table:style-name="ce1">
            <text:p>6600.65</text:p>
          </table:table-cell>
          <table:table-cell office:value-type="string" office:string-value="High" table:formula="of:=IF([.E205]&gt;[.$E$1003];&quot;High&quot;;&quot;Low&quot;)" table:style-name="ce1">
            <text:p>High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lectronics</text:p>
          </table:table-cell>
          <table:table-cell office:value-type="float" office:value="4264.46" table:style-name="ce1">
            <text:p>4264.46</text:p>
          </table:table-cell>
          <table:table-cell office:value-type="float" office:value="4315.5200000000004" table:style-name="ce1">
            <text:p>4315.52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12-12T00:00:00" table:style-name="ce2">
            <text:p>12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479.9499999999998" table:style-name="ce1">
            <text:p>2479.95</text:p>
          </table:table-cell>
          <table:table-cell office:value-type="string" office:string-value="Low" table:formula="of:=IF([.E206]&gt;[.$E$1003];&quot;High&quot;;&quot;Low&quot;)" table:style-name="ce1">
            <text:p>Lo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lothing</text:p>
          </table:table-cell>
          <table:table-cell office:value-type="float" office:value="467.11" table:style-name="ce1">
            <text:p>467.11</text:p>
          </table:table-cell>
          <table:table-cell office:value-type="float" office:value="792.21" table:style-name="ce1">
            <text:p>792.21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10-29T00:00:00" table:style-name="ce2">
            <text:p>29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1996.77" table:style-name="ce1">
            <text:p>1996.77</text:p>
          </table:table-cell>
          <table:table-cell office:value-type="string" office:string-value="Low" table:formula="of:=IF([.E207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othing</text:p>
          </table:table-cell>
          <table:table-cell office:value-type="float" office:value="1812.66" table:style-name="ce1">
            <text:p>1812.66</text:p>
          </table:table-cell>
          <table:table-cell office:value-type="float" office:value="2196.3000000000002" table:style-name="ce1">
            <text:p>2196.3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12-29T00:00:00" table:style-name="ce2">
            <text:p>29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190.57" table:style-name="ce1">
            <text:p>9190.57</text:p>
          </table:table-cell>
          <table:table-cell office:value-type="string" office:string-value="High" table:formula="of:=IF([.E208]&gt;[.$E$1003];&quot;High&quot;;&quot;Low&quot;)" table:style-name="ce1">
            <text:p>Hig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urniture</text:p>
          </table:table-cell>
          <table:table-cell office:value-type="float" office:value="3417.9" table:style-name="ce1">
            <text:p>3417.9</text:p>
          </table:table-cell>
          <table:table-cell office:value-type="float" office:value="3714.52" table:style-name="ce1">
            <text:p>3714.52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date" office:date-value="2023-08-06T00:00:00" table:style-name="ce2">
            <text:p>06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1107.8599999999999" table:style-name="ce1">
            <text:p>1107.86</text:p>
          </table:table-cell>
          <table:table-cell office:value-type="string" office:string-value="Low" table:formula="of:=IF([.E209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1406.9" table:style-name="ce1">
            <text:p>1406.9</text:p>
          </table:table-cell>
          <table:table-cell office:value-type="float" office:value="1547.35" table:style-name="ce1">
            <text:p>1547.35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05-21T00:00:00" table:style-name="ce2">
            <text:p>21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5108.9799999999996" table:style-name="ce1">
            <text:p>5108.98</text:p>
          </table:table-cell>
          <table:table-cell office:value-type="string" office:string-value="High" table:formula="of:=IF([.E210]&gt;[.$E$1003];&quot;High&quot;;&quot;Low&quot;)" table:style-name="ce1">
            <text:p>Hig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lectronics</text:p>
          </table:table-cell>
          <table:table-cell office:value-type="float" office:value="4146.99" table:style-name="ce1">
            <text:p>4146.99</text:p>
          </table:table-cell>
          <table:table-cell office:value-type="float" office:value="4172.3499999999904" table:style-name="ce1">
            <text:p>4172.35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04-14T00:00:00" table:style-name="ce2">
            <text:p>14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286.44" table:style-name="ce1">
            <text:p>2286.44</text:p>
          </table:table-cell>
          <table:table-cell office:value-type="string" office:string-value="Low" table:formula="of:=IF([.E211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3712.35" table:style-name="ce1">
            <text:p>3712.35</text:p>
          </table:table-cell>
          <table:table-cell office:value-type="float" office:value="3780.88" table:style-name="ce1">
            <text:p>3780.88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7-29T00:00:00" table:style-name="ce2">
            <text:p>29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485.41" table:style-name="ce1">
            <text:p>485.41</text:p>
          </table:table-cell>
          <table:table-cell office:value-type="string" office:string-value="Low" table:formula="of:=IF([.E212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lectronics</text:p>
          </table:table-cell>
          <table:table-cell office:value-type="float" office:value="3955.66" table:style-name="ce1">
            <text:p>3955.66</text:p>
          </table:table-cell>
          <table:table-cell office:value-type="float" office:value="4270.59" table:style-name="ce1">
            <text:p>4270.59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date" office:date-value="2023-04-21T00:00:00" table:style-name="ce2">
            <text:p>21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456.59" table:style-name="ce1">
            <text:p>456.59</text:p>
          </table:table-cell>
          <table:table-cell office:value-type="string" office:string-value="Low" table:formula="of:=IF([.E213]&gt;[.$E$1003];&quot;High&quot;;&quot;Low&quot;)" table:style-name="ce1">
            <text:p>Low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urniture</text:p>
          </table:table-cell>
          <table:table-cell office:value-type="float" office:value="639.58000000000004" table:style-name="ce1">
            <text:p>639.58</text:p>
          </table:table-cell>
          <table:table-cell office:value-type="float" office:value="1107.45" table:style-name="ce1">
            <text:p>1107.45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04-14T00:00:00" table:style-name="ce2">
            <text:p>14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1834.7" table:style-name="ce1">
            <text:p>1834.7</text:p>
          </table:table-cell>
          <table:table-cell office:value-type="string" office:string-value="Low" table:formula="of:=IF([.E214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urniture</text:p>
          </table:table-cell>
          <table:table-cell office:value-type="float" office:value="745.71" table:style-name="ce1">
            <text:p>745.71</text:p>
          </table:table-cell>
          <table:table-cell office:value-type="float" office:value="856.91" table:style-name="ce1">
            <text:p>856.91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11-12T00:00:00" table:style-name="ce2">
            <text:p>12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8681.0300000000007" table:style-name="ce1">
            <text:p>8681.03</text:p>
          </table:table-cell>
          <table:table-cell office:value-type="string" office:string-value="High" table:formula="of:=IF([.E215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1468.05" table:style-name="ce1">
            <text:p>1468.05</text:p>
          </table:table-cell>
          <table:table-cell office:value-type="float" office:value="1838.21" table:style-name="ce1">
            <text:p>1838.21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6-20T00:00:00" table:style-name="ce2">
            <text:p>20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2896.54" table:style-name="ce1">
            <text:p>2896.54</text:p>
          </table:table-cell>
          <table:table-cell office:value-type="string" office:string-value="Low" table:formula="of:=IF([.E216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lothing</text:p>
          </table:table-cell>
          <table:table-cell office:value-type="float" office:value="2614.48" table:style-name="ce1">
            <text:p>2614.48</text:p>
          </table:table-cell>
          <table:table-cell office:value-type="float" office:value="3049.04" table:style-name="ce1">
            <text:p>3049.04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9509.5499999999993" table:style-name="ce1">
            <text:p>9509.55</text:p>
          </table:table-cell>
          <table:table-cell office:value-type="string" office:string-value="High" table:formula="of:=IF([.E217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rniture</text:p>
          </table:table-cell>
          <table:table-cell office:value-type="float" office:value="3752.68" table:style-name="ce1">
            <text:p>3752.68</text:p>
          </table:table-cell>
          <table:table-cell office:value-type="float" office:value="4017.91" table:style-name="ce1">
            <text:p>4017.91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11-20T00:00:00" table:style-name="ce2">
            <text:p>20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5858.06" table:style-name="ce1">
            <text:p>5858.06</text:p>
          </table:table-cell>
          <table:table-cell office:value-type="string" office:string-value="High" table:formula="of:=IF([.E218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od</text:p>
          </table:table-cell>
          <table:table-cell office:value-type="float" office:value="4190.83" table:style-name="ce1">
            <text:p>4190.83</text:p>
          </table:table-cell>
          <table:table-cell office:value-type="float" office:value="4528.7699999999904" table:style-name="ce1">
            <text:p>4528.77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5-13T00:00:00" table:style-name="ce2">
            <text:p>13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4422.4799999999996" table:style-name="ce1">
            <text:p>4422.48</text:p>
          </table:table-cell>
          <table:table-cell office:value-type="string" office:string-value="Low" table:formula="of:=IF([.E219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urniture</text:p>
          </table:table-cell>
          <table:table-cell office:value-type="float" office:value="3536.46" table:style-name="ce1">
            <text:p>3536.46</text:p>
          </table:table-cell>
          <table:table-cell office:value-type="float" office:value="3945.82" table:style-name="ce1">
            <text:p>3945.82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5842.88" table:style-name="ce1">
            <text:p>5842.88</text:p>
          </table:table-cell>
          <table:table-cell office:value-type="string" office:string-value="High" table:formula="of:=IF([.E220]&gt;[.$E$1003];&quot;High&quot;;&quot;Low&quot;)" table:style-name="ce1">
            <text:p>High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lothing</text:p>
          </table:table-cell>
          <table:table-cell office:value-type="float" office:value="4646.55" table:style-name="ce1">
            <text:p>4646.55</text:p>
          </table:table-cell>
          <table:table-cell office:value-type="float" office:value="4784.28" table:style-name="ce1">
            <text:p>4784.28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11-24T00:00:00" table:style-name="ce2">
            <text:p>24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5215.3100000000004" table:style-name="ce1">
            <text:p>5215.31</text:p>
          </table:table-cell>
          <table:table-cell office:value-type="string" office:string-value="High" table:formula="of:=IF([.E221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ood</text:p>
          </table:table-cell>
          <table:table-cell office:value-type="float" office:value="3706.78" table:style-name="ce1">
            <text:p>3706.78</text:p>
          </table:table-cell>
          <table:table-cell office:value-type="float" office:value="3862.26" table:style-name="ce1">
            <text:p>3862.26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date" office:date-value="2023-05-07T00:00:00" table:style-name="ce2">
            <text:p>07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7611.88" table:style-name="ce1">
            <text:p>7611.88</text:p>
          </table:table-cell>
          <table:table-cell office:value-type="string" office:string-value="High" table:formula="of:=IF([.E222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1566.03" table:style-name="ce1">
            <text:p>1566.03</text:p>
          </table:table-cell>
          <table:table-cell office:value-type="float" office:value="1576.34" table:style-name="ce1">
            <text:p>1576.34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date" office:date-value="2023-04-16T00:00:00" table:style-name="ce2">
            <text:p>16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2896.71" table:style-name="ce1">
            <text:p>2896.71</text:p>
          </table:table-cell>
          <table:table-cell office:value-type="string" office:string-value="Low" table:formula="of:=IF([.E223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lectronics</text:p>
          </table:table-cell>
          <table:table-cell office:value-type="float" office:value="1362.15" table:style-name="ce1">
            <text:p>1362.15</text:p>
          </table:table-cell>
          <table:table-cell office:value-type="float" office:value="1844.07" table:style-name="ce1">
            <text:p>1844.07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04-02T00:00:00" table:style-name="ce2">
            <text:p>02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3595.2" table:style-name="ce1">
            <text:p>3595.2</text:p>
          </table:table-cell>
          <table:table-cell office:value-type="string" office:string-value="Low" table:formula="of:=IF([.E224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ood</text:p>
          </table:table-cell>
          <table:table-cell office:value-type="float" office:value="3496.15" table:style-name="ce1">
            <text:p>3496.15</text:p>
          </table:table-cell>
          <table:table-cell office:value-type="float" office:value="3955.75" table:style-name="ce1">
            <text:p>3955.75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10-14T00:00:00" table:style-name="ce2">
            <text:p>14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8951.5300000000007" table:style-name="ce1">
            <text:p>8951.53</text:p>
          </table:table-cell>
          <table:table-cell office:value-type="string" office:string-value="High" table:formula="of:=IF([.E225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lothing</text:p>
          </table:table-cell>
          <table:table-cell office:value-type="float" office:value="1004.71" table:style-name="ce1">
            <text:p>1004.71</text:p>
          </table:table-cell>
          <table:table-cell office:value-type="float" office:value="1389.35" table:style-name="ce1">
            <text:p>1389.35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2-20T00:00:00" table:style-name="ce2">
            <text:p>20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9469.92" table:style-name="ce1">
            <text:p>9469.92</text:p>
          </table:table-cell>
          <table:table-cell office:value-type="string" office:string-value="High" table:formula="of:=IF([.E226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ood</text:p>
          </table:table-cell>
          <table:table-cell office:value-type="float" office:value="508.94" table:style-name="ce1">
            <text:p>508.94</text:p>
          </table:table-cell>
          <table:table-cell office:value-type="float" office:value="557.69000000000005" table:style-name="ce1">
            <text:p>557.69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1-29T00:00:00" table:style-name="ce2">
            <text:p>29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8936.33" table:style-name="ce1">
            <text:p>8936.33</text:p>
          </table:table-cell>
          <table:table-cell office:value-type="string" office:string-value="High" table:formula="of:=IF([.E227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othing</text:p>
          </table:table-cell>
          <table:table-cell office:value-type="float" office:value="2684.5" table:style-name="ce1">
            <text:p>2684.5</text:p>
          </table:table-cell>
          <table:table-cell office:value-type="float" office:value="2913.78" table:style-name="ce1">
            <text:p>2913.78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10-23T00:00:00" table:style-name="ce2">
            <text:p>23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4252.54" table:style-name="ce1">
            <text:p>4252.54</text:p>
          </table:table-cell>
          <table:table-cell office:value-type="string" office:string-value="Low" table:formula="of:=IF([.E228]&gt;[.$E$1003];&quot;High&quot;;&quot;Low&quot;)" table:style-name="ce1">
            <text:p>Lo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ood</text:p>
          </table:table-cell>
          <table:table-cell office:value-type="float" office:value="4117.13" table:style-name="ce1">
            <text:p>4117.13</text:p>
          </table:table-cell>
          <table:table-cell office:value-type="float" office:value="4177.0600000000004" table:style-name="ce1">
            <text:p>4177.06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10-24T00:00:00" table:style-name="ce2">
            <text:p>24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7825.62" table:style-name="ce1">
            <text:p>7825.62</text:p>
          </table:table-cell>
          <table:table-cell office:value-type="string" office:string-value="High" table:formula="of:=IF([.E229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551.83000000000004" table:style-name="ce1">
            <text:p>551.83</text:p>
          </table:table-cell>
          <table:table-cell office:value-type="float" office:value="569.63" table:style-name="ce1">
            <text:p>569.63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8-02T00:00:00" table:style-name="ce2">
            <text:p>02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4815.72" table:style-name="ce1">
            <text:p>4815.72</text:p>
          </table:table-cell>
          <table:table-cell office:value-type="string" office:string-value="Low" table:formula="of:=IF([.E230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lectronics</text:p>
          </table:table-cell>
          <table:table-cell office:value-type="float" office:value="3969.86" table:style-name="ce1">
            <text:p>3969.86</text:p>
          </table:table-cell>
          <table:table-cell office:value-type="float" office:value="4281.79" table:style-name="ce1">
            <text:p>4281.79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5025.6400000000003" table:style-name="ce1">
            <text:p>5025.64</text:p>
          </table:table-cell>
          <table:table-cell office:value-type="string" office:string-value="High" table:formula="of:=IF([.E231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ood</text:p>
          </table:table-cell>
          <table:table-cell office:value-type="float" office:value="4067.28" table:style-name="ce1">
            <text:p>4067.28</text:p>
          </table:table-cell>
          <table:table-cell office:value-type="float" office:value="4548.09" table:style-name="ce1">
            <text:p>4548.09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9-14T00:00:00" table:style-name="ce2">
            <text:p>14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2126.33" table:style-name="ce1">
            <text:p>2126.33</text:p>
          </table:table-cell>
          <table:table-cell office:value-type="string" office:string-value="Low" table:formula="of:=IF([.E232]&gt;[.$E$1003];&quot;High&quot;;&quot;Low&quot;)" table:style-name="ce1">
            <text:p>Low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ood</text:p>
          </table:table-cell>
          <table:table-cell office:value-type="float" office:value="2437.2600000000002" table:style-name="ce1">
            <text:p>2437.26</text:p>
          </table:table-cell>
          <table:table-cell office:value-type="float" office:value="2889.67" table:style-name="ce1">
            <text:p>2889.67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10-29T00:00:00" table:style-name="ce2">
            <text:p>29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5952.19" table:style-name="ce1">
            <text:p>5952.19</text:p>
          </table:table-cell>
          <table:table-cell office:value-type="string" office:string-value="High" table:formula="of:=IF([.E233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ood</text:p>
          </table:table-cell>
          <table:table-cell office:value-type="float" office:value="333.69" table:style-name="ce1">
            <text:p>333.69</text:p>
          </table:table-cell>
          <table:table-cell office:value-type="float" office:value="685.1" table:style-name="ce1">
            <text:p>685.1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4-11T00:00:00" table:style-name="ce2">
            <text:p>11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1942.75" table:style-name="ce1">
            <text:p>1942.75</text:p>
          </table:table-cell>
          <table:table-cell office:value-type="string" office:string-value="Low" table:formula="of:=IF([.E234]&gt;[.$E$1003];&quot;High&quot;;&quot;Low&quot;)" table:style-name="ce1">
            <text:p>Low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ood</text:p>
          </table:table-cell>
          <table:table-cell office:value-type="float" office:value="914.22" table:style-name="ce1">
            <text:p>914.22</text:p>
          </table:table-cell>
          <table:table-cell office:value-type="float" office:value="971.57" table:style-name="ce1">
            <text:p>971.57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12-12T00:00:00" table:style-name="ce2">
            <text:p>12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382.49" table:style-name="ce1">
            <text:p>3382.49</text:p>
          </table:table-cell>
          <table:table-cell office:value-type="string" office:string-value="Low" table:formula="of:=IF([.E235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ectronics</text:p>
          </table:table-cell>
          <table:table-cell office:value-type="float" office:value="3551.76" table:style-name="ce1">
            <text:p>3551.76</text:p>
          </table:table-cell>
          <table:table-cell office:value-type="float" office:value="3696.1" table:style-name="ce1">
            <text:p>3696.1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04-20T00:00:00" table:style-name="ce2">
            <text:p>20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8564.7999999999993" table:style-name="ce1">
            <text:p>8564.8</text:p>
          </table:table-cell>
          <table:table-cell office:value-type="string" office:string-value="High" table:formula="of:=IF([.E236]&gt;[.$E$1003];&quot;High&quot;;&quot;Low&quot;)" table:style-name="ce1">
            <text:p>High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ood</text:p>
          </table:table-cell>
          <table:table-cell office:value-type="float" office:value="3573.3" table:style-name="ce1">
            <text:p>3573.3</text:p>
          </table:table-cell>
          <table:table-cell office:value-type="float" office:value="3740.13" table:style-name="ce1">
            <text:p>3740.13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7-01T00:00:00" table:style-name="ce2">
            <text:p>01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150.0500000000002" table:style-name="ce1">
            <text:p>2150.05</text:p>
          </table:table-cell>
          <table:table-cell office:value-type="string" office:string-value="Low" table:formula="of:=IF([.E237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urniture</text:p>
          </table:table-cell>
          <table:table-cell office:value-type="float" office:value="4496.8599999999997" table:style-name="ce1">
            <text:p>4496.86</text:p>
          </table:table-cell>
          <table:table-cell office:value-type="float" office:value="4880.7999999999902" table:style-name="ce1">
            <text:p>4880.8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11-09T00:00:00" table:style-name="ce2">
            <text:p>09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804.47" table:style-name="ce1">
            <text:p>804.47</text:p>
          </table:table-cell>
          <table:table-cell office:value-type="string" office:string-value="Low" table:formula="of:=IF([.E238]&gt;[.$E$1003];&quot;High&quot;;&quot;Low&quot;)" table:style-name="ce1">
            <text:p>Lo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nics</text:p>
          </table:table-cell>
          <table:table-cell office:value-type="float" office:value="2934.3" table:style-name="ce1">
            <text:p>2934.3</text:p>
          </table:table-cell>
          <table:table-cell office:value-type="float" office:value="3337.4" table:style-name="ce1">
            <text:p>3337.4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date" office:date-value="2023-01-01T00:00:00" table:style-name="ce2">
            <text:p>01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783.18" table:style-name="ce1">
            <text:p>783.18</text:p>
          </table:table-cell>
          <table:table-cell office:value-type="string" office:string-value="Low" table:formula="of:=IF([.E239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urniture</text:p>
          </table:table-cell>
          <table:table-cell office:value-type="float" office:value="664.33" table:style-name="ce1">
            <text:p>664.33</text:p>
          </table:table-cell>
          <table:table-cell office:value-type="float" office:value="863.03" table:style-name="ce1">
            <text:p>863.03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11-15T00:00:00" table:style-name="ce2">
            <text:p>15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9413.77" table:style-name="ce1">
            <text:p>9413.77</text:p>
          </table:table-cell>
          <table:table-cell office:value-type="string" office:string-value="High" table:formula="of:=IF([.E240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od</text:p>
          </table:table-cell>
          <table:table-cell office:value-type="float" office:value="651" table:style-name="ce1">
            <text:p>651</text:p>
          </table:table-cell>
          <table:table-cell office:value-type="float" office:value="865.76" table:style-name="ce1">
            <text:p>865.76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date" office:date-value="2023-02-24T00:00:00" table:style-name="ce2">
            <text:p>24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5118.51" table:style-name="ce1">
            <text:p>5118.51</text:p>
          </table:table-cell>
          <table:table-cell office:value-type="string" office:string-value="High" table:formula="of:=IF([.E241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lothing</text:p>
          </table:table-cell>
          <table:table-cell office:value-type="float" office:value="3619.61" table:style-name="ce1">
            <text:p>3619.61</text:p>
          </table:table-cell>
          <table:table-cell office:value-type="float" office:value="3651.42" table:style-name="ce1">
            <text:p>3651.42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date" office:date-value="2023-05-29T00:00:00" table:style-name="ce2">
            <text:p>29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4153.18" table:style-name="ce1">
            <text:p>4153.18</text:p>
          </table:table-cell>
          <table:table-cell office:value-type="string" office:string-value="Low" table:formula="of:=IF([.E242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urniture</text:p>
          </table:table-cell>
          <table:table-cell office:value-type="float" office:value="959.73" table:style-name="ce1">
            <text:p>959.73</text:p>
          </table:table-cell>
          <table:table-cell office:value-type="float" office:value="1111.4100000000001" table:style-name="ce1">
            <text:p>1111.41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11-05T00:00:00" table:style-name="ce2">
            <text:p>05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8127.7" table:style-name="ce1">
            <text:p>8127.7</text:p>
          </table:table-cell>
          <table:table-cell office:value-type="string" office:string-value="High" table:formula="of:=IF([.E243]&gt;[.$E$1003];&quot;High&quot;;&quot;Low&quot;)" table:style-name="ce1">
            <text:p>Hig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ood</text:p>
          </table:table-cell>
          <table:table-cell office:value-type="float" office:value="1675.51" table:style-name="ce1">
            <text:p>1675.51</text:p>
          </table:table-cell>
          <table:table-cell office:value-type="float" office:value="1906.6399999999901" table:style-name="ce1">
            <text:p>1906.64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date" office:date-value="2023-05-17T00:00:00" table:style-name="ce2">
            <text:p>17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8374.68" table:style-name="ce1">
            <text:p>8374.68</text:p>
          </table:table-cell>
          <table:table-cell office:value-type="string" office:string-value="High" table:formula="of:=IF([.E244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2461.6999999999998" table:style-name="ce1">
            <text:p>2461.7</text:p>
          </table:table-cell>
          <table:table-cell office:value-type="float" office:value="2529.02" table:style-name="ce1">
            <text:p>2529.02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7-21T00:00:00" table:style-name="ce2">
            <text:p>21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3388.69" table:style-name="ce1">
            <text:p>3388.69</text:p>
          </table:table-cell>
          <table:table-cell office:value-type="string" office:string-value="Low" table:formula="of:=IF([.E245]&gt;[.$E$1003];&quot;High&quot;;&quot;Low&quot;)" table:style-name="ce1">
            <text:p>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od</text:p>
          </table:table-cell>
          <table:table-cell office:value-type="float" office:value="172.59" table:style-name="ce1">
            <text:p>172.59</text:p>
          </table:table-cell>
          <table:table-cell office:value-type="float" office:value="404.69" table:style-name="ce1">
            <text:p>404.69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11-09T00:00:00" table:style-name="ce2">
            <text:p>09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966.82" table:style-name="ce1">
            <text:p>6966.82</text:p>
          </table:table-cell>
          <table:table-cell office:value-type="string" office:string-value="High" table:formula="of:=IF([.E246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od</text:p>
          </table:table-cell>
          <table:table-cell office:value-type="float" office:value="1281.6500000000001" table:style-name="ce1">
            <text:p>1281.65</text:p>
          </table:table-cell>
          <table:table-cell office:value-type="float" office:value="1709.71" table:style-name="ce1">
            <text:p>1709.71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4-27T00:00:00" table:style-name="ce2">
            <text:p>27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7734.12" table:style-name="ce1">
            <text:p>7734.12</text:p>
          </table:table-cell>
          <table:table-cell office:value-type="string" office:string-value="High" table:formula="of:=IF([.E247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ood</text:p>
          </table:table-cell>
          <table:table-cell office:value-type="float" office:value="2069.0500000000002" table:style-name="ce1">
            <text:p>2069.05</text:p>
          </table:table-cell>
          <table:table-cell office:value-type="float" office:value="2363.9" table:style-name="ce1">
            <text:p>2363.9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06-03T00:00:00" table:style-name="ce2">
            <text:p>03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6581.04" table:style-name="ce1">
            <text:p>6581.04</text:p>
          </table:table-cell>
          <table:table-cell office:value-type="string" office:string-value="High" table:formula="of:=IF([.E248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lothing</text:p>
          </table:table-cell>
          <table:table-cell office:value-type="float" office:value="1434.2" table:style-name="ce1">
            <text:p>1434.2</text:p>
          </table:table-cell>
          <table:table-cell office:value-type="float" office:value="1482.88" table:style-name="ce1">
            <text:p>1482.88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date" office:date-value="2023-10-18T00:00:00" table:style-name="ce2">
            <text:p>18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1600.79" table:style-name="ce1">
            <text:p>1600.79</text:p>
          </table:table-cell>
          <table:table-cell office:value-type="string" office:string-value="Low" table:formula="of:=IF([.E249]&gt;[.$E$1003];&quot;High&quot;;&quot;Low&quot;)" table:style-name="ce1">
            <text:p>Low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urniture</text:p>
          </table:table-cell>
          <table:table-cell office:value-type="float" office:value="725.03" table:style-name="ce1">
            <text:p>725.03</text:p>
          </table:table-cell>
          <table:table-cell office:value-type="float" office:value="828.94999999999902" table:style-name="ce1">
            <text:p>828.95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date" office:date-value="2023-03-04T00:00:00" table:style-name="ce2">
            <text:p>04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8771.24" table:style-name="ce1">
            <text:p>8771.24</text:p>
          </table:table-cell>
          <table:table-cell office:value-type="string" office:string-value="High" table:formula="of:=IF([.E250]&gt;[.$E$1003];&quot;High&quot;;&quot;Low&quot;)" table:style-name="ce1">
            <text:p>Hig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lectronics</text:p>
          </table:table-cell>
          <table:table-cell office:value-type="float" office:value="3653.66" table:style-name="ce1">
            <text:p>3653.66</text:p>
          </table:table-cell>
          <table:table-cell office:value-type="float" office:value="3896.19" table:style-name="ce1">
            <text:p>3896.19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9-01T00:00:00" table:style-name="ce2">
            <text:p>01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5437.04" table:style-name="ce1">
            <text:p>5437.04</text:p>
          </table:table-cell>
          <table:table-cell office:value-type="string" office:string-value="High" table:formula="of:=IF([.E251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ctronics</text:p>
          </table:table-cell>
          <table:table-cell office:value-type="float" office:value="4075.08" table:style-name="ce1">
            <text:p>4075.08</text:p>
          </table:table-cell>
          <table:table-cell office:value-type="float" office:value="4262.21" table:style-name="ce1">
            <text:p>4262.21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date" office:date-value="2023-01-25T00:00:00" table:style-name="ce2">
            <text:p>25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896.48" table:style-name="ce1">
            <text:p>2896.48</text:p>
          </table:table-cell>
          <table:table-cell office:value-type="string" office:string-value="Low" table:formula="of:=IF([.E252]&gt;[.$E$1003];&quot;High&quot;;&quot;Low&quot;)" table:style-name="ce1">
            <text:p>Low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ectronics</text:p>
          </table:table-cell>
          <table:table-cell office:value-type="float" office:value="1324.52" table:style-name="ce1">
            <text:p>1324.52</text:p>
          </table:table-cell>
          <table:table-cell office:value-type="float" office:value="1510.3" table:style-name="ce1">
            <text:p>1510.3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3-31T00:00:00" table:style-name="ce2">
            <text:p>31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4309.76" table:style-name="ce1">
            <text:p>4309.76</text:p>
          </table:table-cell>
          <table:table-cell office:value-type="string" office:string-value="Low" table:formula="of:=IF([.E253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lectronics</text:p>
          </table:table-cell>
          <table:table-cell office:value-type="float" office:value="3883.38" table:style-name="ce1">
            <text:p>3883.38</text:p>
          </table:table-cell>
          <table:table-cell office:value-type="float" office:value="4152.72" table:style-name="ce1">
            <text:p>4152.72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date" office:date-value="2023-03-16T00:00:00" table:style-name="ce2">
            <text:p>16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71.95" table:style-name="ce1">
            <text:p>471.95</text:p>
          </table:table-cell>
          <table:table-cell office:value-type="string" office:string-value="Low" table:formula="of:=IF([.E254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ood</text:p>
          </table:table-cell>
          <table:table-cell office:value-type="float" office:value="1958.49" table:style-name="ce1">
            <text:p>1958.49</text:p>
          </table:table-cell>
          <table:table-cell office:value-type="float" office:value="2254.84" table:style-name="ce1">
            <text:p>2254.84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date" office:date-value="2023-10-21T00:00:00" table:style-name="ce2">
            <text:p>21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365.88" table:style-name="ce1">
            <text:p>1365.88</text:p>
          </table:table-cell>
          <table:table-cell office:value-type="string" office:string-value="Low" table:formula="of:=IF([.E255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urniture</text:p>
          </table:table-cell>
          <table:table-cell office:value-type="float" office:value="2558.09" table:style-name="ce1">
            <text:p>2558.09</text:p>
          </table:table-cell>
          <table:table-cell office:value-type="float" office:value="2958.55" table:style-name="ce1">
            <text:p>2958.55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07-29T00:00:00" table:style-name="ce2">
            <text:p>29/07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7678.91" table:style-name="ce1">
            <text:p>7678.91</text:p>
          </table:table-cell>
          <table:table-cell office:value-type="string" office:string-value="High" table:formula="of:=IF([.E256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4287.21" table:style-name="ce1">
            <text:p>4287.21</text:p>
          </table:table-cell>
          <table:table-cell office:value-type="float" office:value="4464.28" table:style-name="ce1">
            <text:p>4464.28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00.12" table:style-name="ce1">
            <text:p>100.12</text:p>
          </table:table-cell>
          <table:table-cell office:value-type="string" office:string-value="Low" table:formula="of:=IF([.E257]&gt;[.$E$1003];&quot;High&quot;;&quot;Low&quot;)" table:style-name="ce1">
            <text:p>Lo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lothing</text:p>
          </table:table-cell>
          <table:table-cell office:value-type="float" office:value="3762.27" table:style-name="ce1">
            <text:p>3762.27</text:p>
          </table:table-cell>
          <table:table-cell office:value-type="float" office:value="4166.95" table:style-name="ce1">
            <text:p>4166.95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date" office:date-value="2023-01-17T00:00:00" table:style-name="ce2">
            <text:p>17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4224" table:style-name="ce1">
            <text:p>4224</text:p>
          </table:table-cell>
          <table:table-cell office:value-type="string" office:string-value="Low" table:formula="of:=IF([.E258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4035.33" table:style-name="ce1">
            <text:p>4035.33</text:p>
          </table:table-cell>
          <table:table-cell office:value-type="float" office:value="4211.25" table:style-name="ce1">
            <text:p>4211.25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05-08T00:00:00" table:style-name="ce2">
            <text:p>08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5272.85" table:style-name="ce1">
            <text:p>5272.85</text:p>
          </table:table-cell>
          <table:table-cell office:value-type="string" office:string-value="High" table:formula="of:=IF([.E259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727.38" table:style-name="ce1">
            <text:p>727.38</text:p>
          </table:table-cell>
          <table:table-cell office:value-type="float" office:value="764.54" table:style-name="ce1">
            <text:p>764.54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12-30T00:00:00" table:style-name="ce2">
            <text:p>30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640.88" table:style-name="ce1">
            <text:p>640.88</text:p>
          </table:table-cell>
          <table:table-cell office:value-type="string" office:string-value="Low" table:formula="of:=IF([.E260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395.11" table:style-name="ce1">
            <text:p>395.11</text:p>
          </table:table-cell>
          <table:table-cell office:value-type="float" office:value="676.66" table:style-name="ce1">
            <text:p>676.66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date" office:date-value="2023-09-08T00:00:00" table:style-name="ce2">
            <text:p>08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733.4699999999993" table:style-name="ce1">
            <text:p>9733.47</text:p>
          </table:table-cell>
          <table:table-cell office:value-type="string" office:string-value="High" table:formula="of:=IF([.E261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lothing</text:p>
          </table:table-cell>
          <table:table-cell office:value-type="float" office:value="4472.3500000000004" table:style-name="ce1">
            <text:p>4472.35</text:p>
          </table:table-cell>
          <table:table-cell office:value-type="float" office:value="4770.42" table:style-name="ce1">
            <text:p>4770.42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06-28T00:00:00" table:style-name="ce2">
            <text:p>28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2338.64" table:style-name="ce1">
            <text:p>2338.64</text:p>
          </table:table-cell>
          <table:table-cell office:value-type="string" office:string-value="Low" table:formula="of:=IF([.E262]&gt;[.$E$1003];&quot;High&quot;;&quot;Low&quot;)" table:style-name="ce1">
            <text:p>Low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lectronics</text:p>
          </table:table-cell>
          <table:table-cell office:value-type="float" office:value="1969.78" table:style-name="ce1">
            <text:p>1969.78</text:p>
          </table:table-cell>
          <table:table-cell office:value-type="float" office:value="2437.6999999999998" table:style-name="ce1">
            <text:p>2437.7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07-01T00:00:00" table:style-name="ce2">
            <text:p>01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3111.57" table:style-name="ce1">
            <text:p>3111.57</text:p>
          </table:table-cell>
          <table:table-cell office:value-type="string" office:string-value="Low" table:formula="of:=IF([.E263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1475" table:style-name="ce1">
            <text:p>1475</text:p>
          </table:table-cell>
          <table:table-cell office:value-type="float" office:value="1840.77" table:style-name="ce1">
            <text:p>1840.77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06-01T00:00:00" table:style-name="ce2">
            <text:p>01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3109.03" table:style-name="ce1">
            <text:p>3109.03</text:p>
          </table:table-cell>
          <table:table-cell office:value-type="string" office:string-value="Low" table:formula="of:=IF([.E264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lothing</text:p>
          </table:table-cell>
          <table:table-cell office:value-type="float" office:value="3637.25" table:style-name="ce1">
            <text:p>3637.25</text:p>
          </table:table-cell>
          <table:table-cell office:value-type="float" office:value="4096.96" table:style-name="ce1">
            <text:p>4096.96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1-25T00:00:00" table:style-name="ce2">
            <text:p>25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2381.12" table:style-name="ce1">
            <text:p>2381.12</text:p>
          </table:table-cell>
          <table:table-cell office:value-type="string" office:string-value="Low" table:formula="of:=IF([.E265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othing</text:p>
          </table:table-cell>
          <table:table-cell office:value-type="float" office:value="4190.26" table:style-name="ce1">
            <text:p>4190.26</text:p>
          </table:table-cell>
          <table:table-cell office:value-type="float" office:value="4645.3500000000004" table:style-name="ce1">
            <text:p>4645.35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6-29T00:00:00" table:style-name="ce2">
            <text:p>29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114.59" table:style-name="ce1">
            <text:p>114.59</text:p>
          </table:table-cell>
          <table:table-cell office:value-type="string" office:string-value="Low" table:formula="of:=IF([.E266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ood</text:p>
          </table:table-cell>
          <table:table-cell office:value-type="float" office:value="4319.32" table:style-name="ce1">
            <text:p>4319.32</text:p>
          </table:table-cell>
          <table:table-cell office:value-type="float" office:value="4625.5599999999904" table:style-name="ce1">
            <text:p>4625.56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07-17T00:00:00" table:style-name="ce2">
            <text:p>17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7320.51" table:style-name="ce1">
            <text:p>7320.51</text:p>
          </table:table-cell>
          <table:table-cell office:value-type="string" office:string-value="High" table:formula="of:=IF([.E267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lothing</text:p>
          </table:table-cell>
          <table:table-cell office:value-type="float" office:value="1614.19" table:style-name="ce1">
            <text:p>1614.19</text:p>
          </table:table-cell>
          <table:table-cell office:value-type="float" office:value="1882.79" table:style-name="ce1">
            <text:p>1882.79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date" office:date-value="2023-12-10T00:00:00" table:style-name="ce2">
            <text:p>10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9671.77" table:style-name="ce1">
            <text:p>9671.77</text:p>
          </table:table-cell>
          <table:table-cell office:value-type="string" office:string-value="High" table:formula="of:=IF([.E268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lectronics</text:p>
          </table:table-cell>
          <table:table-cell office:value-type="float" office:value="4268.45" table:style-name="ce1">
            <text:p>4268.45</text:p>
          </table:table-cell>
          <table:table-cell office:value-type="float" office:value="4551.5999999999904" table:style-name="ce1">
            <text:p>4551.6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6-10T00:00:00" table:style-name="ce2">
            <text:p>10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2320.5100000000002" table:style-name="ce1">
            <text:p>2320.51</text:p>
          </table:table-cell>
          <table:table-cell office:value-type="string" office:string-value="Low" table:formula="of:=IF([.E269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urniture</text:p>
          </table:table-cell>
          <table:table-cell office:value-type="float" office:value="252.62" table:style-name="ce1">
            <text:p>252.62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date" office:date-value="2023-06-26T00:00:00" table:style-name="ce2">
            <text:p>26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664.17" table:style-name="ce1">
            <text:p>6664.17</text:p>
          </table:table-cell>
          <table:table-cell office:value-type="string" office:string-value="High" table:formula="of:=IF([.E270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lothing</text:p>
          </table:table-cell>
          <table:table-cell office:value-type="float" office:value="295.82" table:style-name="ce1">
            <text:p>295.82</text:p>
          </table:table-cell>
          <table:table-cell office:value-type="float" office:value="684.67" table:style-name="ce1">
            <text:p>684.67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10-12T00:00:00" table:style-name="ce2">
            <text:p>12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444.77" table:style-name="ce1">
            <text:p>7444.77</text:p>
          </table:table-cell>
          <table:table-cell office:value-type="string" office:string-value="High" table:formula="of:=IF([.E271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lectronics</text:p>
          </table:table-cell>
          <table:table-cell office:value-type="float" office:value="3136.42" table:style-name="ce1">
            <text:p>3136.42</text:p>
          </table:table-cell>
          <table:table-cell office:value-type="float" office:value="3198.49" table:style-name="ce1">
            <text:p>3198.49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3-04T00:00:00" table:style-name="ce2">
            <text:p>04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8499.41" table:style-name="ce1">
            <text:p>8499.41</text:p>
          </table:table-cell>
          <table:table-cell office:value-type="string" office:string-value="High" table:formula="of:=IF([.E272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lothing</text:p>
          </table:table-cell>
          <table:table-cell office:value-type="float" office:value="362.38" table:style-name="ce1">
            <text:p>362.38</text:p>
          </table:table-cell>
          <table:table-cell office:value-type="float" office:value="753.81" table:style-name="ce1">
            <text:p>753.81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date" office:date-value="2023-05-30T00:00:00" table:style-name="ce2">
            <text:p>30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4284.03" table:style-name="ce1">
            <text:p>4284.03</text:p>
          </table:table-cell>
          <table:table-cell office:value-type="string" office:string-value="Low" table:formula="of:=IF([.E273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lothing</text:p>
          </table:table-cell>
          <table:table-cell office:value-type="float" office:value="1656.82" table:style-name="ce1">
            <text:p>1656.82</text:p>
          </table:table-cell>
          <table:table-cell office:value-type="float" office:value="1750.3799999999901" table:style-name="ce1">
            <text:p>1750.38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6-03T00:00:00" table:style-name="ce2">
            <text:p>03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3099.02" table:style-name="ce1">
            <text:p>3099.02</text:p>
          </table:table-cell>
          <table:table-cell office:value-type="string" office:string-value="Low" table:formula="of:=IF([.E274]&gt;[.$E$1003];&quot;High&quot;;&quot;Low&quot;)" table:style-name="ce1">
            <text:p>Lo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lothing</text:p>
          </table:table-cell>
          <table:table-cell office:value-type="float" office:value="3380.14" table:style-name="ce1">
            <text:p>3380.14</text:p>
          </table:table-cell>
          <table:table-cell office:value-type="float" office:value="3609.3399999999901" table:style-name="ce1">
            <text:p>3609.34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date" office:date-value="2023-06-05T00:00:00" table:style-name="ce2">
            <text:p>05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3320.42" table:style-name="ce1">
            <text:p>3320.42</text:p>
          </table:table-cell>
          <table:table-cell office:value-type="string" office:string-value="Low" table:formula="of:=IF([.E275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othing</text:p>
          </table:table-cell>
          <table:table-cell office:value-type="float" office:value="1719.47" table:style-name="ce1">
            <text:p>1719.47</text:p>
          </table:table-cell>
          <table:table-cell office:value-type="float" office:value="1832.6" table:style-name="ce1">
            <text:p>1832.6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2-18T00:00:00" table:style-name="ce2">
            <text:p>18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7154.95" table:style-name="ce1">
            <text:p>7154.95</text:p>
          </table:table-cell>
          <table:table-cell office:value-type="string" office:string-value="High" table:formula="of:=IF([.E276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lothing</text:p>
          </table:table-cell>
          <table:table-cell office:value-type="float" office:value="939.02" table:style-name="ce1">
            <text:p>939.02</text:p>
          </table:table-cell>
          <table:table-cell office:value-type="float" office:value="1286.92" table:style-name="ce1">
            <text:p>1286.92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date" office:date-value="2023-12-03T00:00:00" table:style-name="ce2">
            <text:p>03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8186.12" table:style-name="ce1">
            <text:p>8186.12</text:p>
          </table:table-cell>
          <table:table-cell office:value-type="string" office:string-value="High" table:formula="of:=IF([.E277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lectronics</text:p>
          </table:table-cell>
          <table:table-cell office:value-type="float" office:value="1442.69" table:style-name="ce1">
            <text:p>1442.69</text:p>
          </table:table-cell>
          <table:table-cell office:value-type="float" office:value="1882.57" table:style-name="ce1">
            <text:p>1882.57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3-25T00:00:00" table:style-name="ce2">
            <text:p>25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897.98" table:style-name="ce1">
            <text:p>1897.98</text:p>
          </table:table-cell>
          <table:table-cell office:value-type="string" office:string-value="Low" table:formula="of:=IF([.E278]&gt;[.$E$1003];&quot;High&quot;;&quot;Low&quot;)" table:style-name="ce1">
            <text:p>Low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urniture</text:p>
          </table:table-cell>
          <table:table-cell office:value-type="float" office:value="2315" table:style-name="ce1">
            <text:p>2315</text:p>
          </table:table-cell>
          <table:table-cell office:value-type="float" office:value="2467.2800000000002" table:style-name="ce1">
            <text:p>2467.28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date" office:date-value="2023-12-27T00:00:00" table:style-name="ce2">
            <text:p>27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3772.32" table:style-name="ce1">
            <text:p>3772.32</text:p>
          </table:table-cell>
          <table:table-cell office:value-type="string" office:string-value="Low" table:formula="of:=IF([.E279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urniture</text:p>
          </table:table-cell>
          <table:table-cell office:value-type="float" office:value="2403.16" table:style-name="ce1">
            <text:p>2403.16</text:p>
          </table:table-cell>
          <table:table-cell office:value-type="float" office:value="2453.35" table:style-name="ce1">
            <text:p>2453.35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06-26T00:00:00" table:style-name="ce2">
            <text:p>26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029.2099999999991" table:style-name="ce1">
            <text:p>9029.21</text:p>
          </table:table-cell>
          <table:table-cell office:value-type="string" office:string-value="High" table:formula="of:=IF([.E280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urniture</text:p>
          </table:table-cell>
          <table:table-cell office:value-type="float" office:value="3925.85" table:style-name="ce1">
            <text:p>3925.85</text:p>
          </table:table-cell>
          <table:table-cell office:value-type="float" office:value="4082.1099999999901" table:style-name="ce1">
            <text:p>4082.11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date" office:date-value="2023-05-28T00:00:00" table:style-name="ce2">
            <text:p>28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8086.27" table:style-name="ce1">
            <text:p>8086.27</text:p>
          </table:table-cell>
          <table:table-cell office:value-type="string" office:string-value="High" table:formula="of:=IF([.E281]&gt;[.$E$1003];&quot;High&quot;;&quot;Low&quot;)" table:style-name="ce1">
            <text:p>Hig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urniture</text:p>
          </table:table-cell>
          <table:table-cell office:value-type="float" office:value="3763.26" table:style-name="ce1">
            <text:p>3763.26</text:p>
          </table:table-cell>
          <table:table-cell office:value-type="float" office:value="4102.72" table:style-name="ce1">
            <text:p>4102.72</text:p>
          </table:table-cell>
          <table:table-cell office:value-type="string" table:style-name="ce1">
            <text:p>New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4-28T00:00:00" table:style-name="ce2">
            <text:p>28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9850.1" table:style-name="ce1">
            <text:p>9850.1</text:p>
          </table:table-cell>
          <table:table-cell office:value-type="string" office:string-value="High" table:formula="of:=IF([.E282]&gt;[.$E$1003];&quot;High&quot;;&quot;Low&quot;)" table:style-name="ce1">
            <text:p>Hig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lectronics</text:p>
          </table:table-cell>
          <table:table-cell office:value-type="float" office:value="2311.25" table:style-name="ce1">
            <text:p>2311.25</text:p>
          </table:table-cell>
          <table:table-cell office:value-type="float" office:value="2482.34" table:style-name="ce1">
            <text:p>2482.34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date" office:date-value="2023-12-08T00:00:00" table:style-name="ce2">
            <text:p>08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567.06" table:style-name="ce1">
            <text:p>7567.06</text:p>
          </table:table-cell>
          <table:table-cell office:value-type="string" office:string-value="High" table:formula="of:=IF([.E283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ood</text:p>
          </table:table-cell>
          <table:table-cell office:value-type="float" office:value="4236.05" table:style-name="ce1">
            <text:p>4236.05</text:p>
          </table:table-cell>
          <table:table-cell office:value-type="float" office:value="4382.32" table:style-name="ce1">
            <text:p>4382.32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date" office:date-value="2023-03-04T00:00:00" table:style-name="ce2">
            <text:p>04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3992.63" table:style-name="ce1">
            <text:p>3992.63</text:p>
          </table:table-cell>
          <table:table-cell office:value-type="string" office:string-value="Low" table:formula="of:=IF([.E284]&gt;[.$E$1003];&quot;High&quot;;&quot;Low&quot;)" table:style-name="ce1">
            <text:p>Low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ood</text:p>
          </table:table-cell>
          <table:table-cell office:value-type="float" office:value="615.47" table:style-name="ce1">
            <text:p>615.47</text:p>
          </table:table-cell>
          <table:table-cell office:value-type="float" office:value="715.84" table:style-name="ce1">
            <text:p>715.84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date" office:date-value="2023-07-08T00:00:00" table:style-name="ce2">
            <text:p>08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5947.31" table:style-name="ce1">
            <text:p>5947.31</text:p>
          </table:table-cell>
          <table:table-cell office:value-type="string" office:string-value="High" table:formula="of:=IF([.E285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1314" table:style-name="ce1">
            <text:p>1314</text:p>
          </table:table-cell>
          <table:table-cell office:value-type="float" office:value="1567.78" table:style-name="ce1">
            <text:p>1567.78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6644.04" table:style-name="ce1">
            <text:p>6644.04</text:p>
          </table:table-cell>
          <table:table-cell office:value-type="string" office:string-value="High" table:formula="of:=IF([.E286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nics</text:p>
          </table:table-cell>
          <table:table-cell office:value-type="float" office:value="4148.4799999999996" table:style-name="ce1">
            <text:p>4148.48</text:p>
          </table:table-cell>
          <table:table-cell office:value-type="float" office:value="4293.6899999999996" table:style-name="ce1">
            <text:p>4293.69</text:p>
          </table:table-cell>
          <table:table-cell office:value-type="string" table:style-name="ce1">
            <text:p>New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date" office:date-value="2023-02-18T00:00:00" table:style-name="ce2">
            <text:p>18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876.71" table:style-name="ce1">
            <text:p>876.71</text:p>
          </table:table-cell>
          <table:table-cell office:value-type="string" office:string-value="Low" table:formula="of:=IF([.E287]&gt;[.$E$1003];&quot;High&quot;;&quot;Low&quot;)" table:style-name="ce1">
            <text:p>L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lothing</text:p>
          </table:table-cell>
          <table:table-cell office:value-type="float" office:value="1921.07" table:style-name="ce1">
            <text:p>1921.07</text:p>
          </table:table-cell>
          <table:table-cell office:value-type="float" office:value="2289.27" table:style-name="ce1">
            <text:p>2289.27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11-23T00:00:00" table:style-name="ce2">
            <text:p>23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5490.52" table:style-name="ce1">
            <text:p>5490.52</text:p>
          </table:table-cell>
          <table:table-cell office:value-type="string" office:string-value="High" table:formula="of:=IF([.E288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lothing</text:p>
          </table:table-cell>
          <table:table-cell office:value-type="float" office:value="4906.8500000000004" table:style-name="ce1">
            <text:p>4906.85</text:p>
          </table:table-cell>
          <table:table-cell office:value-type="float" office:value="4954.3900000000003" table:style-name="ce1">
            <text:p>4954.39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9-14T00:00:00" table:style-name="ce2">
            <text:p>14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7122.28" table:style-name="ce1">
            <text:p>7122.28</text:p>
          </table:table-cell>
          <table:table-cell office:value-type="string" office:string-value="High" table:formula="of:=IF([.E289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lothing</text:p>
          </table:table-cell>
          <table:table-cell office:value-type="float" office:value="2357.9499999999998" table:style-name="ce1">
            <text:p>2357.95</text:p>
          </table:table-cell>
          <table:table-cell office:value-type="float" office:value="2693.33" table:style-name="ce1">
            <text:p>2693.33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08-12T00:00:00" table:style-name="ce2">
            <text:p>12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1756.48" table:style-name="ce1">
            <text:p>1756.48</text:p>
          </table:table-cell>
          <table:table-cell office:value-type="string" office:string-value="Low" table:formula="of:=IF([.E290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urniture</text:p>
          </table:table-cell>
          <table:table-cell office:value-type="float" office:value="3970.08" table:style-name="ce1">
            <text:p>3970.08</text:p>
          </table:table-cell>
          <table:table-cell office:value-type="float" office:value="4096.4799999999996" table:style-name="ce1">
            <text:p>4096.48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5-21T00:00:00" table:style-name="ce2">
            <text:p>21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7828.25" table:style-name="ce1">
            <text:p>7828.25</text:p>
          </table:table-cell>
          <table:table-cell office:value-type="string" office:string-value="High" table:formula="of:=IF([.E291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lothing</text:p>
          </table:table-cell>
          <table:table-cell office:value-type="float" office:value="2041.42" table:style-name="ce1">
            <text:p>2041.42</text:p>
          </table:table-cell>
          <table:table-cell office:value-type="float" office:value="2291.17" table:style-name="ce1">
            <text:p>2291.17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5879.35" table:style-name="ce1">
            <text:p>5879.35</text:p>
          </table:table-cell>
          <table:table-cell office:value-type="string" office:string-value="High" table:formula="of:=IF([.E292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ood</text:p>
          </table:table-cell>
          <table:table-cell office:value-type="float" office:value="2153.52" table:style-name="ce1">
            <text:p>2153.52</text:p>
          </table:table-cell>
          <table:table-cell office:value-type="float" office:value="2303.6999999999998" table:style-name="ce1">
            <text:p>2303.7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07-30T00:00:00" table:style-name="ce2">
            <text:p>30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9527" table:style-name="ce1">
            <text:p>9527</text:p>
          </table:table-cell>
          <table:table-cell office:value-type="string" office:string-value="High" table:formula="of:=IF([.E293]&gt;[.$E$1003];&quot;High&quot;;&quot;Low&quot;)" table:style-name="ce1">
            <text:p>Hig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urniture</text:p>
          </table:table-cell>
          <table:table-cell office:value-type="float" office:value="1945.27" table:style-name="ce1">
            <text:p>1945.27</text:p>
          </table:table-cell>
          <table:table-cell office:value-type="float" office:value="2309.4299999999998" table:style-name="ce1">
            <text:p>2309.43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519.98" table:style-name="ce1">
            <text:p>519.98</text:p>
          </table:table-cell>
          <table:table-cell office:value-type="string" office:string-value="Low" table:formula="of:=IF([.E294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othing</text:p>
          </table:table-cell>
          <table:table-cell office:value-type="float" office:value="3609.42" table:style-name="ce1">
            <text:p>3609.42</text:p>
          </table:table-cell>
          <table:table-cell office:value-type="float" office:value="4082.62" table:style-name="ce1">
            <text:p>4082.62</text:p>
          </table:table-cell>
          <table:table-cell office:value-type="string" table:style-name="ce1">
            <text:p>Returnin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02-01T00:00:00" table:style-name="ce2">
            <text:p>01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726.73" table:style-name="ce1">
            <text:p>2726.73</text:p>
          </table:table-cell>
          <table:table-cell office:value-type="string" office:string-value="Low" table:formula="of:=IF([.E295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urniture</text:p>
          </table:table-cell>
          <table:table-cell office:value-type="float" office:value="2760.21" table:style-name="ce1">
            <text:p>2760.21</text:p>
          </table:table-cell>
          <table:table-cell office:value-type="float" office:value="3219.58" table:style-name="ce1">
            <text:p>3219.58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date" office:date-value="2023-06-07T00:00:00" table:style-name="ce2">
            <text:p>07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6055.38" table:style-name="ce1">
            <text:p>6055.38</text:p>
          </table:table-cell>
          <table:table-cell office:value-type="string" office:string-value="High" table:formula="of:=IF([.E296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od</text:p>
          </table:table-cell>
          <table:table-cell office:value-type="float" office:value="4721.7" table:style-name="ce1">
            <text:p>4721.7</text:p>
          </table:table-cell>
          <table:table-cell office:value-type="float" office:value="5017.58" table:style-name="ce1">
            <text:p>5017.58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10-12T00:00:00" table:style-name="ce2">
            <text:p>12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3035.94" table:style-name="ce1">
            <text:p>3035.94</text:p>
          </table:table-cell>
          <table:table-cell office:value-type="string" office:string-value="Low" table:formula="of:=IF([.E297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othing</text:p>
          </table:table-cell>
          <table:table-cell office:value-type="float" office:value="1291.9100000000001" table:style-name="ce1">
            <text:p>1291.91</text:p>
          </table:table-cell>
          <table:table-cell office:value-type="float" office:value="1528.59" table:style-name="ce1">
            <text:p>1528.59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7172.8" table:style-name="ce1">
            <text:p>7172.8</text:p>
          </table:table-cell>
          <table:table-cell office:value-type="string" office:string-value="High" table:formula="of:=IF([.E298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ood</text:p>
          </table:table-cell>
          <table:table-cell office:value-type="float" office:value="547.79" table:style-name="ce1">
            <text:p>547.79</text:p>
          </table:table-cell>
          <table:table-cell office:value-type="float" office:value="958.76" table:style-name="ce1">
            <text:p>958.76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10-13T00:00:00" table:style-name="ce2">
            <text:p>13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7614.15" table:style-name="ce1">
            <text:p>7614.15</text:p>
          </table:table-cell>
          <table:table-cell office:value-type="string" office:string-value="High" table:formula="of:=IF([.E299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ood</text:p>
          </table:table-cell>
          <table:table-cell office:value-type="float" office:value="1996.64" table:style-name="ce1">
            <text:p>1996.64</text:p>
          </table:table-cell>
          <table:table-cell office:value-type="float" office:value="2341.4699999999998" table:style-name="ce1">
            <text:p>2341.47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05-24T00:00:00" table:style-name="ce2">
            <text:p>24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1114.9100000000001" table:style-name="ce1">
            <text:p>1114.91</text:p>
          </table:table-cell>
          <table:table-cell office:value-type="string" office:string-value="Low" table:formula="of:=IF([.E300]&gt;[.$E$1003];&quot;High&quot;;&quot;Low&quot;)" table:style-name="ce1">
            <text:p>Low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ood</text:p>
          </table:table-cell>
          <table:table-cell office:value-type="float" office:value="3102.73" table:style-name="ce1">
            <text:p>3102.73</text:p>
          </table:table-cell>
          <table:table-cell office:value-type="float" office:value="3202.68" table:style-name="ce1">
            <text:p>3202.68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01-19T00:00:00" table:style-name="ce2">
            <text:p>19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5187.16" table:style-name="ce1">
            <text:p>5187.16</text:p>
          </table:table-cell>
          <table:table-cell office:value-type="string" office:string-value="High" table:formula="of:=IF([.E301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othing</text:p>
          </table:table-cell>
          <table:table-cell office:value-type="float" office:value="4310.95" table:style-name="ce1">
            <text:p>4310.95</text:p>
          </table:table-cell>
          <table:table-cell office:value-type="float" office:value="4723.2" table:style-name="ce1">
            <text:p>4723.2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date" office:date-value="2023-01-18T00:00:00" table:style-name="ce2">
            <text:p>18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5138.0200000000004" table:style-name="ce1">
            <text:p>5138.02</text:p>
          </table:table-cell>
          <table:table-cell office:value-type="string" office:string-value="High" table:formula="of:=IF([.E302]&gt;[.$E$1003];&quot;High&quot;;&quot;Low&quot;)" table:style-name="ce1">
            <text:p>High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lectronics</text:p>
          </table:table-cell>
          <table:table-cell office:value-type="float" office:value="1763.67" table:style-name="ce1">
            <text:p>1763.67</text:p>
          </table:table-cell>
          <table:table-cell office:value-type="float" office:value="1983.82" table:style-name="ce1">
            <text:p>1983.82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09-14T00:00:00" table:style-name="ce2">
            <text:p>14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3755.88" table:style-name="ce1">
            <text:p>3755.88</text:p>
          </table:table-cell>
          <table:table-cell office:value-type="string" office:string-value="Low" table:formula="of:=IF([.E303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othing</text:p>
          </table:table-cell>
          <table:table-cell office:value-type="float" office:value="3286.24" table:style-name="ce1">
            <text:p>3286.24</text:p>
          </table:table-cell>
          <table:table-cell office:value-type="float" office:value="3388.8399999999901" table:style-name="ce1">
            <text:p>3388.84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date" office:date-value="2023-03-19T00:00:00" table:style-name="ce2">
            <text:p>19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9335.9599999999991" table:style-name="ce1">
            <text:p>9335.96</text:p>
          </table:table-cell>
          <table:table-cell office:value-type="string" office:string-value="High" table:formula="of:=IF([.E304]&gt;[.$E$1003];&quot;High&quot;;&quot;Low&quot;)" table:style-name="ce1">
            <text:p>Hig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ood</text:p>
          </table:table-cell>
          <table:table-cell office:value-type="float" office:value="1783.48" table:style-name="ce1">
            <text:p>1783.48</text:p>
          </table:table-cell>
          <table:table-cell office:value-type="float" office:value="1931.56" table:style-name="ce1">
            <text:p>1931.56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6-24T00:00:00" table:style-name="ce2">
            <text:p>24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8292.31" table:style-name="ce1">
            <text:p>8292.31</text:p>
          </table:table-cell>
          <table:table-cell office:value-type="string" office:string-value="High" table:formula="of:=IF([.E305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lothing</text:p>
          </table:table-cell>
          <table:table-cell office:value-type="float" office:value="3105.24" table:style-name="ce1">
            <text:p>3105.24</text:p>
          </table:table-cell>
          <table:table-cell office:value-type="float" office:value="3246.33" table:style-name="ce1">
            <text:p>3246.33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07-13T00:00:00" table:style-name="ce2">
            <text:p>13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7002.37" table:style-name="ce1">
            <text:p>7002.37</text:p>
          </table:table-cell>
          <table:table-cell office:value-type="string" office:string-value="High" table:formula="of:=IF([.E306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ood</text:p>
          </table:table-cell>
          <table:table-cell office:value-type="float" office:value="4429.8" table:style-name="ce1">
            <text:p>4429.8</text:p>
          </table:table-cell>
          <table:table-cell office:value-type="float" office:value="4694.21" table:style-name="ce1">
            <text:p>4694.21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4-23T00:00:00" table:style-name="ce2">
            <text:p>23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7171.83" table:style-name="ce1">
            <text:p>7171.83</text:p>
          </table:table-cell>
          <table:table-cell office:value-type="string" office:string-value="High" table:formula="of:=IF([.E307]&gt;[.$E$1003];&quot;High&quot;;&quot;Low&quot;)" table:style-name="ce1">
            <text:p>High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lectronics</text:p>
          </table:table-cell>
          <table:table-cell office:value-type="float" office:value="1195.22" table:style-name="ce1">
            <text:p>1195.22</text:p>
          </table:table-cell>
          <table:table-cell office:value-type="float" office:value="1320.06" table:style-name="ce1">
            <text:p>1320.06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4-24T00:00:00" table:style-name="ce2">
            <text:p>24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4670.99" table:style-name="ce1">
            <text:p>4670.99</text:p>
          </table:table-cell>
          <table:table-cell office:value-type="string" office:string-value="Low" table:formula="of:=IF([.E308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urniture</text:p>
          </table:table-cell>
          <table:table-cell office:value-type="float" office:value="2051" table:style-name="ce1">
            <text:p>2051</text:p>
          </table:table-cell>
          <table:table-cell office:value-type="float" office:value="2121.5500000000002" table:style-name="ce1">
            <text:p>2121.55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8-10T00:00:00" table:style-name="ce2">
            <text:p>10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9217.85" table:style-name="ce1">
            <text:p>9217.85</text:p>
          </table:table-cell>
          <table:table-cell office:value-type="string" office:string-value="High" table:formula="of:=IF([.E309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ctronics</text:p>
          </table:table-cell>
          <table:table-cell office:value-type="float" office:value="4966.66" table:style-name="ce1">
            <text:p>4966.66</text:p>
          </table:table-cell>
          <table:table-cell office:value-type="float" office:value="5037.2699999999904" table:style-name="ce1">
            <text:p>5037.27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date" office:date-value="2023-06-15T00:00:00" table:style-name="ce2">
            <text:p>15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976.49" table:style-name="ce1">
            <text:p>6976.49</text:p>
          </table:table-cell>
          <table:table-cell office:value-type="string" office:string-value="High" table:formula="of:=IF([.E310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lectronics</text:p>
          </table:table-cell>
          <table:table-cell office:value-type="float" office:value="4349.3599999999997" table:style-name="ce1">
            <text:p>4349.36</text:p>
          </table:table-cell>
          <table:table-cell office:value-type="float" office:value="4645.17" table:style-name="ce1">
            <text:p>4645.17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11-15T00:00:00" table:style-name="ce2">
            <text:p>15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7316.91" table:style-name="ce1">
            <text:p>7316.91</text:p>
          </table:table-cell>
          <table:table-cell office:value-type="string" office:string-value="High" table:formula="of:=IF([.E311]&gt;[.$E$1003];&quot;High&quot;;&quot;Low&quot;)" table:style-name="ce1">
            <text:p>Hig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urniture</text:p>
          </table:table-cell>
          <table:table-cell office:value-type="float" office:value="2844.97" table:style-name="ce1">
            <text:p>2844.97</text:p>
          </table:table-cell>
          <table:table-cell office:value-type="float" office:value="3215" table:style-name="ce1">
            <text:p>3215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05-12T00:00:00" table:style-name="ce2">
            <text:p>12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8630.74" table:style-name="ce1">
            <text:p>8630.74</text:p>
          </table:table-cell>
          <table:table-cell office:value-type="string" office:string-value="High" table:formula="of:=IF([.E312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othing</text:p>
          </table:table-cell>
          <table:table-cell office:value-type="float" office:value="2607.31" table:style-name="ce1">
            <text:p>2607.31</text:p>
          </table:table-cell>
          <table:table-cell office:value-type="float" office:value="2774.86" table:style-name="ce1">
            <text:p>2774.86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2813.31" table:style-name="ce1">
            <text:p>2813.31</text:p>
          </table:table-cell>
          <table:table-cell office:value-type="string" office:string-value="Low" table:formula="of:=IF([.E313]&gt;[.$E$1003];&quot;High&quot;;&quot;Low&quot;)" table:style-name="ce1">
            <text:p>Low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urniture</text:p>
          </table:table-cell>
          <table:table-cell office:value-type="float" office:value="1458.77" table:style-name="ce1">
            <text:p>1458.77</text:p>
          </table:table-cell>
          <table:table-cell office:value-type="float" office:value="1485.75" table:style-name="ce1">
            <text:p>1485.75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2-24T00:00:00" table:style-name="ce2">
            <text:p>24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8090" table:style-name="ce1">
            <text:p>8090</text:p>
          </table:table-cell>
          <table:table-cell office:value-type="string" office:string-value="High" table:formula="of:=IF([.E314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lothing</text:p>
          </table:table-cell>
          <table:table-cell office:value-type="float" office:value="2610.19" table:style-name="ce1">
            <text:p>2610.19</text:p>
          </table:table-cell>
          <table:table-cell office:value-type="float" office:value="2682.53" table:style-name="ce1">
            <text:p>2682.53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12-25T00:00:00" table:style-name="ce2">
            <text:p>25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2032.88" table:style-name="ce1">
            <text:p>2032.88</text:p>
          </table:table-cell>
          <table:table-cell office:value-type="string" office:string-value="Low" table:formula="of:=IF([.E315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lothing</text:p>
          </table:table-cell>
          <table:table-cell office:value-type="float" office:value="4248.5" table:style-name="ce1">
            <text:p>4248.5</text:p>
          </table:table-cell>
          <table:table-cell office:value-type="float" office:value="4706.7" table:style-name="ce1">
            <text:p>4706.7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5-11T00:00:00" table:style-name="ce2">
            <text:p>11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518.89" table:style-name="ce1">
            <text:p>3518.89</text:p>
          </table:table-cell>
          <table:table-cell office:value-type="string" office:string-value="Low" table:formula="of:=IF([.E316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ood</text:p>
          </table:table-cell>
          <table:table-cell office:value-type="float" office:value="3441.61" table:style-name="ce1">
            <text:p>3441.61</text:p>
          </table:table-cell>
          <table:table-cell office:value-type="float" office:value="3693.45" table:style-name="ce1">
            <text:p>3693.45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10-15T00:00:00" table:style-name="ce2">
            <text:p>15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3422.54" table:style-name="ce1">
            <text:p>3422.54</text:p>
          </table:table-cell>
          <table:table-cell office:value-type="string" office:string-value="Low" table:formula="of:=IF([.E317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ood</text:p>
          </table:table-cell>
          <table:table-cell office:value-type="float" office:value="1485.72" table:style-name="ce1">
            <text:p>1485.72</text:p>
          </table:table-cell>
          <table:table-cell office:value-type="float" office:value="1717.97" table:style-name="ce1">
            <text:p>1717.97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09-23T00:00:00" table:style-name="ce2">
            <text:p>23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9787.4" table:style-name="ce1">
            <text:p>9787.4</text:p>
          </table:table-cell>
          <table:table-cell office:value-type="string" office:string-value="High" table:formula="of:=IF([.E318]&gt;[.$E$1003];&quot;High&quot;;&quot;Low&quot;)" table:style-name="ce1">
            <text:p>High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urniture</text:p>
          </table:table-cell>
          <table:table-cell office:value-type="float" office:value="1047.25" table:style-name="ce1">
            <text:p>1047.25</text:p>
          </table:table-cell>
          <table:table-cell office:value-type="float" office:value="1075.8900000000001" table:style-name="ce1">
            <text:p>1075.89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date" office:date-value="2024-01-01T00:00:00" table:style-name="ce2">
            <text:p>01/01/2024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8579.7199999999993" table:style-name="ce1">
            <text:p>8579.72</text:p>
          </table:table-cell>
          <table:table-cell office:value-type="string" office:string-value="High" table:formula="of:=IF([.E319]&gt;[.$E$1003];&quot;High&quot;;&quot;Low&quot;)" table:style-name="ce1">
            <text:p>High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ectronics</text:p>
          </table:table-cell>
          <table:table-cell office:value-type="float" office:value="1362.78" table:style-name="ce1">
            <text:p>1362.78</text:p>
          </table:table-cell>
          <table:table-cell office:value-type="float" office:value="1729.81" table:style-name="ce1">
            <text:p>1729.81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date" office:date-value="2023-06-11T00:00:00" table:style-name="ce2">
            <text:p>11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7041.58" table:style-name="ce1">
            <text:p>7041.58</text:p>
          </table:table-cell>
          <table:table-cell office:value-type="string" office:string-value="High" table:formula="of:=IF([.E320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890.31" table:style-name="ce1">
            <text:p>890.31</text:p>
          </table:table-cell>
          <table:table-cell office:value-type="float" office:value="1159.06" table:style-name="ce1">
            <text:p>1159.06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date" office:date-value="2023-03-28T00:00:00" table:style-name="ce2">
            <text:p>28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7297.86" table:style-name="ce1">
            <text:p>7297.86</text:p>
          </table:table-cell>
          <table:table-cell office:value-type="string" office:string-value="High" table:formula="of:=IF([.E321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othing</text:p>
          </table:table-cell>
          <table:table-cell office:value-type="float" office:value="523.41999999999996" table:style-name="ce1">
            <text:p>523.42</text:p>
          </table:table-cell>
          <table:table-cell office:value-type="float" office:value="632.43999999999903" table:style-name="ce1">
            <text:p>632.44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02-24T00:00:00" table:style-name="ce2">
            <text:p>24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5664.52" table:style-name="ce1">
            <text:p>5664.52</text:p>
          </table:table-cell>
          <table:table-cell office:value-type="string" office:string-value="High" table:formula="of:=IF([.E322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ood</text:p>
          </table:table-cell>
          <table:table-cell office:value-type="float" office:value="2124.7199999999998" table:style-name="ce1">
            <text:p>2124.72</text:p>
          </table:table-cell>
          <table:table-cell office:value-type="float" office:value="2188.66" table:style-name="ce1">
            <text:p>2188.66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10-15T00:00:00" table:style-name="ce2">
            <text:p>15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9476.2000000000007" table:style-name="ce1">
            <text:p>9476.2</text:p>
          </table:table-cell>
          <table:table-cell office:value-type="string" office:string-value="High" table:formula="of:=IF([.E323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rniture</text:p>
          </table:table-cell>
          <table:table-cell office:value-type="float" office:value="610.83000000000004" table:style-name="ce1">
            <text:p>610.83</text:p>
          </table:table-cell>
          <table:table-cell office:value-type="float" office:value="808.69" table:style-name="ce1">
            <text:p>808.69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date" office:date-value="2023-06-27T00:00:00" table:style-name="ce2">
            <text:p>27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5012.96" table:style-name="ce1">
            <text:p>5012.96</text:p>
          </table:table-cell>
          <table:table-cell office:value-type="string" office:string-value="Low" table:formula="of:=IF([.E324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urniture</text:p>
          </table:table-cell>
          <table:table-cell office:value-type="float" office:value="900.97" table:style-name="ce1">
            <text:p>900.97</text:p>
          </table:table-cell>
          <table:table-cell office:value-type="float" office:value="1321.18" table:style-name="ce1">
            <text:p>1321.18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12-15T00:00:00" table:style-name="ce2">
            <text:p>15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3867.13" table:style-name="ce1">
            <text:p>3867.13</text:p>
          </table:table-cell>
          <table:table-cell office:value-type="string" office:string-value="Low" table:formula="of:=IF([.E325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ood</text:p>
          </table:table-cell>
          <table:table-cell office:value-type="float" office:value="2759.26" table:style-name="ce1">
            <text:p>2759.26</text:p>
          </table:table-cell>
          <table:table-cell office:value-type="float" office:value="3193.25" table:style-name="ce1">
            <text:p>3193.25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date" office:date-value="2023-01-08T00:00:00" table:style-name="ce2">
            <text:p>08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1714.05" table:style-name="ce1">
            <text:p>1714.05</text:p>
          </table:table-cell>
          <table:table-cell office:value-type="string" office:string-value="Low" table:formula="of:=IF([.E326]&gt;[.$E$1003];&quot;High&quot;;&quot;Low&quot;)" table:style-name="ce1">
            <text:p>Low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ood</text:p>
          </table:table-cell>
          <table:table-cell office:value-type="float" office:value="864.77" table:style-name="ce1">
            <text:p>864.77</text:p>
          </table:table-cell>
          <table:table-cell office:value-type="float" office:value="1170.1599999999901" table:style-name="ce1">
            <text:p>1170.16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date" office:date-value="2023-11-17T00:00:00" table:style-name="ce2">
            <text:p>17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7883.44" table:style-name="ce1">
            <text:p>7883.44</text:p>
          </table:table-cell>
          <table:table-cell office:value-type="string" office:string-value="High" table:formula="of:=IF([.E327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ood</text:p>
          </table:table-cell>
          <table:table-cell office:value-type="float" office:value="366.2" table:style-name="ce1">
            <text:p>366.2</text:p>
          </table:table-cell>
          <table:table-cell office:value-type="float" office:value="732.69" table:style-name="ce1">
            <text:p>732.69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11-09T00:00:00" table:style-name="ce2">
            <text:p>09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7370.99" table:style-name="ce1">
            <text:p>7370.99</text:p>
          </table:table-cell>
          <table:table-cell office:value-type="string" office:string-value="High" table:formula="of:=IF([.E328]&gt;[.$E$1003];&quot;High&quot;;&quot;Low&quot;)" table:style-name="ce1">
            <text:p>Hig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othing</text:p>
          </table:table-cell>
          <table:table-cell office:value-type="float" office:value="1621.07" table:style-name="ce1">
            <text:p>1621.07</text:p>
          </table:table-cell>
          <table:table-cell office:value-type="float" office:value="1687.5" table:style-name="ce1">
            <text:p>1687.5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date" office:date-value="2023-09-04T00:00:00" table:style-name="ce2">
            <text:p>04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3905.11" table:style-name="ce1">
            <text:p>3905.11</text:p>
          </table:table-cell>
          <table:table-cell office:value-type="string" office:string-value="Low" table:formula="of:=IF([.E329]&gt;[.$E$1003];&quot;High&quot;;&quot;Low&quot;)" table:style-name="ce1">
            <text:p>Low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ood</text:p>
          </table:table-cell>
          <table:table-cell office:value-type="float" office:value="1140.58" table:style-name="ce1">
            <text:p>1140.58</text:p>
          </table:table-cell>
          <table:table-cell office:value-type="float" office:value="1438.76" table:style-name="ce1">
            <text:p>1438.76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11-19T00:00:00" table:style-name="ce2">
            <text:p>19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349.41" table:style-name="ce1">
            <text:p>349.41</text:p>
          </table:table-cell>
          <table:table-cell office:value-type="string" office:string-value="Low" table:formula="of:=IF([.E330]&gt;[.$E$1003];&quot;High&quot;;&quot;Low&quot;)" table:style-name="ce1">
            <text:p>Low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lectronics</text:p>
          </table:table-cell>
          <table:table-cell office:value-type="float" office:value="2600.7600000000002" table:style-name="ce1">
            <text:p>2600.76</text:p>
          </table:table-cell>
          <table:table-cell office:value-type="float" office:value="2937.57" table:style-name="ce1">
            <text:p>2937.57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09-12T00:00:00" table:style-name="ce2">
            <text:p>12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8406.07" table:style-name="ce1">
            <text:p>8406.07</text:p>
          </table:table-cell>
          <table:table-cell office:value-type="string" office:string-value="High" table:formula="of:=IF([.E331]&gt;[.$E$1003];&quot;High&quot;;&quot;Low&quot;)" table:style-name="ce1">
            <text:p>Hig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urniture</text:p>
          </table:table-cell>
          <table:table-cell office:value-type="float" office:value="556.72" table:style-name="ce1">
            <text:p>556.72</text:p>
          </table:table-cell>
          <table:table-cell office:value-type="float" office:value="665.07" table:style-name="ce1">
            <text:p>665.07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11-24T00:00:00" table:style-name="ce2">
            <text:p>24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13.04" table:style-name="ce1">
            <text:p>213.04</text:p>
          </table:table-cell>
          <table:table-cell office:value-type="string" office:string-value="Low" table:formula="of:=IF([.E332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ood</text:p>
          </table:table-cell>
          <table:table-cell office:value-type="float" office:value="3771.27" table:style-name="ce1">
            <text:p>3771.27</text:p>
          </table:table-cell>
          <table:table-cell office:value-type="float" office:value="4212.55" table:style-name="ce1">
            <text:p>4212.55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02-23T00:00:00" table:style-name="ce2">
            <text:p>23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7066.63" table:style-name="ce1">
            <text:p>7066.63</text:p>
          </table:table-cell>
          <table:table-cell office:value-type="string" office:string-value="High" table:formula="of:=IF([.E333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ood</text:p>
          </table:table-cell>
          <table:table-cell office:value-type="float" office:value="4535.8599999999997" table:style-name="ce1">
            <text:p>4535.86</text:p>
          </table:table-cell>
          <table:table-cell office:value-type="float" office:value="4641.41" table:style-name="ce1">
            <text:p>4641.41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date" office:date-value="2023-09-06T00:00:00" table:style-name="ce2">
            <text:p>06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9705.5499999999993" table:style-name="ce1">
            <text:p>9705.55</text:p>
          </table:table-cell>
          <table:table-cell office:value-type="string" office:string-value="High" table:formula="of:=IF([.E334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othing</text:p>
          </table:table-cell>
          <table:table-cell office:value-type="float" office:value="3730" table:style-name="ce1">
            <text:p>3730</text:p>
          </table:table-cell>
          <table:table-cell office:value-type="float" office:value="3893.6" table:style-name="ce1">
            <text:p>3893.6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08-27T00:00:00" table:style-name="ce2">
            <text:p>27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432.8500000000004" table:style-name="ce1">
            <text:p>4432.85</text:p>
          </table:table-cell>
          <table:table-cell office:value-type="string" office:string-value="Low" table:formula="of:=IF([.E335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lothing</text:p>
          </table:table-cell>
          <table:table-cell office:value-type="float" office:value="2687.49" table:style-name="ce1">
            <text:p>2687.49</text:p>
          </table:table-cell>
          <table:table-cell office:value-type="float" office:value="3001.56" table:style-name="ce1">
            <text:p>3001.56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date" office:date-value="2023-08-17T00:00:00" table:style-name="ce2">
            <text:p>17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426.2399999999998" table:style-name="ce1">
            <text:p>2426.24</text:p>
          </table:table-cell>
          <table:table-cell office:value-type="string" office:string-value="Low" table:formula="of:=IF([.E336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4310.3100000000004" table:style-name="ce1">
            <text:p>4310.31</text:p>
          </table:table-cell>
          <table:table-cell office:value-type="float" office:value="4633.1000000000004" table:style-name="ce1">
            <text:p>4633.1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3-08T00:00:00" table:style-name="ce2">
            <text:p>08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7078.22" table:style-name="ce1">
            <text:p>7078.22</text:p>
          </table:table-cell>
          <table:table-cell office:value-type="string" office:string-value="High" table:formula="of:=IF([.E337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lectronics</text:p>
          </table:table-cell>
          <table:table-cell office:value-type="float" office:value="3489.85" table:style-name="ce1">
            <text:p>3489.85</text:p>
          </table:table-cell>
          <table:table-cell office:value-type="float" office:value="3842.5499999999902" table:style-name="ce1">
            <text:p>3842.55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2-20T00:00:00" table:style-name="ce2">
            <text:p>20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8189.57" table:style-name="ce1">
            <text:p>8189.57</text:p>
          </table:table-cell>
          <table:table-cell office:value-type="string" office:string-value="High" table:formula="of:=IF([.E338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102.23" table:style-name="ce1">
            <text:p>102.23</text:p>
          </table:table-cell>
          <table:table-cell office:value-type="float" office:value="167.12" table:style-name="ce1">
            <text:p>167.12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4-07T00:00:00" table:style-name="ce2">
            <text:p>07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5509.66" table:style-name="ce1">
            <text:p>5509.66</text:p>
          </table:table-cell>
          <table:table-cell office:value-type="string" office:string-value="High" table:formula="of:=IF([.E339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od</text:p>
          </table:table-cell>
          <table:table-cell office:value-type="float" office:value="2000.75" table:style-name="ce1">
            <text:p>2000.75</text:p>
          </table:table-cell>
          <table:table-cell office:value-type="float" office:value="2426.9899999999998" table:style-name="ce1">
            <text:p>2426.99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04-02T00:00:00" table:style-name="ce2">
            <text:p>02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9673.65" table:style-name="ce1">
            <text:p>9673.65</text:p>
          </table:table-cell>
          <table:table-cell office:value-type="string" office:string-value="High" table:formula="of:=IF([.E340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lectronics</text:p>
          </table:table-cell>
          <table:table-cell office:value-type="float" office:value="4262.21" table:style-name="ce1">
            <text:p>4262.21</text:p>
          </table:table-cell>
          <table:table-cell office:value-type="float" office:value="4533.3100000000004" table:style-name="ce1">
            <text:p>4533.31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611.52" table:style-name="ce1">
            <text:p>611.52</text:p>
          </table:table-cell>
          <table:table-cell office:value-type="string" office:string-value="Low" table:formula="of:=IF([.E341]&gt;[.$E$1003];&quot;High&quot;;&quot;Low&quot;)" table:style-name="ce1">
            <text:p>Low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lectronics</text:p>
          </table:table-cell>
          <table:table-cell office:value-type="float" office:value="1762" table:style-name="ce1">
            <text:p>1762</text:p>
          </table:table-cell>
          <table:table-cell office:value-type="float" office:value="2002.95" table:style-name="ce1">
            <text:p>2002.95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10-18T00:00:00" table:style-name="ce2">
            <text:p>18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5097.4799999999996" table:style-name="ce1">
            <text:p>5097.48</text:p>
          </table:table-cell>
          <table:table-cell office:value-type="string" office:string-value="High" table:formula="of:=IF([.E342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lectronics</text:p>
          </table:table-cell>
          <table:table-cell office:value-type="float" office:value="224.32" table:style-name="ce1">
            <text:p>224.32</text:p>
          </table:table-cell>
          <table:table-cell office:value-type="float" office:value="715.06" table:style-name="ce1">
            <text:p>715.06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4-06T00:00:00" table:style-name="ce2">
            <text:p>06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7212.69" table:style-name="ce1">
            <text:p>7212.69</text:p>
          </table:table-cell>
          <table:table-cell office:value-type="string" office:string-value="High" table:formula="of:=IF([.E343]&gt;[.$E$1003];&quot;High&quot;;&quot;Low&quot;)" table:style-name="ce1">
            <text:p>High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onics</text:p>
          </table:table-cell>
          <table:table-cell office:value-type="float" office:value="3743.59" table:style-name="ce1">
            <text:p>3743.59</text:p>
          </table:table-cell>
          <table:table-cell office:value-type="float" office:value="4116.38" table:style-name="ce1">
            <text:p>4116.38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date" office:date-value="2023-03-29T00:00:00" table:style-name="ce2">
            <text:p>29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8640.14" table:style-name="ce1">
            <text:p>8640.14</text:p>
          </table:table-cell>
          <table:table-cell office:value-type="string" office:string-value="High" table:formula="of:=IF([.E344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urniture</text:p>
          </table:table-cell>
          <table:table-cell office:value-type="float" office:value="4020.09" table:style-name="ce1">
            <text:p>4020.09</text:p>
          </table:table-cell>
          <table:table-cell office:value-type="float" office:value="4087.91" table:style-name="ce1">
            <text:p>4087.91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03-19T00:00:00" table:style-name="ce2">
            <text:p>19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1874.63" table:style-name="ce1">
            <text:p>1874.63</text:p>
          </table:table-cell>
          <table:table-cell office:value-type="string" office:string-value="Low" table:formula="of:=IF([.E345]&gt;[.$E$1003];&quot;High&quot;;&quot;Low&quot;)" table:style-name="ce1">
            <text:p>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othing</text:p>
          </table:table-cell>
          <table:table-cell office:value-type="float" office:value="844.94" table:style-name="ce1">
            <text:p>844.94</text:p>
          </table:table-cell>
          <table:table-cell office:value-type="float" office:value="1225.6400000000001" table:style-name="ce1">
            <text:p>1225.64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10-15T00:00:00" table:style-name="ce2">
            <text:p>15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8020.03" table:style-name="ce1">
            <text:p>8020.03</text:p>
          </table:table-cell>
          <table:table-cell office:value-type="string" office:string-value="High" table:formula="of:=IF([.E346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lothing</text:p>
          </table:table-cell>
          <table:table-cell office:value-type="float" office:value="2709.84" table:style-name="ce1">
            <text:p>2709.84</text:p>
          </table:table-cell>
          <table:table-cell office:value-type="float" office:value="2766.51" table:style-name="ce1">
            <text:p>2766.51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04-30T00:00:00" table:style-name="ce2">
            <text:p>30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5571.8" table:style-name="ce1">
            <text:p>5571.8</text:p>
          </table:table-cell>
          <table:table-cell office:value-type="string" office:string-value="High" table:formula="of:=IF([.E347]&gt;[.$E$1003];&quot;High&quot;;&quot;Low&quot;)" table:style-name="ce1">
            <text:p>Hig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od</text:p>
          </table:table-cell>
          <table:table-cell office:value-type="float" office:value="1000.18" table:style-name="ce1">
            <text:p>1000.18</text:p>
          </table:table-cell>
          <table:table-cell office:value-type="float" office:value="1023.64" table:style-name="ce1">
            <text:p>1023.64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10-29T00:00:00" table:style-name="ce2">
            <text:p>29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025.88" table:style-name="ce1">
            <text:p>4025.88</text:p>
          </table:table-cell>
          <table:table-cell office:value-type="string" office:string-value="Low" table:formula="of:=IF([.E348]&gt;[.$E$1003];&quot;High&quot;;&quot;Low&quot;)" table:style-name="ce1">
            <text:p>Lo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lothing</text:p>
          </table:table-cell>
          <table:table-cell office:value-type="float" office:value="3610.21" table:style-name="ce1">
            <text:p>3610.21</text:p>
          </table:table-cell>
          <table:table-cell office:value-type="float" office:value="3817.99" table:style-name="ce1">
            <text:p>3817.99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06-14T00:00:00" table:style-name="ce2">
            <text:p>14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1403.98" table:style-name="ce1">
            <text:p>1403.98</text:p>
          </table:table-cell>
          <table:table-cell office:value-type="string" office:string-value="Low" table:formula="of:=IF([.E349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lothing</text:p>
          </table:table-cell>
          <table:table-cell office:value-type="float" office:value="1394.17" table:style-name="ce1">
            <text:p>1394.17</text:p>
          </table:table-cell>
          <table:table-cell office:value-type="float" office:value="1891.02" table:style-name="ce1">
            <text:p>1891.02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7-01T00:00:00" table:style-name="ce2">
            <text:p>01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8666.43" table:style-name="ce1">
            <text:p>8666.43</text:p>
          </table:table-cell>
          <table:table-cell office:value-type="string" office:string-value="High" table:formula="of:=IF([.E350]&gt;[.$E$1003];&quot;High&quot;;&quot;Low&quot;)" table:style-name="ce1">
            <text:p>Hig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othing</text:p>
          </table:table-cell>
          <table:table-cell office:value-type="float" office:value="1615.26" table:style-name="ce1">
            <text:p>1615.26</text:p>
          </table:table-cell>
          <table:table-cell office:value-type="float" office:value="1710.95" table:style-name="ce1">
            <text:p>1710.95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8-11T00:00:00" table:style-name="ce2">
            <text:p>11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1657" table:style-name="ce1">
            <text:p>1657</text:p>
          </table:table-cell>
          <table:table-cell office:value-type="string" office:string-value="Low" table:formula="of:=IF([.E351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lothing</text:p>
          </table:table-cell>
          <table:table-cell office:value-type="float" office:value="4232.6099999999997" table:style-name="ce1">
            <text:p>4232.61</text:p>
          </table:table-cell>
          <table:table-cell office:value-type="float" office:value="4572.21" table:style-name="ce1">
            <text:p>4572.21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3166.9" table:style-name="ce1">
            <text:p>3166.9</text:p>
          </table:table-cell>
          <table:table-cell office:value-type="string" office:string-value="Low" table:formula="of:=IF([.E352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ood</text:p>
          </table:table-cell>
          <table:table-cell office:value-type="float" office:value="2407.8000000000002" table:style-name="ce1">
            <text:p>2407.8</text:p>
          </table:table-cell>
          <table:table-cell office:value-type="float" office:value="2502.7600000000002" table:style-name="ce1">
            <text:p>2502.76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01-07T00:00:00" table:style-name="ce2">
            <text:p>07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2971.45" table:style-name="ce1">
            <text:p>2971.45</text:p>
          </table:table-cell>
          <table:table-cell office:value-type="string" office:string-value="Low" table:formula="of:=IF([.E353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urniture</text:p>
          </table:table-cell>
          <table:table-cell office:value-type="float" office:value="3365.28" table:style-name="ce1">
            <text:p>3365.28</text:p>
          </table:table-cell>
          <table:table-cell office:value-type="float" office:value="3730.43" table:style-name="ce1">
            <text:p>3730.43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11-26T00:00:00" table:style-name="ce2">
            <text:p>26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8727" table:style-name="ce1">
            <text:p>8727</text:p>
          </table:table-cell>
          <table:table-cell office:value-type="string" office:string-value="High" table:formula="of:=IF([.E354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lectronics</text:p>
          </table:table-cell>
          <table:table-cell office:value-type="float" office:value="2041.75" table:style-name="ce1">
            <text:p>2041.75</text:p>
          </table:table-cell>
          <table:table-cell office:value-type="float" office:value="2299.37" table:style-name="ce1">
            <text:p>2299.37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date" office:date-value="2023-09-20T00:00:00" table:style-name="ce2">
            <text:p>20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759.76" table:style-name="ce1">
            <text:p>6759.76</text:p>
          </table:table-cell>
          <table:table-cell office:value-type="string" office:string-value="High" table:formula="of:=IF([.E355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1525.13" table:style-name="ce1">
            <text:p>1525.13</text:p>
          </table:table-cell>
          <table:table-cell office:value-type="float" office:value="1868.32" table:style-name="ce1">
            <text:p>1868.32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06-10T00:00:00" table:style-name="ce2">
            <text:p>10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7987.15" table:style-name="ce1">
            <text:p>7987.15</text:p>
          </table:table-cell>
          <table:table-cell office:value-type="string" office:string-value="High" table:formula="of:=IF([.E356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rniture</text:p>
          </table:table-cell>
          <table:table-cell office:value-type="float" office:value="3146.12" table:style-name="ce1">
            <text:p>3146.12</text:p>
          </table:table-cell>
          <table:table-cell office:value-type="float" office:value="3255.5299999999902" table:style-name="ce1">
            <text:p>3255.53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date" office:date-value="2023-05-31T00:00:00" table:style-name="ce2">
            <text:p>31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2579.63" table:style-name="ce1">
            <text:p>2579.63</text:p>
          </table:table-cell>
          <table:table-cell office:value-type="string" office:string-value="Low" table:formula="of:=IF([.E357]&gt;[.$E$1003];&quot;High&quot;;&quot;Low&quot;)" table:style-name="ce1">
            <text:p>Lo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lothing</text:p>
          </table:table-cell>
          <table:table-cell office:value-type="float" office:value="816.54" table:style-name="ce1">
            <text:p>816.54</text:p>
          </table:table-cell>
          <table:table-cell office:value-type="float" office:value="1191.9000000000001" table:style-name="ce1">
            <text:p>1191.9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date" office:date-value="2023-03-26T00:00:00" table:style-name="ce2">
            <text:p>26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286.25" table:style-name="ce1">
            <text:p>6286.25</text:p>
          </table:table-cell>
          <table:table-cell office:value-type="string" office:string-value="High" table:formula="of:=IF([.E358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othing</text:p>
          </table:table-cell>
          <table:table-cell office:value-type="float" office:value="1896.35" table:style-name="ce1">
            <text:p>1896.35</text:p>
          </table:table-cell>
          <table:table-cell office:value-type="float" office:value="2394.1999999999998" table:style-name="ce1">
            <text:p>2394.2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05-27T00:00:00" table:style-name="ce2">
            <text:p>27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5760.29" table:style-name="ce1">
            <text:p>5760.29</text:p>
          </table:table-cell>
          <table:table-cell office:value-type="string" office:string-value="High" table:formula="of:=IF([.E359]&gt;[.$E$1003];&quot;High&quot;;&quot;Low&quot;)" table:style-name="ce1">
            <text:p>High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lectronics</text:p>
          </table:table-cell>
          <table:table-cell office:value-type="float" office:value="1084.73" table:style-name="ce1">
            <text:p>1084.73</text:p>
          </table:table-cell>
          <table:table-cell office:value-type="float" office:value="1420.9" table:style-name="ce1">
            <text:p>1420.9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04-22T00:00:00" table:style-name="ce2">
            <text:p>22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8345.02" table:style-name="ce1">
            <text:p>8345.02</text:p>
          </table:table-cell>
          <table:table-cell office:value-type="string" office:string-value="High" table:formula="of:=IF([.E360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lectronics</text:p>
          </table:table-cell>
          <table:table-cell office:value-type="float" office:value="3494.19" table:style-name="ce1">
            <text:p>3494.19</text:p>
          </table:table-cell>
          <table:table-cell office:value-type="float" office:value="3746" table:style-name="ce1">
            <text:p>3746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02-05T00:00:00" table:style-name="ce2">
            <text:p>05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9070.26" table:style-name="ce1">
            <text:p>9070.26</text:p>
          </table:table-cell>
          <table:table-cell office:value-type="string" office:string-value="High" table:formula="of:=IF([.E361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lectronics</text:p>
          </table:table-cell>
          <table:table-cell office:value-type="float" office:value="4723.83" table:style-name="ce1">
            <text:p>4723.83</text:p>
          </table:table-cell>
          <table:table-cell office:value-type="float" office:value="5186.1899999999996" table:style-name="ce1">
            <text:p>5186.19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10-12T00:00:00" table:style-name="ce2">
            <text:p>12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220.35" table:style-name="ce1">
            <text:p>220.35</text:p>
          </table:table-cell>
          <table:table-cell office:value-type="string" office:string-value="Low" table:formula="of:=IF([.E362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4977.78" table:style-name="ce1">
            <text:p>4977.78</text:p>
          </table:table-cell>
          <table:table-cell office:value-type="float" office:value="4995.55" table:style-name="ce1">
            <text:p>4995.55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07-07T00:00:00" table:style-name="ce2">
            <text:p>07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6772.8" table:style-name="ce1">
            <text:p>6772.8</text:p>
          </table:table-cell>
          <table:table-cell office:value-type="string" office:string-value="High" table:formula="of:=IF([.E363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lothing</text:p>
          </table:table-cell>
          <table:table-cell office:value-type="float" office:value="2278.87" table:style-name="ce1">
            <text:p>2278.87</text:p>
          </table:table-cell>
          <table:table-cell office:value-type="float" office:value="2646.5299999999902" table:style-name="ce1">
            <text:p>2646.53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03-23T00:00:00" table:style-name="ce2">
            <text:p>23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13.16999999999996" table:style-name="ce1">
            <text:p>613.17</text:p>
          </table:table-cell>
          <table:table-cell office:value-type="string" office:string-value="Low" table:formula="of:=IF([.E364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lothing</text:p>
          </table:table-cell>
          <table:table-cell office:value-type="float" office:value="1300.03" table:style-name="ce1">
            <text:p>1300.03</text:p>
          </table:table-cell>
          <table:table-cell office:value-type="float" office:value="1745.52" table:style-name="ce1">
            <text:p>1745.52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date" office:date-value="2023-01-02T00:00:00" table:style-name="ce2">
            <text:p>02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5533.7" table:style-name="ce1">
            <text:p>5533.7</text:p>
          </table:table-cell>
          <table:table-cell office:value-type="string" office:string-value="High" table:formula="of:=IF([.E365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lectronics</text:p>
          </table:table-cell>
          <table:table-cell office:value-type="float" office:value="2242.0100000000002" table:style-name="ce1">
            <text:p>2242.01</text:p>
          </table:table-cell>
          <table:table-cell office:value-type="float" office:value="2282.23" table:style-name="ce1">
            <text:p>2282.23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2947.56" table:style-name="ce1">
            <text:p>2947.56</text:p>
          </table:table-cell>
          <table:table-cell office:value-type="string" office:string-value="Low" table:formula="of:=IF([.E366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ood</text:p>
          </table:table-cell>
          <table:table-cell office:value-type="float" office:value="4243.9799999999996" table:style-name="ce1">
            <text:p>4243.98</text:p>
          </table:table-cell>
          <table:table-cell office:value-type="float" office:value="4474.5099999999902" table:style-name="ce1">
            <text:p>4474.51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7-16T00:00:00" table:style-name="ce2">
            <text:p>16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137.09" table:style-name="ce1">
            <text:p>3137.09</text:p>
          </table:table-cell>
          <table:table-cell office:value-type="string" office:string-value="Low" table:formula="of:=IF([.E367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urniture</text:p>
          </table:table-cell>
          <table:table-cell office:value-type="float" office:value="1069.73" table:style-name="ce1">
            <text:p>1069.73</text:p>
          </table:table-cell>
          <table:table-cell office:value-type="float" office:value="1180.04" table:style-name="ce1">
            <text:p>1180.04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01-11T00:00:00" table:style-name="ce2">
            <text:p>11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3594.29" table:style-name="ce1">
            <text:p>3594.29</text:p>
          </table:table-cell>
          <table:table-cell office:value-type="string" office:string-value="Low" table:formula="of:=IF([.E368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od</text:p>
          </table:table-cell>
          <table:table-cell office:value-type="float" office:value="4762.87" table:style-name="ce1">
            <text:p>4762.87</text:p>
          </table:table-cell>
          <table:table-cell office:value-type="float" office:value="5050.46" table:style-name="ce1">
            <text:p>5050.46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8-22T00:00:00" table:style-name="ce2">
            <text:p>22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250.8" table:style-name="ce1">
            <text:p>6250.8</text:p>
          </table:table-cell>
          <table:table-cell office:value-type="string" office:string-value="High" table:formula="of:=IF([.E369]&gt;[.$E$1003];&quot;High&quot;;&quot;Low&quot;)" table:style-name="ce1">
            <text:p>High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lothing</text:p>
          </table:table-cell>
          <table:table-cell office:value-type="float" office:value="1742.24" table:style-name="ce1">
            <text:p>1742.24</text:p>
          </table:table-cell>
          <table:table-cell office:value-type="float" office:value="2070.52" table:style-name="ce1">
            <text:p>2070.52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07-14T00:00:00" table:style-name="ce2">
            <text:p>14/07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3407.09" table:style-name="ce1">
            <text:p>3407.09</text:p>
          </table:table-cell>
          <table:table-cell office:value-type="string" office:string-value="Low" table:formula="of:=IF([.E370]&gt;[.$E$1003];&quot;High&quot;;&quot;Low&quot;)" table:style-name="ce1">
            <text:p>Low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lothing</text:p>
          </table:table-cell>
          <table:table-cell office:value-type="float" office:value="4929.7299999999996" table:style-name="ce1">
            <text:p>4929.73</text:p>
          </table:table-cell>
          <table:table-cell office:value-type="float" office:value="5088.0199999999904" table:style-name="ce1">
            <text:p>5088.02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04-29T00:00:00" table:style-name="ce2">
            <text:p>29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7353.72" table:style-name="ce1">
            <text:p>7353.72</text:p>
          </table:table-cell>
          <table:table-cell office:value-type="string" office:string-value="High" table:formula="of:=IF([.E371]&gt;[.$E$1003];&quot;High&quot;;&quot;Low&quot;)" table:style-name="ce1">
            <text:p>High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ood</text:p>
          </table:table-cell>
          <table:table-cell office:value-type="float" office:value="4201.1099999999997" table:style-name="ce1">
            <text:p>4201.11</text:p>
          </table:table-cell>
          <table:table-cell office:value-type="float" office:value="4436.5" table:style-name="ce1">
            <text:p>4436.5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date" office:date-value="2023-01-20T00:00:00" table:style-name="ce2">
            <text:p>20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4104.82" table:style-name="ce1">
            <text:p>4104.82</text:p>
          </table:table-cell>
          <table:table-cell office:value-type="string" office:string-value="Low" table:formula="of:=IF([.E372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lothing</text:p>
          </table:table-cell>
          <table:table-cell office:value-type="float" office:value="4052.42" table:style-name="ce1">
            <text:p>4052.42</text:p>
          </table:table-cell>
          <table:table-cell office:value-type="float" office:value="4199.3" table:style-name="ce1">
            <text:p>4199.3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date" office:date-value="2023-09-18T00:00:00" table:style-name="ce2">
            <text:p>18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776.7" table:style-name="ce1">
            <text:p>776.7</text:p>
          </table:table-cell>
          <table:table-cell office:value-type="string" office:string-value="Low" table:formula="of:=IF([.E373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urniture</text:p>
          </table:table-cell>
          <table:table-cell office:value-type="float" office:value="1623.63" table:style-name="ce1">
            <text:p>1623.63</text:p>
          </table:table-cell>
          <table:table-cell office:value-type="float" office:value="1814.63" table:style-name="ce1">
            <text:p>1814.63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7859.22" table:style-name="ce1">
            <text:p>7859.22</text:p>
          </table:table-cell>
          <table:table-cell office:value-type="string" office:string-value="High" table:formula="of:=IF([.E374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lothing</text:p>
          </table:table-cell>
          <table:table-cell office:value-type="float" office:value="93.45" table:style-name="ce1">
            <text:p>93.45</text:p>
          </table:table-cell>
          <table:table-cell office:value-type="float" office:value="181.62" table:style-name="ce1">
            <text:p>181.62</text:p>
          </table:table-cell>
          <table:table-cell office:value-type="string" table:style-name="ce1">
            <text:p>Returnin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date" office:date-value="2023-09-13T00:00:00" table:style-name="ce2">
            <text:p>13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2929.01" table:style-name="ce1">
            <text:p>2929.01</text:p>
          </table:table-cell>
          <table:table-cell office:value-type="string" office:string-value="Low" table:formula="of:=IF([.E375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urniture</text:p>
          </table:table-cell>
          <table:table-cell office:value-type="float" office:value="1941.56" table:style-name="ce1">
            <text:p>1941.56</text:p>
          </table:table-cell>
          <table:table-cell office:value-type="float" office:value="2385.48" table:style-name="ce1">
            <text:p>2385.48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8-10T00:00:00" table:style-name="ce2">
            <text:p>10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4384.3900000000003" table:style-name="ce1">
            <text:p>4384.39</text:p>
          </table:table-cell>
          <table:table-cell office:value-type="string" office:string-value="Low" table:formula="of:=IF([.E376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ood</text:p>
          </table:table-cell>
          <table:table-cell office:value-type="float" office:value="1543.96" table:style-name="ce1">
            <text:p>1543.96</text:p>
          </table:table-cell>
          <table:table-cell office:value-type="float" office:value="1558.87" table:style-name="ce1">
            <text:p>1558.87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08-14T00:00:00" table:style-name="ce2">
            <text:p>14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6885.89" table:style-name="ce1">
            <text:p>6885.89</text:p>
          </table:table-cell>
          <table:table-cell office:value-type="string" office:string-value="High" table:formula="of:=IF([.E377]&gt;[.$E$1003];&quot;High&quot;;&quot;Low&quot;)" table:style-name="ce1">
            <text:p>Hig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ood</text:p>
          </table:table-cell>
          <table:table-cell office:value-type="float" office:value="235.12" table:style-name="ce1">
            <text:p>235.12</text:p>
          </table:table-cell>
          <table:table-cell office:value-type="float" office:value="677.5" table:style-name="ce1">
            <text:p>677.5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date" office:date-value="2023-02-22T00:00:00" table:style-name="ce2">
            <text:p>22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391.32" table:style-name="ce1">
            <text:p>3391.32</text:p>
          </table:table-cell>
          <table:table-cell office:value-type="string" office:string-value="Low" table:formula="of:=IF([.E378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lothing</text:p>
          </table:table-cell>
          <table:table-cell office:value-type="float" office:value="2551.56" table:style-name="ce1">
            <text:p>2551.56</text:p>
          </table:table-cell>
          <table:table-cell office:value-type="float" office:value="2841.68" table:style-name="ce1">
            <text:p>2841.68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12-21T00:00:00" table:style-name="ce2">
            <text:p>21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660.2" table:style-name="ce1">
            <text:p>660.2</text:p>
          </table:table-cell>
          <table:table-cell office:value-type="string" office:string-value="Low" table:formula="of:=IF([.E379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urniture</text:p>
          </table:table-cell>
          <table:table-cell office:value-type="float" office:value="2045" table:style-name="ce1">
            <text:p>2045</text:p>
          </table:table-cell>
          <table:table-cell office:value-type="float" office:value="2217.5100000000002" table:style-name="ce1">
            <text:p>2217.51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12-08T00:00:00" table:style-name="ce2">
            <text:p>08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3801.82" table:style-name="ce1">
            <text:p>3801.82</text:p>
          </table:table-cell>
          <table:table-cell office:value-type="string" office:string-value="Low" table:formula="of:=IF([.E380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othing</text:p>
          </table:table-cell>
          <table:table-cell office:value-type="float" office:value="3191.05" table:style-name="ce1">
            <text:p>3191.05</text:p>
          </table:table-cell>
          <table:table-cell office:value-type="float" office:value="3555.35" table:style-name="ce1">
            <text:p>3555.35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12-30T00:00:00" table:style-name="ce2">
            <text:p>30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9450.0400000000009" table:style-name="ce1">
            <text:p>9450.04</text:p>
          </table:table-cell>
          <table:table-cell office:value-type="string" office:string-value="High" table:formula="of:=IF([.E381]&gt;[.$E$1003];&quot;High&quot;;&quot;Low&quot;)" table:style-name="ce1">
            <text:p>High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lectronics</text:p>
          </table:table-cell>
          <table:table-cell office:value-type="float" office:value="3124.87" table:style-name="ce1">
            <text:p>3124.87</text:p>
          </table:table-cell>
          <table:table-cell office:value-type="float" office:value="3383.67" table:style-name="ce1">
            <text:p>3383.67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10-07T00:00:00" table:style-name="ce2">
            <text:p>07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6453.17" table:style-name="ce1">
            <text:p>6453.17</text:p>
          </table:table-cell>
          <table:table-cell office:value-type="string" office:string-value="High" table:formula="of:=IF([.E382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647.70000000000005" table:style-name="ce1">
            <text:p>647.7</text:p>
          </table:table-cell>
          <table:table-cell office:value-type="float" office:value="902.26" table:style-name="ce1">
            <text:p>902.26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date" office:date-value="2023-03-22T00:00:00" table:style-name="ce2">
            <text:p>22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6747.64" table:style-name="ce1">
            <text:p>6747.64</text:p>
          </table:table-cell>
          <table:table-cell office:value-type="string" office:string-value="High" table:formula="of:=IF([.E383]&gt;[.$E$1003];&quot;High&quot;;&quot;Low&quot;)" table:style-name="ce1">
            <text:p>Hig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lectronics</text:p>
          </table:table-cell>
          <table:table-cell office:value-type="float" office:value="4885.9799999999996" table:style-name="ce1">
            <text:p>4885.98</text:p>
          </table:table-cell>
          <table:table-cell office:value-type="float" office:value="4949.95" table:style-name="ce1">
            <text:p>4949.95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07-21T00:00:00" table:style-name="ce2">
            <text:p>21/07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359.59" table:style-name="ce1">
            <text:p>6359.59</text:p>
          </table:table-cell>
          <table:table-cell office:value-type="string" office:string-value="High" table:formula="of:=IF([.E384]&gt;[.$E$1003];&quot;High&quot;;&quot;Low&quot;)" table:style-name="ce1">
            <text:p>High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onics</text:p>
          </table:table-cell>
          <table:table-cell office:value-type="float" office:value="975.31" table:style-name="ce1">
            <text:p>975.31</text:p>
          </table:table-cell>
          <table:table-cell office:value-type="float" office:value="1176.17" table:style-name="ce1">
            <text:p>1176.17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date" office:date-value="2023-06-07T00:00:00" table:style-name="ce2">
            <text:p>07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070.02" table:style-name="ce1">
            <text:p>2070.02</text:p>
          </table:table-cell>
          <table:table-cell office:value-type="string" office:string-value="Low" table:formula="of:=IF([.E385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lothing</text:p>
          </table:table-cell>
          <table:table-cell office:value-type="float" office:value="2254.11" table:style-name="ce1">
            <text:p>2254.11</text:p>
          </table:table-cell>
          <table:table-cell office:value-type="float" office:value="2382.23" table:style-name="ce1">
            <text:p>2382.23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04-30T00:00:00" table:style-name="ce2">
            <text:p>30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4241.51" table:style-name="ce1">
            <text:p>4241.51</text:p>
          </table:table-cell>
          <table:table-cell office:value-type="string" office:string-value="Low" table:formula="of:=IF([.E386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lectronics</text:p>
          </table:table-cell>
          <table:table-cell office:value-type="float" office:value="2466.1799999999998" table:style-name="ce1">
            <text:p>2466.18</text:p>
          </table:table-cell>
          <table:table-cell office:value-type="float" office:value="2483.87" table:style-name="ce1">
            <text:p>2483.87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02-28T00:00:00" table:style-name="ce2">
            <text:p>28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7534.3" table:style-name="ce1">
            <text:p>7534.3</text:p>
          </table:table-cell>
          <table:table-cell office:value-type="string" office:string-value="High" table:formula="of:=IF([.E387]&gt;[.$E$1003];&quot;High&quot;;&quot;Low&quot;)" table:style-name="ce1">
            <text:p>Hig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urniture</text:p>
          </table:table-cell>
          <table:table-cell office:value-type="float" office:value="4074.66" table:style-name="ce1">
            <text:p>4074.66</text:p>
          </table:table-cell>
          <table:table-cell office:value-type="float" office:value="4261.1099999999997" table:style-name="ce1">
            <text:p>4261.11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103.5899999999999" table:style-name="ce1">
            <text:p>1103.59</text:p>
          </table:table-cell>
          <table:table-cell office:value-type="string" office:string-value="Low" table:formula="of:=IF([.E388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ood</text:p>
          </table:table-cell>
          <table:table-cell office:value-type="float" office:value="541.19000000000005" table:style-name="ce1">
            <text:p>541.19</text:p>
          </table:table-cell>
          <table:table-cell office:value-type="float" office:value="595.20000000000005" table:style-name="ce1">
            <text:p>595.2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5-08T00:00:00" table:style-name="ce2">
            <text:p>08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2850.74" table:style-name="ce1">
            <text:p>2850.74</text:p>
          </table:table-cell>
          <table:table-cell office:value-type="string" office:string-value="Low" table:formula="of:=IF([.E389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ood</text:p>
          </table:table-cell>
          <table:table-cell office:value-type="float" office:value="2171.79" table:style-name="ce1">
            <text:p>2171.79</text:p>
          </table:table-cell>
          <table:table-cell office:value-type="float" office:value="2307.64" table:style-name="ce1">
            <text:p>2307.64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date" office:date-value="2023-08-12T00:00:00" table:style-name="ce2">
            <text:p>12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2835.56" table:style-name="ce1">
            <text:p>2835.56</text:p>
          </table:table-cell>
          <table:table-cell office:value-type="string" office:string-value="Low" table:formula="of:=IF([.E390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3161.09" table:style-name="ce1">
            <text:p>3161.09</text:p>
          </table:table-cell>
          <table:table-cell office:value-type="float" office:value="3216.42" table:style-name="ce1">
            <text:p>3216.42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07-28T00:00:00" table:style-name="ce2">
            <text:p>28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376.99" table:style-name="ce1">
            <text:p>4376.99</text:p>
          </table:table-cell>
          <table:table-cell office:value-type="string" office:string-value="Low" table:formula="of:=IF([.E391]&gt;[.$E$1003];&quot;High&quot;;&quot;Low&quot;)" table:style-name="ce1">
            <text:p>Low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lectronics</text:p>
          </table:table-cell>
          <table:table-cell office:value-type="float" office:value="1115.02" table:style-name="ce1">
            <text:p>1115.02</text:p>
          </table:table-cell>
          <table:table-cell office:value-type="float" office:value="1174.48" table:style-name="ce1">
            <text:p>1174.48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04-25T00:00:00" table:style-name="ce2">
            <text:p>25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9805.65" table:style-name="ce1">
            <text:p>9805.65</text:p>
          </table:table-cell>
          <table:table-cell office:value-type="string" office:string-value="High" table:formula="of:=IF([.E392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lectronics</text:p>
          </table:table-cell>
          <table:table-cell office:value-type="float" office:value="3155.97" table:style-name="ce1">
            <text:p>3155.97</text:p>
          </table:table-cell>
          <table:table-cell office:value-type="float" office:value="3263.49" table:style-name="ce1">
            <text:p>3263.49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07-28T00:00:00" table:style-name="ce2">
            <text:p>28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768.28" table:style-name="ce1">
            <text:p>768.28</text:p>
          </table:table-cell>
          <table:table-cell office:value-type="string" office:string-value="Low" table:formula="of:=IF([.E393]&gt;[.$E$1003];&quot;High&quot;;&quot;Low&quot;)" table:style-name="ce1">
            <text:p>Low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othing</text:p>
          </table:table-cell>
          <table:table-cell office:value-type="float" office:value="4622.1400000000003" table:style-name="ce1">
            <text:p>4622.14</text:p>
          </table:table-cell>
          <table:table-cell office:value-type="float" office:value="5122.07" table:style-name="ce1">
            <text:p>5122.07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1-14T00:00:00" table:style-name="ce2">
            <text:p>14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5235.1400000000003" table:style-name="ce1">
            <text:p>5235.14</text:p>
          </table:table-cell>
          <table:table-cell office:value-type="string" office:string-value="High" table:formula="of:=IF([.E394]&gt;[.$E$1003];&quot;High&quot;;&quot;Low&quot;)" table:style-name="ce1">
            <text:p>Hig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ood</text:p>
          </table:table-cell>
          <table:table-cell office:value-type="float" office:value="4987.71" table:style-name="ce1">
            <text:p>4987.71</text:p>
          </table:table-cell>
          <table:table-cell office:value-type="float" office:value="4998.78" table:style-name="ce1">
            <text:p>4998.78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1-09T00:00:00" table:style-name="ce2">
            <text:p>09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1875.71" table:style-name="ce1">
            <text:p>1875.71</text:p>
          </table:table-cell>
          <table:table-cell office:value-type="string" office:string-value="Low" table:formula="of:=IF([.E395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lectronics</text:p>
          </table:table-cell>
          <table:table-cell office:value-type="float" office:value="210.63" table:style-name="ce1">
            <text:p>210.63</text:p>
          </table:table-cell>
          <table:table-cell office:value-type="float" office:value="533.57999999999902" table:style-name="ce1">
            <text:p>533.58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date" office:date-value="2023-02-09T00:00:00" table:style-name="ce2">
            <text:p>09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9709.7000000000007" table:style-name="ce1">
            <text:p>9709.7</text:p>
          </table:table-cell>
          <table:table-cell office:value-type="string" office:string-value="High" table:formula="of:=IF([.E396]&gt;[.$E$1003];&quot;High&quot;;&quot;Low&quot;)" table:style-name="ce1">
            <text:p>Hig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urniture</text:p>
          </table:table-cell>
          <table:table-cell office:value-type="float" office:value="1216.1600000000001" table:style-name="ce1">
            <text:p>1216.16</text:p>
          </table:table-cell>
          <table:table-cell office:value-type="float" office:value="1295.3699999999999" table:style-name="ce1">
            <text:p>1295.37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8-25T00:00:00" table:style-name="ce2">
            <text:p>25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1221.7" table:style-name="ce1">
            <text:p>1221.7</text:p>
          </table:table-cell>
          <table:table-cell office:value-type="string" office:string-value="Low" table:formula="of:=IF([.E397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lectronics</text:p>
          </table:table-cell>
          <table:table-cell office:value-type="float" office:value="1586.02" table:style-name="ce1">
            <text:p>1586.02</text:p>
          </table:table-cell>
          <table:table-cell office:value-type="float" office:value="2047.13" table:style-name="ce1">
            <text:p>2047.13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10-08T00:00:00" table:style-name="ce2">
            <text:p>08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4095.65" table:style-name="ce1">
            <text:p>4095.65</text:p>
          </table:table-cell>
          <table:table-cell office:value-type="string" office:string-value="Low" table:formula="of:=IF([.E398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ood</text:p>
          </table:table-cell>
          <table:table-cell office:value-type="float" office:value="2025.67" table:style-name="ce1">
            <text:p>2025.67</text:p>
          </table:table-cell>
          <table:table-cell office:value-type="float" office:value="2081.5500000000002" table:style-name="ce1">
            <text:p>2081.55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12-25T00:00:00" table:style-name="ce2">
            <text:p>25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405.06" table:style-name="ce1">
            <text:p>7405.06</text:p>
          </table:table-cell>
          <table:table-cell office:value-type="string" office:string-value="High" table:formula="of:=IF([.E399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lectronics</text:p>
          </table:table-cell>
          <table:table-cell office:value-type="float" office:value="1249.17" table:style-name="ce1">
            <text:p>1249.17</text:p>
          </table:table-cell>
          <table:table-cell office:value-type="float" office:value="1727.15" table:style-name="ce1">
            <text:p>1727.15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7-20T00:00:00" table:style-name="ce2">
            <text:p>20/07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7075.09" table:style-name="ce1">
            <text:p>7075.09</text:p>
          </table:table-cell>
          <table:table-cell office:value-type="string" office:string-value="High" table:formula="of:=IF([.E400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ood</text:p>
          </table:table-cell>
          <table:table-cell office:value-type="float" office:value="1057.27" table:style-name="ce1">
            <text:p>1057.27</text:p>
          </table:table-cell>
          <table:table-cell office:value-type="float" office:value="1366.62" table:style-name="ce1">
            <text:p>1366.62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9-03T00:00:00" table:style-name="ce2">
            <text:p>03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285.01" table:style-name="ce1">
            <text:p>4285.01</text:p>
          </table:table-cell>
          <table:table-cell office:value-type="string" office:string-value="Low" table:formula="of:=IF([.E401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onics</text:p>
          </table:table-cell>
          <table:table-cell office:value-type="float" office:value="4775.04" table:style-name="ce1">
            <text:p>4775.04</text:p>
          </table:table-cell>
          <table:table-cell office:value-type="float" office:value="4785.66" table:style-name="ce1">
            <text:p>4785.66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date" office:date-value="2023-10-05T00:00:00" table:style-name="ce2">
            <text:p>05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530.59" table:style-name="ce1">
            <text:p>3530.59</text:p>
          </table:table-cell>
          <table:table-cell office:value-type="string" office:string-value="Low" table:formula="of:=IF([.E402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urniture</text:p>
          </table:table-cell>
          <table:table-cell office:value-type="float" office:value="4596.68" table:style-name="ce1">
            <text:p>4596.68</text:p>
          </table:table-cell>
          <table:table-cell office:value-type="float" office:value="5044.74" table:style-name="ce1">
            <text:p>5044.74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8-23T00:00:00" table:style-name="ce2">
            <text:p>23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4036.36" table:style-name="ce1">
            <text:p>4036.36</text:p>
          </table:table-cell>
          <table:table-cell office:value-type="string" office:string-value="Low" table:formula="of:=IF([.E403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float" office:value="282.61" table:style-name="ce1">
            <text:p>282.61</text:p>
          </table:table-cell>
          <table:table-cell office:value-type="float" office:value="548.25" table:style-name="ce1">
            <text:p>548.25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1-04T00:00:00" table:style-name="ce2">
            <text:p>04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2716.34" table:style-name="ce1">
            <text:p>2716.34</text:p>
          </table:table-cell>
          <table:table-cell office:value-type="string" office:string-value="Low" table:formula="of:=IF([.E404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1727.12" table:style-name="ce1">
            <text:p>1727.12</text:p>
          </table:table-cell>
          <table:table-cell office:value-type="float" office:value="1865.83" table:style-name="ce1">
            <text:p>1865.83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6-03T00:00:00" table:style-name="ce2">
            <text:p>03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132.8000000000002" table:style-name="ce1">
            <text:p>2132.8</text:p>
          </table:table-cell>
          <table:table-cell office:value-type="string" office:string-value="Low" table:formula="of:=IF([.E405]&gt;[.$E$1003];&quot;High&quot;;&quot;Low&quot;)" table:style-name="ce1">
            <text:p>Low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urniture</text:p>
          </table:table-cell>
          <table:table-cell office:value-type="float" office:value="2055.4899999999998" table:style-name="ce1">
            <text:p>2055.49</text:p>
          </table:table-cell>
          <table:table-cell office:value-type="float" office:value="2441.46" table:style-name="ce1">
            <text:p>2441.46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1-29T00:00:00" table:style-name="ce2">
            <text:p>29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4882.09" table:style-name="ce1">
            <text:p>4882.09</text:p>
          </table:table-cell>
          <table:table-cell office:value-type="string" office:string-value="Low" table:formula="of:=IF([.E406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lectronics</text:p>
          </table:table-cell>
          <table:table-cell office:value-type="float" office:value="1233.1199999999999" table:style-name="ce1">
            <text:p>1233.12</text:p>
          </table:table-cell>
          <table:table-cell office:value-type="float" office:value="1697.1899999999901" table:style-name="ce1">
            <text:p>1697.19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4-19T00:00:00" table:style-name="ce2">
            <text:p>19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2758.48" table:style-name="ce1">
            <text:p>2758.48</text:p>
          </table:table-cell>
          <table:table-cell office:value-type="string" office:string-value="Low" table:formula="of:=IF([.E407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urniture</text:p>
          </table:table-cell>
          <table:table-cell office:value-type="float" office:value="3162.92" table:style-name="ce1">
            <text:p>3162.92</text:p>
          </table:table-cell>
          <table:table-cell office:value-type="float" office:value="3409.93" table:style-name="ce1">
            <text:p>3409.93</text:p>
          </table:table-cell>
          <table:table-cell office:value-type="string" table:style-name="ce1">
            <text:p>New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04-08T00:00:00" table:style-name="ce2">
            <text:p>08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2945.87" table:style-name="ce1">
            <text:p>2945.87</text:p>
          </table:table-cell>
          <table:table-cell office:value-type="string" office:string-value="Low" table:formula="of:=IF([.E408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lothing</text:p>
          </table:table-cell>
          <table:table-cell office:value-type="float" office:value="3219.88" table:style-name="ce1">
            <text:p>3219.88</text:p>
          </table:table-cell>
          <table:table-cell office:value-type="float" office:value="3384.5" table:style-name="ce1">
            <text:p>3384.5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601.89" table:style-name="ce1">
            <text:p>6601.89</text:p>
          </table:table-cell>
          <table:table-cell office:value-type="string" office:string-value="High" table:formula="of:=IF([.E409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ectronics</text:p>
          </table:table-cell>
          <table:table-cell office:value-type="float" office:value="4260" table:style-name="ce1">
            <text:p>4260</text:p>
          </table:table-cell>
          <table:table-cell office:value-type="float" office:value="4656.58" table:style-name="ce1">
            <text:p>4656.58</text:p>
          </table:table-cell>
          <table:table-cell office:value-type="string" table:style-name="ce1">
            <text:p>New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9688.52" table:style-name="ce1">
            <text:p>9688.52</text:p>
          </table:table-cell>
          <table:table-cell office:value-type="string" office:string-value="High" table:formula="of:=IF([.E410]&gt;[.$E$1003];&quot;High&quot;;&quot;Low&quot;)" table:style-name="ce1">
            <text:p>Hig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lectronics</text:p>
          </table:table-cell>
          <table:table-cell office:value-type="float" office:value="3717.3" table:style-name="ce1">
            <text:p>3717.3</text:p>
          </table:table-cell>
          <table:table-cell office:value-type="float" office:value="4061.37" table:style-name="ce1">
            <text:p>4061.37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3-16T00:00:00" table:style-name="ce2">
            <text:p>16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6076.01" table:style-name="ce1">
            <text:p>6076.01</text:p>
          </table:table-cell>
          <table:table-cell office:value-type="string" office:string-value="High" table:formula="of:=IF([.E411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urniture</text:p>
          </table:table-cell>
          <table:table-cell office:value-type="float" office:value="2735.74" table:style-name="ce1">
            <text:p>2735.74</text:p>
          </table:table-cell>
          <table:table-cell office:value-type="float" office:value="3181.22999999999" table:style-name="ce1">
            <text:p>3181.23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11-22T00:00:00" table:style-name="ce2">
            <text:p>22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862.1" table:style-name="ce1">
            <text:p>862.1</text:p>
          </table:table-cell>
          <table:table-cell office:value-type="string" office:string-value="Low" table:formula="of:=IF([.E412]&gt;[.$E$1003];&quot;High&quot;;&quot;Low&quot;)" table:style-name="ce1">
            <text:p>Low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urniture</text:p>
          </table:table-cell>
          <table:table-cell office:value-type="float" office:value="3285.25" table:style-name="ce1">
            <text:p>3285.25</text:p>
          </table:table-cell>
          <table:table-cell office:value-type="float" office:value="3634.58" table:style-name="ce1">
            <text:p>3634.58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date" office:date-value="2023-05-26T00:00:00" table:style-name="ce2">
            <text:p>26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848.28" table:style-name="ce1">
            <text:p>848.28</text:p>
          </table:table-cell>
          <table:table-cell office:value-type="string" office:string-value="Low" table:formula="of:=IF([.E413]&gt;[.$E$1003];&quot;High&quot;;&quot;Low&quot;)" table:style-name="ce1">
            <text:p>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float" office:value="1406.24" table:style-name="ce1">
            <text:p>1406.24</text:p>
          </table:table-cell>
          <table:table-cell office:value-type="float" office:value="1535.57" table:style-name="ce1">
            <text:p>1535.57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date" office:date-value="2023-05-08T00:00:00" table:style-name="ce2">
            <text:p>08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9519.09" table:style-name="ce1">
            <text:p>9519.09</text:p>
          </table:table-cell>
          <table:table-cell office:value-type="string" office:string-value="High" table:formula="of:=IF([.E414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othing</text:p>
          </table:table-cell>
          <table:table-cell office:value-type="float" office:value="2985.63" table:style-name="ce1">
            <text:p>2985.63</text:p>
          </table:table-cell>
          <table:table-cell office:value-type="float" office:value="3452.14" table:style-name="ce1">
            <text:p>3452.14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12-07T00:00:00" table:style-name="ce2">
            <text:p>07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3043.18" table:style-name="ce1">
            <text:p>3043.18</text:p>
          </table:table-cell>
          <table:table-cell office:value-type="string" office:string-value="Low" table:formula="of:=IF([.E415]&gt;[.$E$1003];&quot;High&quot;;&quot;Low&quot;)" table:style-name="ce1">
            <text:p>Low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urniture</text:p>
          </table:table-cell>
          <table:table-cell office:value-type="float" office:value="2471.67" table:style-name="ce1">
            <text:p>2471.67</text:p>
          </table:table-cell>
          <table:table-cell office:value-type="float" office:value="2533.04" table:style-name="ce1">
            <text:p>2533.04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date" office:date-value="2023-02-11T00:00:00" table:style-name="ce2">
            <text:p>11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1011.46" table:style-name="ce1">
            <text:p>1011.46</text:p>
          </table:table-cell>
          <table:table-cell office:value-type="string" office:string-value="Low" table:formula="of:=IF([.E416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urniture</text:p>
          </table:table-cell>
          <table:table-cell office:value-type="float" office:value="710.06" table:style-name="ce1">
            <text:p>710.06</text:p>
          </table:table-cell>
          <table:table-cell office:value-type="float" office:value="851.349999999999" table:style-name="ce1">
            <text:p>851.35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6030.54" table:style-name="ce1">
            <text:p>6030.54</text:p>
          </table:table-cell>
          <table:table-cell office:value-type="string" office:string-value="High" table:formula="of:=IF([.E417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ood</text:p>
          </table:table-cell>
          <table:table-cell office:value-type="float" office:value="1250.5899999999999" table:style-name="ce1">
            <text:p>1250.59</text:p>
          </table:table-cell>
          <table:table-cell office:value-type="float" office:value="1515.48999999999" table:style-name="ce1">
            <text:p>1515.49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2-10T00:00:00" table:style-name="ce2">
            <text:p>10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274.12" table:style-name="ce1">
            <text:p>6274.12</text:p>
          </table:table-cell>
          <table:table-cell office:value-type="string" office:string-value="High" table:formula="of:=IF([.E418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othing</text:p>
          </table:table-cell>
          <table:table-cell office:value-type="float" office:value="1493.88" table:style-name="ce1">
            <text:p>1493.88</text:p>
          </table:table-cell>
          <table:table-cell office:value-type="float" office:value="1781.09" table:style-name="ce1">
            <text:p>1781.09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02-03T00:00:00" table:style-name="ce2">
            <text:p>03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6520.2" table:style-name="ce1">
            <text:p>6520.2</text:p>
          </table:table-cell>
          <table:table-cell office:value-type="string" office:string-value="High" table:formula="of:=IF([.E419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lothing</text:p>
          </table:table-cell>
          <table:table-cell office:value-type="float" office:value="4625.33" table:style-name="ce1">
            <text:p>4625.33</text:p>
          </table:table-cell>
          <table:table-cell office:value-type="float" office:value="4642.83" table:style-name="ce1">
            <text:p>4642.83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01-17T00:00:00" table:style-name="ce2">
            <text:p>17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2747.28" table:style-name="ce1">
            <text:p>2747.28</text:p>
          </table:table-cell>
          <table:table-cell office:value-type="string" office:string-value="Low" table:formula="of:=IF([.E420]&gt;[.$E$1003];&quot;High&quot;;&quot;Low&quot;)" table:style-name="ce1">
            <text:p>Lo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ectronics</text:p>
          </table:table-cell>
          <table:table-cell office:value-type="float" office:value="1190.4100000000001" table:style-name="ce1">
            <text:p>1190.41</text:p>
          </table:table-cell>
          <table:table-cell office:value-type="float" office:value="1582.89" table:style-name="ce1">
            <text:p>1582.89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date" office:date-value="2023-06-14T00:00:00" table:style-name="ce2">
            <text:p>14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249.6" table:style-name="ce1">
            <text:p>249.6</text:p>
          </table:table-cell>
          <table:table-cell office:value-type="string" office:string-value="Low" table:formula="of:=IF([.E421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lothing</text:p>
          </table:table-cell>
          <table:table-cell office:value-type="float" office:value="1481.76" table:style-name="ce1">
            <text:p>1481.76</text:p>
          </table:table-cell>
          <table:table-cell office:value-type="float" office:value="1668.95" table:style-name="ce1">
            <text:p>1668.95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date" office:date-value="2023-06-02T00:00:00" table:style-name="ce2">
            <text:p>02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9653.65" table:style-name="ce1">
            <text:p>9653.65</text:p>
          </table:table-cell>
          <table:table-cell office:value-type="string" office:string-value="High" table:formula="of:=IF([.E422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lectronics</text:p>
          </table:table-cell>
          <table:table-cell office:value-type="float" office:value="1878.3" table:style-name="ce1">
            <text:p>1878.3</text:p>
          </table:table-cell>
          <table:table-cell office:value-type="float" office:value="2087.4499999999998" table:style-name="ce1">
            <text:p>2087.45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03-17T00:00:00" table:style-name="ce2">
            <text:p>17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2583.84" table:style-name="ce1">
            <text:p>2583.84</text:p>
          </table:table-cell>
          <table:table-cell office:value-type="string" office:string-value="Low" table:formula="of:=IF([.E423]&gt;[.$E$1003];&quot;High&quot;;&quot;Low&quot;)" table:style-name="ce1">
            <text:p>Low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ood</text:p>
          </table:table-cell>
          <table:table-cell office:value-type="float" office:value="3335.53" table:style-name="ce1">
            <text:p>3335.53</text:p>
          </table:table-cell>
          <table:table-cell office:value-type="float" office:value="3742.12" table:style-name="ce1">
            <text:p>3742.12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date" office:date-value="2023-03-28T00:00:00" table:style-name="ce2">
            <text:p>28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6792.66" table:style-name="ce1">
            <text:p>6792.66</text:p>
          </table:table-cell>
          <table:table-cell office:value-type="string" office:string-value="High" table:formula="of:=IF([.E424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lothing</text:p>
          </table:table-cell>
          <table:table-cell office:value-type="float" office:value="635.28" table:style-name="ce1">
            <text:p>635.28</text:p>
          </table:table-cell>
          <table:table-cell office:value-type="float" office:value="831.13" table:style-name="ce1">
            <text:p>831.13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date" office:date-value="2023-04-27T00:00:00" table:style-name="ce2">
            <text:p>27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7095.64" table:style-name="ce1">
            <text:p>7095.64</text:p>
          </table:table-cell>
          <table:table-cell office:value-type="string" office:string-value="High" table:formula="of:=IF([.E425]&gt;[.$E$1003];&quot;High&quot;;&quot;Low&quot;)" table:style-name="ce1">
            <text:p>High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urniture</text:p>
          </table:table-cell>
          <table:table-cell office:value-type="float" office:value="4772.03" table:style-name="ce1">
            <text:p>4772.03</text:p>
          </table:table-cell>
          <table:table-cell office:value-type="float" office:value="4805.17" table:style-name="ce1">
            <text:p>4805.17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date" office:date-value="2023-12-28T00:00:00" table:style-name="ce2">
            <text:p>28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6139.07" table:style-name="ce1">
            <text:p>6139.07</text:p>
          </table:table-cell>
          <table:table-cell office:value-type="string" office:string-value="High" table:formula="of:=IF([.E426]&gt;[.$E$1003];&quot;High&quot;;&quot;Low&quot;)" table:style-name="ce1">
            <text:p>High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ood</text:p>
          </table:table-cell>
          <table:table-cell office:value-type="float" office:value="4334.58" table:style-name="ce1">
            <text:p>4334.58</text:p>
          </table:table-cell>
          <table:table-cell office:value-type="float" office:value="4431.04" table:style-name="ce1">
            <text:p>4431.04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12-08T00:00:00" table:style-name="ce2">
            <text:p>08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197.78" table:style-name="ce1">
            <text:p>3197.78</text:p>
          </table:table-cell>
          <table:table-cell office:value-type="string" office:string-value="Low" table:formula="of:=IF([.E427]&gt;[.$E$1003];&quot;High&quot;;&quot;Low&quot;)" table:style-name="ce1">
            <text:p>Low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lectronics</text:p>
          </table:table-cell>
          <table:table-cell office:value-type="float" office:value="2907.22" table:style-name="ce1">
            <text:p>2907.22</text:p>
          </table:table-cell>
          <table:table-cell office:value-type="float" office:value="3385.6099999999901" table:style-name="ce1">
            <text:p>3385.61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1-27T00:00:00" table:style-name="ce2">
            <text:p>27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783.85" table:style-name="ce1">
            <text:p>2783.85</text:p>
          </table:table-cell>
          <table:table-cell office:value-type="string" office:string-value="Low" table:formula="of:=IF([.E428]&gt;[.$E$1003];&quot;High&quot;;&quot;Low&quot;)" table:style-name="ce1">
            <text:p>Low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ood</text:p>
          </table:table-cell>
          <table:table-cell office:value-type="float" office:value="3386.49" table:style-name="ce1">
            <text:p>3386.49</text:p>
          </table:table-cell>
          <table:table-cell office:value-type="float" office:value="3430.99" table:style-name="ce1">
            <text:p>3430.99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11-09T00:00:00" table:style-name="ce2">
            <text:p>09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016.92" table:style-name="ce1">
            <text:p>6016.92</text:p>
          </table:table-cell>
          <table:table-cell office:value-type="string" office:string-value="High" table:formula="of:=IF([.E429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132.47" table:style-name="ce1">
            <text:p>132.47</text:p>
          </table:table-cell>
          <table:table-cell office:value-type="float" office:value="316.39" table:style-name="ce1">
            <text:p>316.39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date" office:date-value="2023-10-14T00:00:00" table:style-name="ce2">
            <text:p>14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8674.35" table:style-name="ce1">
            <text:p>8674.35</text:p>
          </table:table-cell>
          <table:table-cell office:value-type="string" office:string-value="High" table:formula="of:=IF([.E430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ood</text:p>
          </table:table-cell>
          <table:table-cell office:value-type="float" office:value="1727.78" table:style-name="ce1">
            <text:p>1727.78</text:p>
          </table:table-cell>
          <table:table-cell office:value-type="float" office:value="1984.34" table:style-name="ce1">
            <text:p>1984.34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05-14T00:00:00" table:style-name="ce2">
            <text:p>14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9472.66" table:style-name="ce1">
            <text:p>9472.66</text:p>
          </table:table-cell>
          <table:table-cell office:value-type="string" office:string-value="High" table:formula="of:=IF([.E431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lectronics</text:p>
          </table:table-cell>
          <table:table-cell office:value-type="float" office:value="3988.52" table:style-name="ce1">
            <text:p>3988.52</text:p>
          </table:table-cell>
          <table:table-cell office:value-type="float" office:value="4240.2299999999996" table:style-name="ce1">
            <text:p>4240.23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08-07T00:00:00" table:style-name="ce2">
            <text:p>07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1148.47" table:style-name="ce1">
            <text:p>1148.47</text:p>
          </table:table-cell>
          <table:table-cell office:value-type="string" office:string-value="Low" table:formula="of:=IF([.E432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lothing</text:p>
          </table:table-cell>
          <table:table-cell office:value-type="float" office:value="433.54" table:style-name="ce1">
            <text:p>433.54</text:p>
          </table:table-cell>
          <table:table-cell office:value-type="float" office:value="445.48" table:style-name="ce1">
            <text:p>445.48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6-17T00:00:00" table:style-name="ce2">
            <text:p>17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1632.8" table:style-name="ce1">
            <text:p>1632.8</text:p>
          </table:table-cell>
          <table:table-cell office:value-type="string" office:string-value="Low" table:formula="of:=IF([.E433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1447.45" table:style-name="ce1">
            <text:p>1447.45</text:p>
          </table:table-cell>
          <table:table-cell office:value-type="float" office:value="1703.02" table:style-name="ce1">
            <text:p>1703.02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date" office:date-value="2023-04-08T00:00:00" table:style-name="ce2">
            <text:p>08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452.89" table:style-name="ce1">
            <text:p>9452.89</text:p>
          </table:table-cell>
          <table:table-cell office:value-type="string" office:string-value="High" table:formula="of:=IF([.E434]&gt;[.$E$1003];&quot;High&quot;;&quot;Low&quot;)" table:style-name="ce1">
            <text:p>Hig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lectronics</text:p>
          </table:table-cell>
          <table:table-cell office:value-type="float" office:value="2947.22" table:style-name="ce1">
            <text:p>2947.22</text:p>
          </table:table-cell>
          <table:table-cell office:value-type="float" office:value="3145.27" table:style-name="ce1">
            <text:p>3145.27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date" office:date-value="2023-09-25T00:00:00" table:style-name="ce2">
            <text:p>25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7391.7" table:style-name="ce1">
            <text:p>7391.7</text:p>
          </table:table-cell>
          <table:table-cell office:value-type="string" office:string-value="High" table:formula="of:=IF([.E435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ood</text:p>
          </table:table-cell>
          <table:table-cell office:value-type="float" office:value="1319.24" table:style-name="ce1">
            <text:p>1319.24</text:p>
          </table:table-cell>
          <table:table-cell office:value-type="float" office:value="1805.56" table:style-name="ce1">
            <text:p>1805.56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08-25T00:00:00" table:style-name="ce2">
            <text:p>25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8841.64" table:style-name="ce1">
            <text:p>8841.64</text:p>
          </table:table-cell>
          <table:table-cell office:value-type="string" office:string-value="High" table:formula="of:=IF([.E436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4673.1899999999996" table:style-name="ce1">
            <text:p>4673.19</text:p>
          </table:table-cell>
          <table:table-cell office:value-type="float" office:value="4761.1799999999903" table:style-name="ce1">
            <text:p>4761.18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11-05T00:00:00" table:style-name="ce2">
            <text:p>05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106.06" table:style-name="ce1">
            <text:p>2106.06</text:p>
          </table:table-cell>
          <table:table-cell office:value-type="string" office:string-value="Low" table:formula="of:=IF([.E437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lectronics</text:p>
          </table:table-cell>
          <table:table-cell office:value-type="float" office:value="698.74" table:style-name="ce1">
            <text:p>698.74</text:p>
          </table:table-cell>
          <table:table-cell office:value-type="float" office:value="882.28" table:style-name="ce1">
            <text:p>882.28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06-22T00:00:00" table:style-name="ce2">
            <text:p>22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5917.1" table:style-name="ce1">
            <text:p>5917.1</text:p>
          </table:table-cell>
          <table:table-cell office:value-type="string" office:string-value="High" table:formula="of:=IF([.E438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nics</text:p>
          </table:table-cell>
          <table:table-cell office:value-type="float" office:value="3997.1" table:style-name="ce1">
            <text:p>3997.1</text:p>
          </table:table-cell>
          <table:table-cell office:value-type="float" office:value="4212.6499999999996" table:style-name="ce1">
            <text:p>4212.65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7-09T00:00:00" table:style-name="ce2">
            <text:p>09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041.28" table:style-name="ce1">
            <text:p>7041.28</text:p>
          </table:table-cell>
          <table:table-cell office:value-type="string" office:string-value="High" table:formula="of:=IF([.E439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ood</text:p>
          </table:table-cell>
          <table:table-cell office:value-type="float" office:value="2564.35" table:style-name="ce1">
            <text:p>2564.35</text:p>
          </table:table-cell>
          <table:table-cell office:value-type="float" office:value="2765.79" table:style-name="ce1">
            <text:p>2765.79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05-02T00:00:00" table:style-name="ce2">
            <text:p>02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6833.11" table:style-name="ce1">
            <text:p>6833.11</text:p>
          </table:table-cell>
          <table:table-cell office:value-type="string" office:string-value="High" table:formula="of:=IF([.E440]&gt;[.$E$1003];&quot;High&quot;;&quot;Low&quot;)" table:style-name="ce1">
            <text:p>High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urniture</text:p>
          </table:table-cell>
          <table:table-cell office:value-type="float" office:value="3764.14" table:style-name="ce1">
            <text:p>3764.14</text:p>
          </table:table-cell>
          <table:table-cell office:value-type="float" office:value="4100.3999999999996" table:style-name="ce1">
            <text:p>4100.4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02-15T00:00:00" table:style-name="ce2">
            <text:p>15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140.7" table:style-name="ce1">
            <text:p>4140.7</text:p>
          </table:table-cell>
          <table:table-cell office:value-type="string" office:string-value="Low" table:formula="of:=IF([.E441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1588.04" table:style-name="ce1">
            <text:p>1588.04</text:p>
          </table:table-cell>
          <table:table-cell office:value-type="float" office:value="1703.6399999999901" table:style-name="ce1">
            <text:p>1703.64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3-05T00:00:00" table:style-name="ce2">
            <text:p>05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52.41" table:style-name="ce1">
            <text:p>252.41</text:p>
          </table:table-cell>
          <table:table-cell office:value-type="string" office:string-value="Low" table:formula="of:=IF([.E442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urniture</text:p>
          </table:table-cell>
          <table:table-cell office:value-type="float" office:value="2596.7199999999998" table:style-name="ce1">
            <text:p>2596.72</text:p>
          </table:table-cell>
          <table:table-cell office:value-type="float" office:value="2715.0499999999902" table:style-name="ce1">
            <text:p>2715.05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5870.97" table:style-name="ce1">
            <text:p>5870.97</text:p>
          </table:table-cell>
          <table:table-cell office:value-type="string" office:string-value="High" table:formula="of:=IF([.E443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ectronics</text:p>
          </table:table-cell>
          <table:table-cell office:value-type="float" office:value="4291.33" table:style-name="ce1">
            <text:p>4291.33</text:p>
          </table:table-cell>
          <table:table-cell office:value-type="float" office:value="4658.6400000000003" table:style-name="ce1">
            <text:p>4658.64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11-06T00:00:00" table:style-name="ce2">
            <text:p>06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2605.71" table:style-name="ce1">
            <text:p>2605.71</text:p>
          </table:table-cell>
          <table:table-cell office:value-type="string" office:string-value="Low" table:formula="of:=IF([.E444]&gt;[.$E$1003];&quot;High&quot;;&quot;Low&quot;)" table:style-name="ce1">
            <text:p>Lo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ood</text:p>
          </table:table-cell>
          <table:table-cell office:value-type="float" office:value="2361.0500000000002" table:style-name="ce1">
            <text:p>2361.05</text:p>
          </table:table-cell>
          <table:table-cell office:value-type="float" office:value="2616.19" table:style-name="ce1">
            <text:p>2616.19</text:p>
          </table:table-cell>
          <table:table-cell office:value-type="string" table:style-name="ce1">
            <text:p>New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date" office:date-value="2023-12-29T00:00:00" table:style-name="ce2">
            <text:p>29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4557.5200000000004" table:style-name="ce1">
            <text:p>4557.52</text:p>
          </table:table-cell>
          <table:table-cell office:value-type="string" office:string-value="Low" table:formula="of:=IF([.E445]&gt;[.$E$1003];&quot;High&quot;;&quot;Low&quot;)" table:style-name="ce1">
            <text:p>Lo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rniture</text:p>
          </table:table-cell>
          <table:table-cell office:value-type="float" office:value="1830.61" table:style-name="ce1">
            <text:p>1830.61</text:p>
          </table:table-cell>
          <table:table-cell office:value-type="float" office:value="2044.04" table:style-name="ce1">
            <text:p>2044.04</text:p>
          </table:table-cell>
          <table:table-cell office:value-type="string" table:style-name="ce1">
            <text:p>New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7-12T00:00:00" table:style-name="ce2">
            <text:p>12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9580.0499999999993" table:style-name="ce1">
            <text:p>9580.05</text:p>
          </table:table-cell>
          <table:table-cell office:value-type="string" office:string-value="High" table:formula="of:=IF([.E446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lectronics</text:p>
          </table:table-cell>
          <table:table-cell office:value-type="float" office:value="2703.97" table:style-name="ce1">
            <text:p>2703.97</text:p>
          </table:table-cell>
          <table:table-cell office:value-type="float" office:value="2796.8799999999901" table:style-name="ce1">
            <text:p>2796.88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11-03T00:00:00" table:style-name="ce2">
            <text:p>03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050.45" table:style-name="ce1">
            <text:p>4050.45</text:p>
          </table:table-cell>
          <table:table-cell office:value-type="string" office:string-value="Low" table:formula="of:=IF([.E447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lothing</text:p>
          </table:table-cell>
          <table:table-cell office:value-type="float" office:value="3600.95" table:style-name="ce1">
            <text:p>3600.95</text:p>
          </table:table-cell>
          <table:table-cell office:value-type="float" office:value="3702.8399999999901" table:style-name="ce1">
            <text:p>3702.84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6-30T00:00:00" table:style-name="ce2">
            <text:p>30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8414.0400000000009" table:style-name="ce1">
            <text:p>8414.04</text:p>
          </table:table-cell>
          <table:table-cell office:value-type="string" office:string-value="High" table:formula="of:=IF([.E448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lothing</text:p>
          </table:table-cell>
          <table:table-cell office:value-type="float" office:value="2245.64" table:style-name="ce1">
            <text:p>2245.64</text:p>
          </table:table-cell>
          <table:table-cell office:value-type="float" office:value="2260.81" table:style-name="ce1">
            <text:p>2260.81</text:p>
          </table:table-cell>
          <table:table-cell office:value-type="string" table:style-name="ce1">
            <text:p>New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1966.55" table:style-name="ce1">
            <text:p>1966.55</text:p>
          </table:table-cell>
          <table:table-cell office:value-type="string" office:string-value="Low" table:formula="of:=IF([.E449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lothing</text:p>
          </table:table-cell>
          <table:table-cell office:value-type="float" office:value="4697.4399999999996" table:style-name="ce1">
            <text:p>4697.44</text:p>
          </table:table-cell>
          <table:table-cell office:value-type="float" office:value="4752.24" table:style-name="ce1">
            <text:p>4752.24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10-09T00:00:00" table:style-name="ce2">
            <text:p>09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6757.36" table:style-name="ce1">
            <text:p>6757.36</text:p>
          </table:table-cell>
          <table:table-cell office:value-type="string" office:string-value="High" table:formula="of:=IF([.E450]&gt;[.$E$1003];&quot;High&quot;;&quot;Low&quot;)" table:style-name="ce1">
            <text:p>High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lectronics</text:p>
          </table:table-cell>
          <table:table-cell office:value-type="float" office:value="1509.98" table:style-name="ce1">
            <text:p>1509.98</text:p>
          </table:table-cell>
          <table:table-cell office:value-type="float" office:value="1792.83" table:style-name="ce1">
            <text:p>1792.83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date" office:date-value="2023-01-29T00:00:00" table:style-name="ce2">
            <text:p>29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772.3700000000008" table:style-name="ce1">
            <text:p>9772.37</text:p>
          </table:table-cell>
          <table:table-cell office:value-type="string" office:string-value="High" table:formula="of:=IF([.E451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ood</text:p>
          </table:table-cell>
          <table:table-cell office:value-type="float" office:value="2403.54" table:style-name="ce1">
            <text:p>2403.54</text:p>
          </table:table-cell>
          <table:table-cell office:value-type="float" office:value="2850.56" table:style-name="ce1">
            <text:p>2850.56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date" office:date-value="2023-05-29T00:00:00" table:style-name="ce2">
            <text:p>29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1108.74" table:style-name="ce1">
            <text:p>1108.74</text:p>
          </table:table-cell>
          <table:table-cell office:value-type="string" office:string-value="Low" table:formula="of:=IF([.E452]&gt;[.$E$1003];&quot;High&quot;;&quot;Low&quot;)" table:style-name="ce1">
            <text:p>Low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urniture</text:p>
          </table:table-cell>
          <table:table-cell office:value-type="float" office:value="3796.79" table:style-name="ce1">
            <text:p>3796.79</text:p>
          </table:table-cell>
          <table:table-cell office:value-type="float" office:value="3947.5" table:style-name="ce1">
            <text:p>3947.5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182.37" table:style-name="ce1">
            <text:p>182.37</text:p>
          </table:table-cell>
          <table:table-cell office:value-type="string" office:string-value="Low" table:formula="of:=IF([.E453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lothing</text:p>
          </table:table-cell>
          <table:table-cell office:value-type="float" office:value="3461.15" table:style-name="ce1">
            <text:p>3461.15</text:p>
          </table:table-cell>
          <table:table-cell office:value-type="float" office:value="3631.75" table:style-name="ce1">
            <text:p>3631.75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10-23T00:00:00" table:style-name="ce2">
            <text:p>23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392.47" table:style-name="ce1">
            <text:p>4392.47</text:p>
          </table:table-cell>
          <table:table-cell office:value-type="string" office:string-value="Low" table:formula="of:=IF([.E454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lectronics</text:p>
          </table:table-cell>
          <table:table-cell office:value-type="float" office:value="4325.0200000000004" table:style-name="ce1">
            <text:p>4325.02</text:p>
          </table:table-cell>
          <table:table-cell office:value-type="float" office:value="4391.67" table:style-name="ce1">
            <text:p>4391.67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01-11T00:00:00" table:style-name="ce2">
            <text:p>11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1016.99" table:style-name="ce1">
            <text:p>1016.99</text:p>
          </table:table-cell>
          <table:table-cell office:value-type="string" office:string-value="Low" table:formula="of:=IF([.E455]&gt;[.$E$1003];&quot;High&quot;;&quot;Low&quot;)" table:style-name="ce1">
            <text:p>L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lectronics</text:p>
          </table:table-cell>
          <table:table-cell office:value-type="float" office:value="4984.21" table:style-name="ce1">
            <text:p>4984.21</text:p>
          </table:table-cell>
          <table:table-cell office:value-type="float" office:value="5184.6400000000003" table:style-name="ce1">
            <text:p>5184.64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date" office:date-value="2023-06-13T00:00:00" table:style-name="ce2">
            <text:p>13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7509.01" table:style-name="ce1">
            <text:p>7509.01</text:p>
          </table:table-cell>
          <table:table-cell office:value-type="string" office:string-value="High" table:formula="of:=IF([.E456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rniture</text:p>
          </table:table-cell>
          <table:table-cell office:value-type="float" office:value="2162.9499999999998" table:style-name="ce1">
            <text:p>2162.95</text:p>
          </table:table-cell>
          <table:table-cell office:value-type="float" office:value="2191.1899999999901" table:style-name="ce1">
            <text:p>2191.19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04-23T00:00:00" table:style-name="ce2">
            <text:p>23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154.0300000000007" table:style-name="ce1">
            <text:p>9154.03</text:p>
          </table:table-cell>
          <table:table-cell office:value-type="string" office:string-value="High" table:formula="of:=IF([.E457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lothing</text:p>
          </table:table-cell>
          <table:table-cell office:value-type="float" office:value="600.20000000000005" table:style-name="ce1">
            <text:p>600.2</text:p>
          </table:table-cell>
          <table:table-cell office:value-type="float" office:value="1059.82" table:style-name="ce1">
            <text:p>1059.82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07-06T00:00:00" table:style-name="ce2">
            <text:p>06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4396.8100000000004" table:style-name="ce1">
            <text:p>4396.81</text:p>
          </table:table-cell>
          <table:table-cell office:value-type="string" office:string-value="Low" table:formula="of:=IF([.E458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lectronics</text:p>
          </table:table-cell>
          <table:table-cell office:value-type="float" office:value="200.56" table:style-name="ce1">
            <text:p>200.56</text:p>
          </table:table-cell>
          <table:table-cell office:value-type="float" office:value="540.38" table:style-name="ce1">
            <text:p>540.38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10-22T00:00:00" table:style-name="ce2">
            <text:p>22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2661.25" table:style-name="ce1">
            <text:p>2661.25</text:p>
          </table:table-cell>
          <table:table-cell office:value-type="string" office:string-value="Low" table:formula="of:=IF([.E459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urniture</text:p>
          </table:table-cell>
          <table:table-cell office:value-type="float" office:value="3648.04" table:style-name="ce1">
            <text:p>3648.04</text:p>
          </table:table-cell>
          <table:table-cell office:value-type="float" office:value="4143.51" table:style-name="ce1">
            <text:p>4143.51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08-20T00:00:00" table:style-name="ce2">
            <text:p>20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4400.59" table:style-name="ce1">
            <text:p>4400.59</text:p>
          </table:table-cell>
          <table:table-cell office:value-type="string" office:string-value="Low" table:formula="of:=IF([.E460]&gt;[.$E$1003];&quot;High&quot;;&quot;Low&quot;)" table:style-name="ce1">
            <text:p>Low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ood</text:p>
          </table:table-cell>
          <table:table-cell office:value-type="float" office:value="4376.37" table:style-name="ce1">
            <text:p>4376.37</text:p>
          </table:table-cell>
          <table:table-cell office:value-type="float" office:value="4818.95" table:style-name="ce1">
            <text:p>4818.95</text:p>
          </table:table-cell>
          <table:table-cell office:value-type="string" table:style-name="ce1">
            <text:p>New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date" office:date-value="2023-08-15T00:00:00" table:style-name="ce2">
            <text:p>15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7262.13" table:style-name="ce1">
            <text:p>7262.13</text:p>
          </table:table-cell>
          <table:table-cell office:value-type="string" office:string-value="High" table:formula="of:=IF([.E461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ood</text:p>
          </table:table-cell>
          <table:table-cell office:value-type="float" office:value="1142.53" table:style-name="ce1">
            <text:p>1142.53</text:p>
          </table:table-cell>
          <table:table-cell office:value-type="float" office:value="1384.3" table:style-name="ce1">
            <text:p>1384.3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date" office:date-value="2023-11-06T00:00:00" table:style-name="ce2">
            <text:p>06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189.64" table:style-name="ce1">
            <text:p>189.64</text:p>
          </table:table-cell>
          <table:table-cell office:value-type="string" office:string-value="Low" table:formula="of:=IF([.E462]&gt;[.$E$1003];&quot;High&quot;;&quot;Low&quot;)" table:style-name="ce1">
            <text:p>Low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ood</text:p>
          </table:table-cell>
          <table:table-cell office:value-type="float" office:value="834.32" table:style-name="ce1">
            <text:p>834.32</text:p>
          </table:table-cell>
          <table:table-cell office:value-type="float" office:value="1098.97" table:style-name="ce1">
            <text:p>1098.97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4-08T00:00:00" table:style-name="ce2">
            <text:p>08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5935.59" table:style-name="ce1">
            <text:p>5935.59</text:p>
          </table:table-cell>
          <table:table-cell office:value-type="string" office:string-value="High" table:formula="of:=IF([.E463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357.92" table:style-name="ce1">
            <text:p>357.92</text:p>
          </table:table-cell>
          <table:table-cell office:value-type="float" office:value="461.3" table:style-name="ce1">
            <text:p>461.3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date" office:date-value="2023-02-24T00:00:00" table:style-name="ce2">
            <text:p>24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6171.59" table:style-name="ce1">
            <text:p>6171.59</text:p>
          </table:table-cell>
          <table:table-cell office:value-type="string" office:string-value="High" table:formula="of:=IF([.E464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urniture</text:p>
          </table:table-cell>
          <table:table-cell office:value-type="float" office:value="4122.38" table:style-name="ce1">
            <text:p>4122.38</text:p>
          </table:table-cell>
          <table:table-cell office:value-type="float" office:value="4358.78" table:style-name="ce1">
            <text:p>4358.78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4-21T00:00:00" table:style-name="ce2">
            <text:p>21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6413.11" table:style-name="ce1">
            <text:p>6413.11</text:p>
          </table:table-cell>
          <table:table-cell office:value-type="string" office:string-value="High" table:formula="of:=IF([.E465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1591.34" table:style-name="ce1">
            <text:p>1591.34</text:p>
          </table:table-cell>
          <table:table-cell office:value-type="float" office:value="2043.82" table:style-name="ce1">
            <text:p>2043.82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6-01T00:00:00" table:style-name="ce2">
            <text:p>01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2496.02" table:style-name="ce1">
            <text:p>2496.02</text:p>
          </table:table-cell>
          <table:table-cell office:value-type="string" office:string-value="Low" table:formula="of:=IF([.E466]&gt;[.$E$1003];&quot;High&quot;;&quot;Low&quot;)" table:style-name="ce1">
            <text:p>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office:value-type="float" office:value="2038.4" table:style-name="ce1">
            <text:p>2038.4</text:p>
          </table:table-cell>
          <table:table-cell office:value-type="float" office:value="2073.3200000000002" table:style-name="ce1">
            <text:p>2073.32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date" office:date-value="2023-09-03T00:00:00" table:style-name="ce2">
            <text:p>03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7169.12" table:style-name="ce1">
            <text:p>7169.12</text:p>
          </table:table-cell>
          <table:table-cell office:value-type="string" office:string-value="High" table:formula="of:=IF([.E467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lectronics</text:p>
          </table:table-cell>
          <table:table-cell office:value-type="float" office:value="2538.61" table:style-name="ce1">
            <text:p>2538.61</text:p>
          </table:table-cell>
          <table:table-cell office:value-type="float" office:value="2971.75" table:style-name="ce1">
            <text:p>2971.75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date" office:date-value="2023-03-10T00:00:00" table:style-name="ce2">
            <text:p>10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1004.78" table:style-name="ce1">
            <text:p>1004.78</text:p>
          </table:table-cell>
          <table:table-cell office:value-type="string" office:string-value="Low" table:formula="of:=IF([.E468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lectronics</text:p>
          </table:table-cell>
          <table:table-cell office:value-type="float" office:value="4205.29" table:style-name="ce1">
            <text:p>4205.29</text:p>
          </table:table-cell>
          <table:table-cell office:value-type="float" office:value="4382.3500000000004" table:style-name="ce1">
            <text:p>4382.35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11-08T00:00:00" table:style-name="ce2">
            <text:p>08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072.7800000000002" table:style-name="ce1">
            <text:p>2072.78</text:p>
          </table:table-cell>
          <table:table-cell office:value-type="string" office:string-value="Low" table:formula="of:=IF([.E469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urniture</text:p>
          </table:table-cell>
          <table:table-cell office:value-type="float" office:value="3271.62" table:style-name="ce1">
            <text:p>3271.62</text:p>
          </table:table-cell>
          <table:table-cell office:value-type="float" office:value="3722.38" table:style-name="ce1">
            <text:p>3722.38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10-16T00:00:00" table:style-name="ce2">
            <text:p>16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8786.9500000000007" table:style-name="ce1">
            <text:p>8786.95</text:p>
          </table:table-cell>
          <table:table-cell office:value-type="string" office:string-value="High" table:formula="of:=IF([.E470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lectronics</text:p>
          </table:table-cell>
          <table:table-cell office:value-type="float" office:value="3094.57" table:style-name="ce1">
            <text:p>3094.57</text:p>
          </table:table-cell>
          <table:table-cell office:value-type="float" office:value="3565.6" table:style-name="ce1">
            <text:p>3565.6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09-07T00:00:00" table:style-name="ce2">
            <text:p>07/09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7413.36" table:style-name="ce1">
            <text:p>7413.36</text:p>
          </table:table-cell>
          <table:table-cell office:value-type="string" office:string-value="High" table:formula="of:=IF([.E471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919.58" table:style-name="ce1">
            <text:p>919.58</text:p>
          </table:table-cell>
          <table:table-cell office:value-type="float" office:value="1258.3" table:style-name="ce1">
            <text:p>1258.3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02-05T00:00:00" table:style-name="ce2">
            <text:p>05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236.08" table:style-name="ce1">
            <text:p>236.08</text:p>
          </table:table-cell>
          <table:table-cell office:value-type="string" office:string-value="Low" table:formula="of:=IF([.E472]&gt;[.$E$1003];&quot;High&quot;;&quot;Low&quot;)" table:style-name="ce1">
            <text:p>Low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urniture</text:p>
          </table:table-cell>
          <table:table-cell office:value-type="float" office:value="2590.29" table:style-name="ce1">
            <text:p>2590.29</text:p>
          </table:table-cell>
          <table:table-cell office:value-type="float" office:value="2925.86" table:style-name="ce1">
            <text:p>2925.86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08-27T00:00:00" table:style-name="ce2">
            <text:p>27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2558.92" table:style-name="ce1">
            <text:p>2558.92</text:p>
          </table:table-cell>
          <table:table-cell office:value-type="string" office:string-value="Low" table:formula="of:=IF([.E473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ood</text:p>
          </table:table-cell>
          <table:table-cell office:value-type="float" office:value="3591.14" table:style-name="ce1">
            <text:p>3591.14</text:p>
          </table:table-cell>
          <table:table-cell office:value-type="float" office:value="3822.99" table:style-name="ce1">
            <text:p>3822.99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5-28T00:00:00" table:style-name="ce2">
            <text:p>28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2222.62" table:style-name="ce1">
            <text:p>2222.62</text:p>
          </table:table-cell>
          <table:table-cell office:value-type="string" office:string-value="Low" table:formula="of:=IF([.E474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lectronics</text:p>
          </table:table-cell>
          <table:table-cell office:value-type="float" office:value="4867.6400000000003" table:style-name="ce1">
            <text:p>4867.64</text:p>
          </table:table-cell>
          <table:table-cell office:value-type="float" office:value="5287.05" table:style-name="ce1">
            <text:p>5287.05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08-15T00:00:00" table:style-name="ce2">
            <text:p>15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2780.98" table:style-name="ce1">
            <text:p>2780.98</text:p>
          </table:table-cell>
          <table:table-cell office:value-type="string" office:string-value="Low" table:formula="of:=IF([.E475]&gt;[.$E$1003];&quot;High&quot;;&quot;Low&quot;)" table:style-name="ce1">
            <text:p>Low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ood</text:p>
          </table:table-cell>
          <table:table-cell office:value-type="float" office:value="1046.96" table:style-name="ce1">
            <text:p>1046.96</text:p>
          </table:table-cell>
          <table:table-cell office:value-type="float" office:value="1528.15" table:style-name="ce1">
            <text:p>1528.15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09-01T00:00:00" table:style-name="ce2">
            <text:p>01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2550.84" table:style-name="ce1">
            <text:p>2550.84</text:p>
          </table:table-cell>
          <table:table-cell office:value-type="string" office:string-value="Low" table:formula="of:=IF([.E476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97.24" table:style-name="ce1">
            <text:p>97.24</text:p>
          </table:table-cell>
          <table:table-cell office:value-type="float" office:value="487.03" table:style-name="ce1">
            <text:p>487.03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12-03T00:00:00" table:style-name="ce2">
            <text:p>03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719.01" table:style-name="ce1">
            <text:p>719.01</text:p>
          </table:table-cell>
          <table:table-cell office:value-type="string" office:string-value="Low" table:formula="of:=IF([.E477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othing</text:p>
          </table:table-cell>
          <table:table-cell office:value-type="float" office:value="422.74" table:style-name="ce1">
            <text:p>422.74</text:p>
          </table:table-cell>
          <table:table-cell office:value-type="float" office:value="737.49" table:style-name="ce1">
            <text:p>737.49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12-31T00:00:00" table:style-name="ce2">
            <text:p>31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4643.51" table:style-name="ce1">
            <text:p>4643.51</text:p>
          </table:table-cell>
          <table:table-cell office:value-type="string" office:string-value="Low" table:formula="of:=IF([.E478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lothing</text:p>
          </table:table-cell>
          <table:table-cell office:value-type="float" office:value="1910.47" table:style-name="ce1">
            <text:p>1910.47</text:p>
          </table:table-cell>
          <table:table-cell office:value-type="float" office:value="2217.8000000000002" table:style-name="ce1">
            <text:p>2217.8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date" office:date-value="2023-07-20T00:00:00" table:style-name="ce2">
            <text:p>20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7354.06" table:style-name="ce1">
            <text:p>7354.06</text:p>
          </table:table-cell>
          <table:table-cell office:value-type="string" office:string-value="High" table:formula="of:=IF([.E479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4111.7" table:style-name="ce1">
            <text:p>4111.7</text:p>
          </table:table-cell>
          <table:table-cell office:value-type="float" office:value="4537.9399999999996" table:style-name="ce1">
            <text:p>4537.94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6-03T00:00:00" table:style-name="ce2">
            <text:p>03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6106.64" table:style-name="ce1">
            <text:p>6106.64</text:p>
          </table:table-cell>
          <table:table-cell office:value-type="string" office:string-value="High" table:formula="of:=IF([.E480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85.35" table:style-name="ce1">
            <text:p>85.35</text:p>
          </table:table-cell>
          <table:table-cell office:value-type="float" office:value="360.539999999999" table:style-name="ce1">
            <text:p>360.54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3-14T00:00:00" table:style-name="ce2">
            <text:p>14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761.43" table:style-name="ce1">
            <text:p>6761.43</text:p>
          </table:table-cell>
          <table:table-cell office:value-type="string" office:string-value="High" table:formula="of:=IF([.E481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2310.8200000000002" table:style-name="ce1">
            <text:p>2310.82</text:p>
          </table:table-cell>
          <table:table-cell office:value-type="float" office:value="2714.71" table:style-name="ce1">
            <text:p>2714.71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7-20T00:00:00" table:style-name="ce2">
            <text:p>20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03.38" table:style-name="ce1">
            <text:p>903.38</text:p>
          </table:table-cell>
          <table:table-cell office:value-type="string" office:string-value="Low" table:formula="of:=IF([.E482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lectronics</text:p>
          </table:table-cell>
          <table:table-cell office:value-type="float" office:value="1679.69" table:style-name="ce1">
            <text:p>1679.69</text:p>
          </table:table-cell>
          <table:table-cell office:value-type="float" office:value="1939.04" table:style-name="ce1">
            <text:p>1939.04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10-23T00:00:00" table:style-name="ce2">
            <text:p>23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9519.76" table:style-name="ce1">
            <text:p>9519.76</text:p>
          </table:table-cell>
          <table:table-cell office:value-type="string" office:string-value="High" table:formula="of:=IF([.E483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ood</text:p>
          </table:table-cell>
          <table:table-cell office:value-type="float" office:value="309.77999999999997" table:style-name="ce1">
            <text:p>309.78</text:p>
          </table:table-cell>
          <table:table-cell office:value-type="float" office:value="350.38" table:style-name="ce1">
            <text:p>350.38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01-17T00:00:00" table:style-name="ce2">
            <text:p>17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8401.07" table:style-name="ce1">
            <text:p>8401.07</text:p>
          </table:table-cell>
          <table:table-cell office:value-type="string" office:string-value="High" table:formula="of:=IF([.E484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urniture</text:p>
          </table:table-cell>
          <table:table-cell office:value-type="float" office:value="2278.67" table:style-name="ce1">
            <text:p>2278.67</text:p>
          </table:table-cell>
          <table:table-cell office:value-type="float" office:value="2476.8000000000002" table:style-name="ce1">
            <text:p>2476.8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05-09T00:00:00" table:style-name="ce2">
            <text:p>09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8070.39" table:style-name="ce1">
            <text:p>8070.39</text:p>
          </table:table-cell>
          <table:table-cell office:value-type="string" office:string-value="High" table:formula="of:=IF([.E485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ood</text:p>
          </table:table-cell>
          <table:table-cell office:value-type="float" office:value="1311.01" table:style-name="ce1">
            <text:p>1311.01</text:p>
          </table:table-cell>
          <table:table-cell office:value-type="float" office:value="1538.79" table:style-name="ce1">
            <text:p>1538.79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8-05T00:00:00" table:style-name="ce2">
            <text:p>05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8247.5400000000009" table:style-name="ce1">
            <text:p>8247.54</text:p>
          </table:table-cell>
          <table:table-cell office:value-type="string" office:string-value="High" table:formula="of:=IF([.E486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od</text:p>
          </table:table-cell>
          <table:table-cell office:value-type="float" office:value="1791.83" table:style-name="ce1">
            <text:p>1791.83</text:p>
          </table:table-cell>
          <table:table-cell office:value-type="float" office:value="1871.22" table:style-name="ce1">
            <text:p>1871.22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3-02T00:00:00" table:style-name="ce2">
            <text:p>02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9333.83" table:style-name="ce1">
            <text:p>9333.83</text:p>
          </table:table-cell>
          <table:table-cell office:value-type="string" office:string-value="High" table:formula="of:=IF([.E487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ood</text:p>
          </table:table-cell>
          <table:table-cell office:value-type="float" office:value="3542.8" table:style-name="ce1">
            <text:p>3542.8</text:p>
          </table:table-cell>
          <table:table-cell office:value-type="float" office:value="3603.02" table:style-name="ce1">
            <text:p>3603.02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4-14T00:00:00" table:style-name="ce2">
            <text:p>14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5488.11" table:style-name="ce1">
            <text:p>5488.11</text:p>
          </table:table-cell>
          <table:table-cell office:value-type="string" office:string-value="High" table:formula="of:=IF([.E488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office:value-type="float" office:value="2631.68" table:style-name="ce1">
            <text:p>2631.68</text:p>
          </table:table-cell>
          <table:table-cell office:value-type="float" office:value="2904.06" table:style-name="ce1">
            <text:p>2904.06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date" office:date-value="2023-02-11T00:00:00" table:style-name="ce2">
            <text:p>11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2082.79" table:style-name="ce1">
            <text:p>2082.79</text:p>
          </table:table-cell>
          <table:table-cell office:value-type="string" office:string-value="Low" table:formula="of:=IF([.E489]&gt;[.$E$1003];&quot;High&quot;;&quot;Low&quot;)" table:style-name="ce1">
            <text:p>Low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lectronics</text:p>
          </table:table-cell>
          <table:table-cell office:value-type="float" office:value="667" table:style-name="ce1">
            <text:p>667</text:p>
          </table:table-cell>
          <table:table-cell office:value-type="float" office:value="718.72" table:style-name="ce1">
            <text:p>718.72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1-25T00:00:00" table:style-name="ce2">
            <text:p>25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6206.16" table:style-name="ce1">
            <text:p>6206.16</text:p>
          </table:table-cell>
          <table:table-cell office:value-type="string" office:string-value="High" table:formula="of:=IF([.E490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lothing</text:p>
          </table:table-cell>
          <table:table-cell office:value-type="float" office:value="4809" table:style-name="ce1">
            <text:p>4809</text:p>
          </table:table-cell>
          <table:table-cell office:value-type="float" office:value="4967.4399999999996" table:style-name="ce1">
            <text:p>4967.44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02-08T00:00:00" table:style-name="ce2">
            <text:p>08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7454.53" table:style-name="ce1">
            <text:p>7454.53</text:p>
          </table:table-cell>
          <table:table-cell office:value-type="string" office:string-value="High" table:formula="of:=IF([.E491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lothing</text:p>
          </table:table-cell>
          <table:table-cell office:value-type="float" office:value="3197.76" table:style-name="ce1">
            <text:p>3197.76</text:p>
          </table:table-cell>
          <table:table-cell office:value-type="float" office:value="3572.61" table:style-name="ce1">
            <text:p>3572.61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10-18T00:00:00" table:style-name="ce2">
            <text:p>18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405.38" table:style-name="ce1">
            <text:p>7405.38</text:p>
          </table:table-cell>
          <table:table-cell office:value-type="string" office:string-value="High" table:formula="of:=IF([.E492]&gt;[.$E$1003];&quot;High&quot;;&quot;Low&quot;)" table:style-name="ce1">
            <text:p>Hig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ood</text:p>
          </table:table-cell>
          <table:table-cell office:value-type="float" office:value="3841.05" table:style-name="ce1">
            <text:p>3841.05</text:p>
          </table:table-cell>
          <table:table-cell office:value-type="float" office:value="4323.62" table:style-name="ce1">
            <text:p>4323.62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5-11T00:00:00" table:style-name="ce2">
            <text:p>11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5262.35" table:style-name="ce1">
            <text:p>5262.35</text:p>
          </table:table-cell>
          <table:table-cell office:value-type="string" office:string-value="High" table:formula="of:=IF([.E493]&gt;[.$E$1003];&quot;High&quot;;&quot;Low&quot;)" table:style-name="ce1">
            <text:p>Hig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lothing</text:p>
          </table:table-cell>
          <table:table-cell office:value-type="float" office:value="442.11" table:style-name="ce1">
            <text:p>442.11</text:p>
          </table:table-cell>
          <table:table-cell office:value-type="float" office:value="803.87" table:style-name="ce1">
            <text:p>803.87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8-17T00:00:00" table:style-name="ce2">
            <text:p>17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777.74" table:style-name="ce1">
            <text:p>777.74</text:p>
          </table:table-cell>
          <table:table-cell office:value-type="string" office:string-value="Low" table:formula="of:=IF([.E494]&gt;[.$E$1003];&quot;High&quot;;&quot;Low&quot;)" table:style-name="ce1">
            <text:p>Lo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ood</text:p>
          </table:table-cell>
          <table:table-cell office:value-type="float" office:value="282.94" table:style-name="ce1">
            <text:p>282.94</text:p>
          </table:table-cell>
          <table:table-cell office:value-type="float" office:value="779.32999999999902" table:style-name="ce1">
            <text:p>779.33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04-18T00:00:00" table:style-name="ce2">
            <text:p>18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3774.02" table:style-name="ce1">
            <text:p>3774.02</text:p>
          </table:table-cell>
          <table:table-cell office:value-type="string" office:string-value="Low" table:formula="of:=IF([.E495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ectronics</text:p>
          </table:table-cell>
          <table:table-cell office:value-type="float" office:value="146.27000000000001" table:style-name="ce1">
            <text:p>146.27</text:p>
          </table:table-cell>
          <table:table-cell office:value-type="float" office:value="498.46" table:style-name="ce1">
            <text:p>498.46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date" office:date-value="2023-06-21T00:00:00" table:style-name="ce2">
            <text:p>21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9215.59" table:style-name="ce1">
            <text:p>9215.59</text:p>
          </table:table-cell>
          <table:table-cell office:value-type="string" office:string-value="High" table:formula="of:=IF([.E496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lectronics</text:p>
          </table:table-cell>
          <table:table-cell office:value-type="float" office:value="984.53" table:style-name="ce1">
            <text:p>984.53</text:p>
          </table:table-cell>
          <table:table-cell office:value-type="float" office:value="1138.49" table:style-name="ce1">
            <text:p>1138.49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04-12T00:00:00" table:style-name="ce2">
            <text:p>12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5886.04" table:style-name="ce1">
            <text:p>5886.04</text:p>
          </table:table-cell>
          <table:table-cell office:value-type="string" office:string-value="High" table:formula="of:=IF([.E497]&gt;[.$E$1003];&quot;High&quot;;&quot;Low&quot;)" table:style-name="ce1">
            <text:p>High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lectronics</text:p>
          </table:table-cell>
          <table:table-cell office:value-type="float" office:value="2101.3200000000002" table:style-name="ce1">
            <text:p>2101.32</text:p>
          </table:table-cell>
          <table:table-cell office:value-type="float" office:value="2440.63" table:style-name="ce1">
            <text:p>2440.63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12-20T00:00:00" table:style-name="ce2">
            <text:p>20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5429.49" table:style-name="ce1">
            <text:p>5429.49</text:p>
          </table:table-cell>
          <table:table-cell office:value-type="string" office:string-value="High" table:formula="of:=IF([.E498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urniture</text:p>
          </table:table-cell>
          <table:table-cell office:value-type="float" office:value="4682.34" table:style-name="ce1">
            <text:p>4682.34</text:p>
          </table:table-cell>
          <table:table-cell office:value-type="float" office:value="5036.3999999999996" table:style-name="ce1">
            <text:p>5036.4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date" office:date-value="2023-01-12T00:00:00" table:style-name="ce2">
            <text:p>12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761.65" table:style-name="ce1">
            <text:p>2761.65</text:p>
          </table:table-cell>
          <table:table-cell office:value-type="string" office:string-value="Low" table:formula="of:=IF([.E499]&gt;[.$E$1003];&quot;High&quot;;&quot;Low&quot;)" table:style-name="ce1">
            <text:p>Low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ood</text:p>
          </table:table-cell>
          <table:table-cell office:value-type="float" office:value="2312.4499999999998" table:style-name="ce1">
            <text:p>2312.45</text:p>
          </table:table-cell>
          <table:table-cell office:value-type="float" office:value="2504.6" table:style-name="ce1">
            <text:p>2504.6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10-02T00:00:00" table:style-name="ce2">
            <text:p>02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3747.64" table:style-name="ce1">
            <text:p>3747.64</text:p>
          </table:table-cell>
          <table:table-cell office:value-type="string" office:string-value="Low" table:formula="of:=IF([.E500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lectronics</text:p>
          </table:table-cell>
          <table:table-cell office:value-type="float" office:value="1486.76" table:style-name="ce1">
            <text:p>1486.76</text:p>
          </table:table-cell>
          <table:table-cell office:value-type="float" office:value="1505.44" table:style-name="ce1">
            <text:p>1505.44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4-11T00:00:00" table:style-name="ce2">
            <text:p>11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8963.93" table:style-name="ce1">
            <text:p>8963.93</text:p>
          </table:table-cell>
          <table:table-cell office:value-type="string" office:string-value="High" table:formula="of:=IF([.E501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ood</text:p>
          </table:table-cell>
          <table:table-cell office:value-type="float" office:value="2831.58" table:style-name="ce1">
            <text:p>2831.58</text:p>
          </table:table-cell>
          <table:table-cell office:value-type="float" office:value="3186.15" table:style-name="ce1">
            <text:p>3186.15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date" office:date-value="2023-02-13T00:00:00" table:style-name="ce2">
            <text:p>13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6697.98" table:style-name="ce1">
            <text:p>6697.98</text:p>
          </table:table-cell>
          <table:table-cell office:value-type="string" office:string-value="High" table:formula="of:=IF([.E502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othing</text:p>
          </table:table-cell>
          <table:table-cell office:value-type="float" office:value="604.08000000000004" table:style-name="ce1">
            <text:p>604.08</text:p>
          </table:table-cell>
          <table:table-cell office:value-type="float" office:value="624.71" table:style-name="ce1">
            <text:p>624.71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7895.13" table:style-name="ce1">
            <text:p>7895.13</text:p>
          </table:table-cell>
          <table:table-cell office:value-type="string" office:string-value="High" table:formula="of:=IF([.E503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lothing</text:p>
          </table:table-cell>
          <table:table-cell office:value-type="float" office:value="3067.05" table:style-name="ce1">
            <text:p>3067.05</text:p>
          </table:table-cell>
          <table:table-cell office:value-type="float" office:value="3386.33" table:style-name="ce1">
            <text:p>3386.33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1-17T00:00:00" table:style-name="ce2">
            <text:p>17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4598.0200000000004" table:style-name="ce1">
            <text:p>4598.02</text:p>
          </table:table-cell>
          <table:table-cell office:value-type="string" office:string-value="Low" table:formula="of:=IF([.E504]&gt;[.$E$1003];&quot;High&quot;;&quot;Low&quot;)" table:style-name="ce1">
            <text:p>Low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lectronics</text:p>
          </table:table-cell>
          <table:table-cell office:value-type="float" office:value="2863.74" table:style-name="ce1">
            <text:p>2863.74</text:p>
          </table:table-cell>
          <table:table-cell office:value-type="float" office:value="2953.91" table:style-name="ce1">
            <text:p>2953.91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11-26T00:00:00" table:style-name="ce2">
            <text:p>26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6339.45" table:style-name="ce1">
            <text:p>6339.45</text:p>
          </table:table-cell>
          <table:table-cell office:value-type="string" office:string-value="High" table:formula="of:=IF([.E505]&gt;[.$E$1003];&quot;High&quot;;&quot;Low&quot;)" table:style-name="ce1">
            <text:p>Hig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ood</text:p>
          </table:table-cell>
          <table:table-cell office:value-type="float" office:value="3970.37" table:style-name="ce1">
            <text:p>3970.37</text:p>
          </table:table-cell>
          <table:table-cell office:value-type="float" office:value="4257.5199999999904" table:style-name="ce1">
            <text:p>4257.52</text:p>
          </table:table-cell>
          <table:table-cell office:value-type="string" table:style-name="ce1">
            <text:p>New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2-26T00:00:00" table:style-name="ce2">
            <text:p>26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2559" table:style-name="ce1">
            <text:p>2559</text:p>
          </table:table-cell>
          <table:table-cell office:value-type="string" office:string-value="Low" table:formula="of:=IF([.E506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lectronics</text:p>
          </table:table-cell>
          <table:table-cell office:value-type="float" office:value="4934.1000000000004" table:style-name="ce1">
            <text:p>4934.1</text:p>
          </table:table-cell>
          <table:table-cell office:value-type="float" office:value="5191.0200000000004" table:style-name="ce1">
            <text:p>5191.02</text:p>
          </table:table-cell>
          <table:table-cell office:value-type="string" table:style-name="ce1">
            <text:p>New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7084.06" table:style-name="ce1">
            <text:p>7084.06</text:p>
          </table:table-cell>
          <table:table-cell office:value-type="string" office:string-value="High" table:formula="of:=IF([.E507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lothing</text:p>
          </table:table-cell>
          <table:table-cell office:value-type="float" office:value="1291.82" table:style-name="ce1">
            <text:p>1291.82</text:p>
          </table:table-cell>
          <table:table-cell office:value-type="float" office:value="1308.4399999999901" table:style-name="ce1">
            <text:p>1308.44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4333.25" table:style-name="ce1">
            <text:p>4333.25</text:p>
          </table:table-cell>
          <table:table-cell office:value-type="string" office:string-value="Low" table:formula="of:=IF([.E508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lectronics</text:p>
          </table:table-cell>
          <table:table-cell office:value-type="float" office:value="2572.8000000000002" table:style-name="ce1">
            <text:p>2572.8</text:p>
          </table:table-cell>
          <table:table-cell office:value-type="float" office:value="2760.6" table:style-name="ce1">
            <text:p>2760.6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date" office:date-value="2023-01-12T00:00:00" table:style-name="ce2">
            <text:p>12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4481.2" table:style-name="ce1">
            <text:p>4481.2</text:p>
          </table:table-cell>
          <table:table-cell office:value-type="string" office:string-value="Low" table:formula="of:=IF([.E509]&gt;[.$E$1003];&quot;High&quot;;&quot;Low&quot;)" table:style-name="ce1">
            <text:p>Low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ood</text:p>
          </table:table-cell>
          <table:table-cell office:value-type="float" office:value="4548.88" table:style-name="ce1">
            <text:p>4548.88</text:p>
          </table:table-cell>
          <table:table-cell office:value-type="float" office:value="4853.41" table:style-name="ce1">
            <text:p>4853.41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6528.29" table:style-name="ce1">
            <text:p>6528.29</text:p>
          </table:table-cell>
          <table:table-cell office:value-type="string" office:string-value="High" table:formula="of:=IF([.E510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3936.69" table:style-name="ce1">
            <text:p>3936.69</text:p>
          </table:table-cell>
          <table:table-cell office:value-type="float" office:value="4362.51" table:style-name="ce1">
            <text:p>4362.51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03-21T00:00:00" table:style-name="ce2">
            <text:p>21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9369.18" table:style-name="ce1">
            <text:p>9369.18</text:p>
          </table:table-cell>
          <table:table-cell office:value-type="string" office:string-value="High" table:formula="of:=IF([.E511]&gt;[.$E$1003];&quot;High&quot;;&quot;Low&quot;)" table:style-name="ce1">
            <text:p>High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urniture</text:p>
          </table:table-cell>
          <table:table-cell office:value-type="float" office:value="2462.66" table:style-name="ce1">
            <text:p>2462.66</text:p>
          </table:table-cell>
          <table:table-cell office:value-type="float" office:value="2908.0899999999901" table:style-name="ce1">
            <text:p>2908.09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8-04T00:00:00" table:style-name="ce2">
            <text:p>04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733.66" table:style-name="ce1">
            <text:p>733.66</text:p>
          </table:table-cell>
          <table:table-cell office:value-type="string" office:string-value="Low" table:formula="of:=IF([.E512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lothing</text:p>
          </table:table-cell>
          <table:table-cell office:value-type="float" office:value="4729.59" table:style-name="ce1">
            <text:p>4729.59</text:p>
          </table:table-cell>
          <table:table-cell office:value-type="float" office:value="4976.68" table:style-name="ce1">
            <text:p>4976.68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date" office:date-value="2023-12-05T00:00:00" table:style-name="ce2">
            <text:p>05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8264.9599999999991" table:style-name="ce1">
            <text:p>8264.96</text:p>
          </table:table-cell>
          <table:table-cell office:value-type="string" office:string-value="High" table:formula="of:=IF([.E513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urniture</text:p>
          </table:table-cell>
          <table:table-cell office:value-type="float" office:value="333.32" table:style-name="ce1">
            <text:p>333.32</text:p>
          </table:table-cell>
          <table:table-cell office:value-type="float" office:value="700.25" table:style-name="ce1">
            <text:p>700.25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994.59" table:style-name="ce1">
            <text:p>2994.59</text:p>
          </table:table-cell>
          <table:table-cell office:value-type="string" office:string-value="Low" table:formula="of:=IF([.E514]&gt;[.$E$1003];&quot;High&quot;;&quot;Low&quot;)" table:style-name="ce1">
            <text:p>Low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lectronics</text:p>
          </table:table-cell>
          <table:table-cell office:value-type="float" office:value="4658.4399999999996" table:style-name="ce1">
            <text:p>4658.44</text:p>
          </table:table-cell>
          <table:table-cell office:value-type="float" office:value="4823.5" table:style-name="ce1">
            <text:p>4823.5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05-29T00:00:00" table:style-name="ce2">
            <text:p>29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4494.8" table:style-name="ce1">
            <text:p>4494.8</text:p>
          </table:table-cell>
          <table:table-cell office:value-type="string" office:string-value="Low" table:formula="of:=IF([.E515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lectronics</text:p>
          </table:table-cell>
          <table:table-cell office:value-type="float" office:value="300.01" table:style-name="ce1">
            <text:p>300.01</text:p>
          </table:table-cell>
          <table:table-cell office:value-type="float" office:value="477.67999999999898" table:style-name="ce1">
            <text:p>477.68</text:p>
          </table:table-cell>
          <table:table-cell office:value-type="string" table:style-name="ce1">
            <text:p>New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date" office:date-value="2023-03-22T00:00:00" table:style-name="ce2">
            <text:p>22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316.94" table:style-name="ce1">
            <text:p>316.94</text:p>
          </table:table-cell>
          <table:table-cell office:value-type="string" office:string-value="Low" table:formula="of:=IF([.E516]&gt;[.$E$1003];&quot;High&quot;;&quot;Low&quot;)" table:style-name="ce1">
            <text:p>Low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ood</text:p>
          </table:table-cell>
          <table:table-cell office:value-type="float" office:value="2759.16" table:style-name="ce1">
            <text:p>2759.16</text:p>
          </table:table-cell>
          <table:table-cell office:value-type="float" office:value="2864.45" table:style-name="ce1">
            <text:p>2864.45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3080.36" table:style-name="ce1">
            <text:p>3080.36</text:p>
          </table:table-cell>
          <table:table-cell office:value-type="string" office:string-value="Low" table:formula="of:=IF([.E517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4457.68" table:style-name="ce1">
            <text:p>4457.68</text:p>
          </table:table-cell>
          <table:table-cell office:value-type="float" office:value="4743.03" table:style-name="ce1">
            <text:p>4743.03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7-17T00:00:00" table:style-name="ce2">
            <text:p>17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5076.05" table:style-name="ce1">
            <text:p>5076.05</text:p>
          </table:table-cell>
          <table:table-cell office:value-type="string" office:string-value="High" table:formula="of:=IF([.E518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lectronics</text:p>
          </table:table-cell>
          <table:table-cell office:value-type="float" office:value="1350.47" table:style-name="ce1">
            <text:p>1350.47</text:p>
          </table:table-cell>
          <table:table-cell office:value-type="float" office:value="1514.61" table:style-name="ce1">
            <text:p>1514.61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7-19T00:00:00" table:style-name="ce2">
            <text:p>19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656.14" table:style-name="ce1">
            <text:p>656.14</text:p>
          </table:table-cell>
          <table:table-cell office:value-type="string" office:string-value="Low" table:formula="of:=IF([.E519]&gt;[.$E$1003];&quot;High&quot;;&quot;Low&quot;)" table:style-name="ce1">
            <text:p>Lo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rniture</text:p>
          </table:table-cell>
          <table:table-cell office:value-type="float" office:value="2387.63" table:style-name="ce1">
            <text:p>2387.63</text:p>
          </table:table-cell>
          <table:table-cell office:value-type="float" office:value="2438.9699999999998" table:style-name="ce1">
            <text:p>2438.97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01-25T00:00:00" table:style-name="ce2">
            <text:p>25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4961.8500000000004" table:style-name="ce1">
            <text:p>4961.85</text:p>
          </table:table-cell>
          <table:table-cell office:value-type="string" office:string-value="Low" table:formula="of:=IF([.E520]&gt;[.$E$1003];&quot;High&quot;;&quot;Low&quot;)" table:style-name="ce1">
            <text:p>Lo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lectronics</text:p>
          </table:table-cell>
          <table:table-cell office:value-type="float" office:value="1655.43" table:style-name="ce1">
            <text:p>1655.43</text:p>
          </table:table-cell>
          <table:table-cell office:value-type="float" office:value="2001.08" table:style-name="ce1">
            <text:p>2001.08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date" office:date-value="2023-03-30T00:00:00" table:style-name="ce2">
            <text:p>30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9278.4" table:style-name="ce1">
            <text:p>9278.4</text:p>
          </table:table-cell>
          <table:table-cell office:value-type="string" office:string-value="High" table:formula="of:=IF([.E521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4763.1099999999997" table:style-name="ce1">
            <text:p>4763.11</text:p>
          </table:table-cell>
          <table:table-cell office:value-type="float" office:value="5119.91" table:style-name="ce1">
            <text:p>5119.91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9-25T00:00:00" table:style-name="ce2">
            <text:p>25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1143.3900000000001" table:style-name="ce1">
            <text:p>1143.39</text:p>
          </table:table-cell>
          <table:table-cell office:value-type="string" office:string-value="Low" table:formula="of:=IF([.E522]&gt;[.$E$1003];&quot;High&quot;;&quot;Low&quot;)" table:style-name="ce1">
            <text:p>Low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lectronics</text:p>
          </table:table-cell>
          <table:table-cell office:value-type="float" office:value="4127.05" table:style-name="ce1">
            <text:p>4127.05</text:p>
          </table:table-cell>
          <table:table-cell office:value-type="float" office:value="4313.45" table:style-name="ce1">
            <text:p>4313.45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date" office:date-value="2023-05-23T00:00:00" table:style-name="ce2">
            <text:p>23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7667.96" table:style-name="ce1">
            <text:p>7667.96</text:p>
          </table:table-cell>
          <table:table-cell office:value-type="string" office:string-value="High" table:formula="of:=IF([.E523]&gt;[.$E$1003];&quot;High&quot;;&quot;Low&quot;)" table:style-name="ce1">
            <text:p>High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ood</text:p>
          </table:table-cell>
          <table:table-cell office:value-type="float" office:value="3559.56" table:style-name="ce1">
            <text:p>3559.56</text:p>
          </table:table-cell>
          <table:table-cell office:value-type="float" office:value="3607.15" table:style-name="ce1">
            <text:p>3607.15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2-28T00:00:00" table:style-name="ce2">
            <text:p>28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155.74" table:style-name="ce1">
            <text:p>4155.74</text:p>
          </table:table-cell>
          <table:table-cell office:value-type="string" office:string-value="Low" table:formula="of:=IF([.E524]&gt;[.$E$1003];&quot;High&quot;;&quot;Low&quot;)" table:style-name="ce1">
            <text:p>Lo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othing</text:p>
          </table:table-cell>
          <table:table-cell office:value-type="float" office:value="2958.75" table:style-name="ce1">
            <text:p>2958.75</text:p>
          </table:table-cell>
          <table:table-cell office:value-type="float" office:value="3177.64" table:style-name="ce1">
            <text:p>3177.64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date" office:date-value="2023-12-31T00:00:00" table:style-name="ce2">
            <text:p>31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6586.22" table:style-name="ce1">
            <text:p>6586.22</text:p>
          </table:table-cell>
          <table:table-cell office:value-type="string" office:string-value="High" table:formula="of:=IF([.E525]&gt;[.$E$1003];&quot;High&quot;;&quot;Low&quot;)" table:style-name="ce1">
            <text:p>Hig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ood</text:p>
          </table:table-cell>
          <table:table-cell office:value-type="float" office:value="4111.93" table:style-name="ce1">
            <text:p>4111.93</text:p>
          </table:table-cell>
          <table:table-cell office:value-type="float" office:value="4338.67" table:style-name="ce1">
            <text:p>4338.67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1-26T00:00:00" table:style-name="ce2">
            <text:p>26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676.34" table:style-name="ce1">
            <text:p>2676.34</text:p>
          </table:table-cell>
          <table:table-cell office:value-type="string" office:string-value="Low" table:formula="of:=IF([.E526]&gt;[.$E$1003];&quot;High&quot;;&quot;Low&quot;)" table:style-name="ce1">
            <text:p>Low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lothing</text:p>
          </table:table-cell>
          <table:table-cell office:value-type="float" office:value="1991.72" table:style-name="ce1">
            <text:p>1991.72</text:p>
          </table:table-cell>
          <table:table-cell office:value-type="float" office:value="2329.37" table:style-name="ce1">
            <text:p>2329.37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1678.97" table:style-name="ce1">
            <text:p>1678.97</text:p>
          </table:table-cell>
          <table:table-cell office:value-type="string" office:string-value="Low" table:formula="of:=IF([.E527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2265.38" table:style-name="ce1">
            <text:p>2265.38</text:p>
          </table:table-cell>
          <table:table-cell office:value-type="float" office:value="2429.9299999999998" table:style-name="ce1">
            <text:p>2429.93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10-15T00:00:00" table:style-name="ce2">
            <text:p>15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1688.58" table:style-name="ce1">
            <text:p>1688.58</text:p>
          </table:table-cell>
          <table:table-cell office:value-type="string" office:string-value="Low" table:formula="of:=IF([.E528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ood</text:p>
          </table:table-cell>
          <table:table-cell office:value-type="float" office:value="3663.51" table:style-name="ce1">
            <text:p>3663.51</text:p>
          </table:table-cell>
          <table:table-cell office:value-type="float" office:value="4007.98" table:style-name="ce1">
            <text:p>4007.98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date" office:date-value="2023-09-23T00:00:00" table:style-name="ce2">
            <text:p>23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797.87" table:style-name="ce1">
            <text:p>797.87</text:p>
          </table:table-cell>
          <table:table-cell office:value-type="string" office:string-value="Low" table:formula="of:=IF([.E529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lectronics</text:p>
          </table:table-cell>
          <table:table-cell office:value-type="float" office:value="1820.89" table:style-name="ce1">
            <text:p>1820.89</text:p>
          </table:table-cell>
          <table:table-cell office:value-type="float" office:value="2257.92" table:style-name="ce1">
            <text:p>2257.92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date" office:date-value="2023-01-16T00:00:00" table:style-name="ce2">
            <text:p>16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1937.9" table:style-name="ce1">
            <text:p>1937.9</text:p>
          </table:table-cell>
          <table:table-cell office:value-type="string" office:string-value="Low" table:formula="of:=IF([.E530]&gt;[.$E$1003];&quot;High&quot;;&quot;Low&quot;)" table:style-name="ce1">
            <text:p>Low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urniture</text:p>
          </table:table-cell>
          <table:table-cell office:value-type="float" office:value="366.31" table:style-name="ce1">
            <text:p>366.31</text:p>
          </table:table-cell>
          <table:table-cell office:value-type="float" office:value="492.68" table:style-name="ce1">
            <text:p>492.68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07-18T00:00:00" table:style-name="ce2">
            <text:p>18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6675.77" table:style-name="ce1">
            <text:p>6675.77</text:p>
          </table:table-cell>
          <table:table-cell office:value-type="string" office:string-value="High" table:formula="of:=IF([.E531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lectronics</text:p>
          </table:table-cell>
          <table:table-cell office:value-type="float" office:value="417.96" table:style-name="ce1">
            <text:p>417.96</text:p>
          </table:table-cell>
          <table:table-cell office:value-type="float" office:value="907.63" table:style-name="ce1">
            <text:p>907.63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10-09T00:00:00" table:style-name="ce2">
            <text:p>09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8828.74" table:style-name="ce1">
            <text:p>8828.74</text:p>
          </table:table-cell>
          <table:table-cell office:value-type="string" office:string-value="High" table:formula="of:=IF([.E532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lothing</text:p>
          </table:table-cell>
          <table:table-cell office:value-type="float" office:value="621.04999999999995" table:style-name="ce1">
            <text:p>621.05</text:p>
          </table:table-cell>
          <table:table-cell office:value-type="float" office:value="820.36999999999898" table:style-name="ce1">
            <text:p>820.37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date" office:date-value="2023-03-27T00:00:00" table:style-name="ce2">
            <text:p>27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8159.84" table:style-name="ce1">
            <text:p>8159.84</text:p>
          </table:table-cell>
          <table:table-cell office:value-type="string" office:string-value="High" table:formula="of:=IF([.E533]&gt;[.$E$1003];&quot;High&quot;;&quot;Low&quot;)" table:style-name="ce1">
            <text:p>Hig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lothing</text:p>
          </table:table-cell>
          <table:table-cell office:value-type="float" office:value="4354.92" table:style-name="ce1">
            <text:p>4354.92</text:p>
          </table:table-cell>
          <table:table-cell office:value-type="float" office:value="4495.88" table:style-name="ce1">
            <text:p>4495.88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09-07T00:00:00" table:style-name="ce2">
            <text:p>07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6882.83" table:style-name="ce1">
            <text:p>6882.83</text:p>
          </table:table-cell>
          <table:table-cell office:value-type="string" office:string-value="High" table:formula="of:=IF([.E534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lectronics</text:p>
          </table:table-cell>
          <table:table-cell office:value-type="float" office:value="2387.52" table:style-name="ce1">
            <text:p>2387.52</text:p>
          </table:table-cell>
          <table:table-cell office:value-type="float" office:value="2604.06" table:style-name="ce1">
            <text:p>2604.06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9-27T00:00:00" table:style-name="ce2">
            <text:p>27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1193.28" table:style-name="ce1">
            <text:p>1193.28</text:p>
          </table:table-cell>
          <table:table-cell office:value-type="string" office:string-value="Low" table:formula="of:=IF([.E535]&gt;[.$E$1003];&quot;High&quot;;&quot;Low&quot;)" table:style-name="ce1">
            <text:p>Low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lectronics</text:p>
          </table:table-cell>
          <table:table-cell office:value-type="float" office:value="3578.77" table:style-name="ce1">
            <text:p>3578.77</text:p>
          </table:table-cell>
          <table:table-cell office:value-type="float" office:value="3635.02" table:style-name="ce1">
            <text:p>3635.02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12-01T00:00:00" table:style-name="ce2">
            <text:p>01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2962.96" table:style-name="ce1">
            <text:p>2962.96</text:p>
          </table:table-cell>
          <table:table-cell office:value-type="string" office:string-value="Low" table:formula="of:=IF([.E536]&gt;[.$E$1003];&quot;High&quot;;&quot;Low&quot;)" table:style-name="ce1">
            <text:p>Low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urniture</text:p>
          </table:table-cell>
          <table:table-cell office:value-type="float" office:value="1994.9" table:style-name="ce1">
            <text:p>1994.9</text:p>
          </table:table-cell>
          <table:table-cell office:value-type="float" office:value="2066.5" table:style-name="ce1">
            <text:p>2066.5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4-27T00:00:00" table:style-name="ce2">
            <text:p>27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3167.09" table:style-name="ce1">
            <text:p>3167.09</text:p>
          </table:table-cell>
          <table:table-cell office:value-type="string" office:string-value="Low" table:formula="of:=IF([.E537]&gt;[.$E$1003];&quot;High&quot;;&quot;Low&quot;)" table:style-name="ce1">
            <text:p>Lo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nics</text:p>
          </table:table-cell>
          <table:table-cell office:value-type="float" office:value="1330.62" table:style-name="ce1">
            <text:p>1330.62</text:p>
          </table:table-cell>
          <table:table-cell office:value-type="float" office:value="1543.6899999999901" table:style-name="ce1">
            <text:p>1543.69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01-07T00:00:00" table:style-name="ce2">
            <text:p>07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2574.5700000000002" table:style-name="ce1">
            <text:p>2574.57</text:p>
          </table:table-cell>
          <table:table-cell office:value-type="string" office:string-value="Low" table:formula="of:=IF([.E538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ood</text:p>
          </table:table-cell>
          <table:table-cell office:value-type="float" office:value="1768.6" table:style-name="ce1">
            <text:p>1768.6</text:p>
          </table:table-cell>
          <table:table-cell office:value-type="float" office:value="2152.1999999999998" table:style-name="ce1">
            <text:p>2152.2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05-17T00:00:00" table:style-name="ce2">
            <text:p>17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5198.5600000000004" table:style-name="ce1">
            <text:p>5198.56</text:p>
          </table:table-cell>
          <table:table-cell office:value-type="string" office:string-value="High" table:formula="of:=IF([.E539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ood</text:p>
          </table:table-cell>
          <table:table-cell office:value-type="float" office:value="3981.2" table:style-name="ce1">
            <text:p>3981.2</text:p>
          </table:table-cell>
          <table:table-cell office:value-type="float" office:value="4432.3499999999904" table:style-name="ce1">
            <text:p>4432.35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6-25T00:00:00" table:style-name="ce2">
            <text:p>25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5401.98" table:style-name="ce1">
            <text:p>5401.98</text:p>
          </table:table-cell>
          <table:table-cell office:value-type="string" office:string-value="High" table:formula="of:=IF([.E540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office:value-type="float" office:value="3144.82" table:style-name="ce1">
            <text:p>3144.82</text:p>
          </table:table-cell>
          <table:table-cell office:value-type="float" office:value="3480.58" table:style-name="ce1">
            <text:p>3480.58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11-24T00:00:00" table:style-name="ce2">
            <text:p>24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633.17" table:style-name="ce1">
            <text:p>3633.17</text:p>
          </table:table-cell>
          <table:table-cell office:value-type="string" office:string-value="Low" table:formula="of:=IF([.E541]&gt;[.$E$1003];&quot;High&quot;;&quot;Low&quot;)" table:style-name="ce1">
            <text:p>Low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ood</text:p>
          </table:table-cell>
          <table:table-cell office:value-type="float" office:value="4691.32" table:style-name="ce1">
            <text:p>4691.32</text:p>
          </table:table-cell>
          <table:table-cell office:value-type="float" office:value="4752.88" table:style-name="ce1">
            <text:p>4752.88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date" office:date-value="2023-11-11T00:00:00" table:style-name="ce2">
            <text:p>11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3602.51" table:style-name="ce1">
            <text:p>3602.51</text:p>
          </table:table-cell>
          <table:table-cell office:value-type="string" office:string-value="Low" table:formula="of:=IF([.E542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onics</text:p>
          </table:table-cell>
          <table:table-cell office:value-type="float" office:value="3414.54" table:style-name="ce1">
            <text:p>3414.54</text:p>
          </table:table-cell>
          <table:table-cell office:value-type="float" office:value="3753.83" table:style-name="ce1">
            <text:p>3753.83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8302.7000000000007" table:style-name="ce1">
            <text:p>8302.7</text:p>
          </table:table-cell>
          <table:table-cell office:value-type="string" office:string-value="High" table:formula="of:=IF([.E543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2872.4" table:style-name="ce1">
            <text:p>2872.4</text:p>
          </table:table-cell>
          <table:table-cell office:value-type="float" office:value="3193.76" table:style-name="ce1">
            <text:p>3193.76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3-23T00:00:00" table:style-name="ce2">
            <text:p>23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7914" table:style-name="ce1">
            <text:p>7914</text:p>
          </table:table-cell>
          <table:table-cell office:value-type="string" office:string-value="High" table:formula="of:=IF([.E544]&gt;[.$E$1003];&quot;High&quot;;&quot;Low&quot;)" table:style-name="ce1">
            <text:p>High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ood</text:p>
          </table:table-cell>
          <table:table-cell office:value-type="float" office:value="3070.47" table:style-name="ce1">
            <text:p>3070.47</text:p>
          </table:table-cell>
          <table:table-cell office:value-type="float" office:value="3475.29" table:style-name="ce1">
            <text:p>3475.29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08-11T00:00:00" table:style-name="ce2">
            <text:p>11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3147.18" table:style-name="ce1">
            <text:p>3147.18</text:p>
          </table:table-cell>
          <table:table-cell office:value-type="string" office:string-value="Low" table:formula="of:=IF([.E545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od</text:p>
          </table:table-cell>
          <table:table-cell office:value-type="float" office:value="4714.74" table:style-name="ce1">
            <text:p>4714.74</text:p>
          </table:table-cell>
          <table:table-cell office:value-type="float" office:value="5129.1099999999997" table:style-name="ce1">
            <text:p>5129.11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date" office:date-value="2023-04-13T00:00:00" table:style-name="ce2">
            <text:p>13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9146.51" table:style-name="ce1">
            <text:p>9146.51</text:p>
          </table:table-cell>
          <table:table-cell office:value-type="string" office:string-value="High" table:formula="of:=IF([.E546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lectronics</text:p>
          </table:table-cell>
          <table:table-cell office:value-type="float" office:value="3951.59" table:style-name="ce1">
            <text:p>3951.59</text:p>
          </table:table-cell>
          <table:table-cell office:value-type="float" office:value="4387.01" table:style-name="ce1">
            <text:p>4387.01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date" office:date-value="2023-09-30T00:00:00" table:style-name="ce2">
            <text:p>30/09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9532.8700000000008" table:style-name="ce1">
            <text:p>9532.87</text:p>
          </table:table-cell>
          <table:table-cell office:value-type="string" office:string-value="High" table:formula="of:=IF([.E547]&gt;[.$E$1003];&quot;High&quot;;&quot;Low&quot;)" table:style-name="ce1">
            <text:p>High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ood</text:p>
          </table:table-cell>
          <table:table-cell office:value-type="float" office:value="169" table:style-name="ce1">
            <text:p>169</text:p>
          </table:table-cell>
          <table:table-cell office:value-type="float" office:value="381.91999999999899" table:style-name="ce1">
            <text:p>381.92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1-14T00:00:00" table:style-name="ce2">
            <text:p>14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3334.75" table:style-name="ce1">
            <text:p>3334.75</text:p>
          </table:table-cell>
          <table:table-cell office:value-type="string" office:string-value="Low" table:formula="of:=IF([.E548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2693.99" table:style-name="ce1">
            <text:p>2693.99</text:p>
          </table:table-cell>
          <table:table-cell office:value-type="float" office:value="3045.9399999999901" table:style-name="ce1">
            <text:p>3045.94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06-08T00:00:00" table:style-name="ce2">
            <text:p>08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3608.81" table:style-name="ce1">
            <text:p>3608.81</text:p>
          </table:table-cell>
          <table:table-cell office:value-type="string" office:string-value="Low" table:formula="of:=IF([.E549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urniture</text:p>
          </table:table-cell>
          <table:table-cell office:value-type="float" office:value="3457.28" table:style-name="ce1">
            <text:p>3457.28</text:p>
          </table:table-cell>
          <table:table-cell office:value-type="float" office:value="3598.72" table:style-name="ce1">
            <text:p>3598.72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date" office:date-value="2023-06-01T00:00:00" table:style-name="ce2">
            <text:p>01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5105.78" table:style-name="ce1">
            <text:p>5105.78</text:p>
          </table:table-cell>
          <table:table-cell office:value-type="string" office:string-value="High" table:formula="of:=IF([.E550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urniture</text:p>
          </table:table-cell>
          <table:table-cell office:value-type="float" office:value="3756.06" table:style-name="ce1">
            <text:p>3756.06</text:p>
          </table:table-cell>
          <table:table-cell office:value-type="float" office:value="4255.7299999999996" table:style-name="ce1">
            <text:p>4255.73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04-18T00:00:00" table:style-name="ce2">
            <text:p>18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9417.1" table:style-name="ce1">
            <text:p>9417.1</text:p>
          </table:table-cell>
          <table:table-cell office:value-type="string" office:string-value="High" table:formula="of:=IF([.E551]&gt;[.$E$1003];&quot;High&quot;;&quot;Low&quot;)" table:style-name="ce1">
            <text:p>High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ood</text:p>
          </table:table-cell>
          <table:table-cell office:value-type="float" office:value="1105.05" table:style-name="ce1">
            <text:p>1105.05</text:p>
          </table:table-cell>
          <table:table-cell office:value-type="float" office:value="1200.96" table:style-name="ce1">
            <text:p>1200.96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7-07T00:00:00" table:style-name="ce2">
            <text:p>07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8775.56" table:style-name="ce1">
            <text:p>8775.56</text:p>
          </table:table-cell>
          <table:table-cell office:value-type="string" office:string-value="High" table:formula="of:=IF([.E552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ood</text:p>
          </table:table-cell>
          <table:table-cell office:value-type="float" office:value="4342.53" table:style-name="ce1">
            <text:p>4342.53</text:p>
          </table:table-cell>
          <table:table-cell office:value-type="float" office:value="4357.49" table:style-name="ce1">
            <text:p>4357.49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10-28T00:00:00" table:style-name="ce2">
            <text:p>28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1115.42" table:style-name="ce1">
            <text:p>1115.42</text:p>
          </table:table-cell>
          <table:table-cell office:value-type="string" office:string-value="Low" table:formula="of:=IF([.E553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lothing</text:p>
          </table:table-cell>
          <table:table-cell office:value-type="float" office:value="4781.42" table:style-name="ce1">
            <text:p>4781.42</text:p>
          </table:table-cell>
          <table:table-cell office:value-type="float" office:value="4864.34" table:style-name="ce1">
            <text:p>4864.34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04-08T00:00:00" table:style-name="ce2">
            <text:p>08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3988.03" table:style-name="ce1">
            <text:p>3988.03</text:p>
          </table:table-cell>
          <table:table-cell office:value-type="string" office:string-value="Low" table:formula="of:=IF([.E554]&gt;[.$E$1003];&quot;High&quot;;&quot;Low&quot;)" table:style-name="ce1">
            <text:p>Low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lothing</text:p>
          </table:table-cell>
          <table:table-cell office:value-type="float" office:value="1221.74" table:style-name="ce1">
            <text:p>1221.74</text:p>
          </table:table-cell>
          <table:table-cell office:value-type="float" office:value="1611.92" table:style-name="ce1">
            <text:p>1611.92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05-11T00:00:00" table:style-name="ce2">
            <text:p>11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5578.37" table:style-name="ce1">
            <text:p>5578.37</text:p>
          </table:table-cell>
          <table:table-cell office:value-type="string" office:string-value="High" table:formula="of:=IF([.E555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ood</text:p>
          </table:table-cell>
          <table:table-cell office:value-type="float" office:value="4418.95" table:style-name="ce1">
            <text:p>4418.95</text:p>
          </table:table-cell>
          <table:table-cell office:value-type="float" office:value="4647.87" table:style-name="ce1">
            <text:p>4647.87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5081.01" table:style-name="ce1">
            <text:p>5081.01</text:p>
          </table:table-cell>
          <table:table-cell office:value-type="string" office:string-value="High" table:formula="of:=IF([.E556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ood</text:p>
          </table:table-cell>
          <table:table-cell office:value-type="float" office:value="530.04" table:style-name="ce1">
            <text:p>530.04</text:p>
          </table:table-cell>
          <table:table-cell office:value-type="float" office:value="759.31999999999903" table:style-name="ce1">
            <text:p>759.32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06-20T00:00:00" table:style-name="ce2">
            <text:p>20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2019.24" table:style-name="ce1">
            <text:p>2019.24</text:p>
          </table:table-cell>
          <table:table-cell office:value-type="string" office:string-value="Low" table:formula="of:=IF([.E557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lothing</text:p>
          </table:table-cell>
          <table:table-cell office:value-type="float" office:value="325.75" table:style-name="ce1">
            <text:p>325.75</text:p>
          </table:table-cell>
          <table:table-cell office:value-type="float" office:value="803.71" table:style-name="ce1">
            <text:p>803.71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7-02T00:00:00" table:style-name="ce2">
            <text:p>02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8602.2900000000009" table:style-name="ce1">
            <text:p>8602.29</text:p>
          </table:table-cell>
          <table:table-cell office:value-type="string" office:string-value="High" table:formula="of:=IF([.E558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lectronics</text:p>
          </table:table-cell>
          <table:table-cell office:value-type="float" office:value="689.66" table:style-name="ce1">
            <text:p>689.66</text:p>
          </table:table-cell>
          <table:table-cell office:value-type="float" office:value="1150.28" table:style-name="ce1">
            <text:p>1150.28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date" office:date-value="2023-12-30T00:00:00" table:style-name="ce2">
            <text:p>30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6801.71" table:style-name="ce1">
            <text:p>6801.71</text:p>
          </table:table-cell>
          <table:table-cell office:value-type="string" office:string-value="High" table:formula="of:=IF([.E559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lothing</text:p>
          </table:table-cell>
          <table:table-cell office:value-type="float" office:value="335.82" table:style-name="ce1">
            <text:p>335.82</text:p>
          </table:table-cell>
          <table:table-cell office:value-type="float" office:value="498.31" table:style-name="ce1">
            <text:p>498.31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2-08T00:00:00" table:style-name="ce2">
            <text:p>08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8395.2900000000009" table:style-name="ce1">
            <text:p>8395.29</text:p>
          </table:table-cell>
          <table:table-cell office:value-type="string" office:string-value="High" table:formula="of:=IF([.E560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lectronics</text:p>
          </table:table-cell>
          <table:table-cell office:value-type="float" office:value="4232.8100000000004" table:style-name="ce1">
            <text:p>4232.81</text:p>
          </table:table-cell>
          <table:table-cell office:value-type="float" office:value="4345.25" table:style-name="ce1">
            <text:p>4345.25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date" office:date-value="2023-01-15T00:00:00" table:style-name="ce2">
            <text:p>15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8601.77" table:style-name="ce1">
            <text:p>8601.77</text:p>
          </table:table-cell>
          <table:table-cell office:value-type="string" office:string-value="High" table:formula="of:=IF([.E561]&gt;[.$E$1003];&quot;High&quot;;&quot;Low&quot;)" table:style-name="ce1">
            <text:p>Hig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urniture</text:p>
          </table:table-cell>
          <table:table-cell office:value-type="float" office:value="342.3" table:style-name="ce1">
            <text:p>342.3</text:p>
          </table:table-cell>
          <table:table-cell office:value-type="float" office:value="768.06" table:style-name="ce1">
            <text:p>768.06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01-04T00:00:00" table:style-name="ce2">
            <text:p>04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7508.72" table:style-name="ce1">
            <text:p>7508.72</text:p>
          </table:table-cell>
          <table:table-cell office:value-type="string" office:string-value="High" table:formula="of:=IF([.E562]&gt;[.$E$1003];&quot;High&quot;;&quot;Low&quot;)" table:style-name="ce1">
            <text:p>High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urniture</text:p>
          </table:table-cell>
          <table:table-cell office:value-type="float" office:value="1394.74" table:style-name="ce1">
            <text:p>1394.74</text:p>
          </table:table-cell>
          <table:table-cell office:value-type="float" office:value="1848.69" table:style-name="ce1">
            <text:p>1848.69</text:p>
          </table:table-cell>
          <table:table-cell office:value-type="string" table:style-name="ce1">
            <text:p>Retur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date" office:date-value="2023-12-15T00:00:00" table:style-name="ce2">
            <text:p>15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448.18" table:style-name="ce1">
            <text:p>4448.18</text:p>
          </table:table-cell>
          <table:table-cell office:value-type="string" office:string-value="Low" table:formula="of:=IF([.E563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othing</text:p>
          </table:table-cell>
          <table:table-cell office:value-type="float" office:value="563.59" table:style-name="ce1">
            <text:p>563.59</text:p>
          </table:table-cell>
          <table:table-cell office:value-type="float" office:value="838.97" table:style-name="ce1">
            <text:p>838.97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07-29T00:00:00" table:style-name="ce2">
            <text:p>29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6144.41" table:style-name="ce1">
            <text:p>6144.41</text:p>
          </table:table-cell>
          <table:table-cell office:value-type="string" office:string-value="High" table:formula="of:=IF([.E564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ectronics</text:p>
          </table:table-cell>
          <table:table-cell office:value-type="float" office:value="1512.34" table:style-name="ce1">
            <text:p>1512.34</text:p>
          </table:table-cell>
          <table:table-cell office:value-type="float" office:value="1830.76" table:style-name="ce1">
            <text:p>1830.76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date" office:date-value="2023-06-10T00:00:00" table:style-name="ce2">
            <text:p>10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1687.62" table:style-name="ce1">
            <text:p>1687.62</text:p>
          </table:table-cell>
          <table:table-cell office:value-type="string" office:string-value="Low" table:formula="of:=IF([.E565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othing</text:p>
          </table:table-cell>
          <table:table-cell office:value-type="float" office:value="498.27" table:style-name="ce1">
            <text:p>498.27</text:p>
          </table:table-cell>
          <table:table-cell office:value-type="float" office:value="634.16" table:style-name="ce1">
            <text:p>634.16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01-16T00:00:00" table:style-name="ce2">
            <text:p>16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6769.09" table:style-name="ce1">
            <text:p>6769.09</text:p>
          </table:table-cell>
          <table:table-cell office:value-type="string" office:string-value="High" table:formula="of:=IF([.E566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othing</text:p>
          </table:table-cell>
          <table:table-cell office:value-type="float" office:value="3356.62" table:style-name="ce1">
            <text:p>3356.62</text:p>
          </table:table-cell>
          <table:table-cell office:value-type="float" office:value="3759.0099999999902" table:style-name="ce1">
            <text:p>3759.01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04-18T00:00:00" table:style-name="ce2">
            <text:p>18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1874.61" table:style-name="ce1">
            <text:p>1874.61</text:p>
          </table:table-cell>
          <table:table-cell office:value-type="string" office:string-value="Low" table:formula="of:=IF([.E567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709.97" table:style-name="ce1">
            <text:p>709.97</text:p>
          </table:table-cell>
          <table:table-cell office:value-type="float" office:value="1029.71" table:style-name="ce1">
            <text:p>1029.71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6970.1" table:style-name="ce1">
            <text:p>6970.1</text:p>
          </table:table-cell>
          <table:table-cell office:value-type="string" office:string-value="High" table:formula="of:=IF([.E568]&gt;[.$E$1003];&quot;High&quot;;&quot;Low&quot;)" table:style-name="ce1">
            <text:p>High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lothing</text:p>
          </table:table-cell>
          <table:table-cell office:value-type="float" office:value="4266.6400000000003" table:style-name="ce1">
            <text:p>4266.64</text:p>
          </table:table-cell>
          <table:table-cell office:value-type="float" office:value="4523.3599999999997" table:style-name="ce1">
            <text:p>4523.36</text:p>
          </table:table-cell>
          <table:table-cell office:value-type="string" table:style-name="ce1">
            <text:p>New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date" office:date-value="2023-08-15T00:00:00" table:style-name="ce2">
            <text:p>15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2373.02" table:style-name="ce1">
            <text:p>2373.02</text:p>
          </table:table-cell>
          <table:table-cell office:value-type="string" office:string-value="Low" table:formula="of:=IF([.E569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urniture</text:p>
          </table:table-cell>
          <table:table-cell office:value-type="float" office:value="4095.1" table:style-name="ce1">
            <text:p>4095.1</text:p>
          </table:table-cell>
          <table:table-cell office:value-type="float" office:value="4134.55" table:style-name="ce1">
            <text:p>4134.55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6-19T00:00:00" table:style-name="ce2">
            <text:p>19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1263.76" table:style-name="ce1">
            <text:p>1263.76</text:p>
          </table:table-cell>
          <table:table-cell office:value-type="string" office:string-value="Low" table:formula="of:=IF([.E570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ood</text:p>
          </table:table-cell>
          <table:table-cell office:value-type="float" office:value="117.63" table:style-name="ce1">
            <text:p>117.63</text:p>
          </table:table-cell>
          <table:table-cell office:value-type="float" office:value="576.44000000000005" table:style-name="ce1">
            <text:p>576.44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02-03T00:00:00" table:style-name="ce2">
            <text:p>03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1736.32" table:style-name="ce1">
            <text:p>1736.32</text:p>
          </table:table-cell>
          <table:table-cell office:value-type="string" office:string-value="Low" table:formula="of:=IF([.E571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od</text:p>
          </table:table-cell>
          <table:table-cell office:value-type="float" office:value="4483.8500000000004" table:style-name="ce1">
            <text:p>4483.85</text:p>
          </table:table-cell>
          <table:table-cell office:value-type="float" office:value="4795.42" table:style-name="ce1">
            <text:p>4795.42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09-08T00:00:00" table:style-name="ce2">
            <text:p>08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119.72" table:style-name="ce1">
            <text:p>119.72</text:p>
          </table:table-cell>
          <table:table-cell office:value-type="string" office:string-value="Low" table:formula="of:=IF([.E572]&gt;[.$E$1003];&quot;High&quot;;&quot;Low&quot;)" table:style-name="ce1">
            <text:p>Low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othing</text:p>
          </table:table-cell>
          <table:table-cell office:value-type="float" office:value="193.27" table:style-name="ce1">
            <text:p>193.27</text:p>
          </table:table-cell>
          <table:table-cell office:value-type="float" office:value="297.69" table:style-name="ce1">
            <text:p>297.69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date" office:date-value="2023-09-04T00:00:00" table:style-name="ce2">
            <text:p>04/09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7215.52" table:style-name="ce1">
            <text:p>7215.52</text:p>
          </table:table-cell>
          <table:table-cell office:value-type="string" office:string-value="High" table:formula="of:=IF([.E573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1236.25" table:style-name="ce1">
            <text:p>1236.25</text:p>
          </table:table-cell>
          <table:table-cell office:value-type="float" office:value="1543.38" table:style-name="ce1">
            <text:p>1543.38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9-26T00:00:00" table:style-name="ce2">
            <text:p>26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7350.77" table:style-name="ce1">
            <text:p>7350.77</text:p>
          </table:table-cell>
          <table:table-cell office:value-type="string" office:string-value="High" table:formula="of:=IF([.E574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lectronics</text:p>
          </table:table-cell>
          <table:table-cell office:value-type="float" office:value="210.33" table:style-name="ce1">
            <text:p>210.33</text:p>
          </table:table-cell>
          <table:table-cell office:value-type="float" office:value="552.29" table:style-name="ce1">
            <text:p>552.29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05-21T00:00:00" table:style-name="ce2">
            <text:p>21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5197.84" table:style-name="ce1">
            <text:p>5197.84</text:p>
          </table:table-cell>
          <table:table-cell office:value-type="string" office:string-value="High" table:formula="of:=IF([.E575]&gt;[.$E$1003];&quot;High&quot;;&quot;Low&quot;)" table:style-name="ce1">
            <text:p>Hig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urniture</text:p>
          </table:table-cell>
          <table:table-cell office:value-type="float" office:value="1712.43" table:style-name="ce1">
            <text:p>1712.43</text:p>
          </table:table-cell>
          <table:table-cell office:value-type="float" office:value="1980.06" table:style-name="ce1">
            <text:p>1980.06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10-01T00:00:00" table:style-name="ce2">
            <text:p>01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1697.49" table:style-name="ce1">
            <text:p>1697.49</text:p>
          </table:table-cell>
          <table:table-cell office:value-type="string" office:string-value="Low" table:formula="of:=IF([.E576]&gt;[.$E$1003];&quot;High&quot;;&quot;Low&quot;)" table:style-name="ce1">
            <text:p>Low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ectronics</text:p>
          </table:table-cell>
          <table:table-cell office:value-type="float" office:value="2593.64" table:style-name="ce1">
            <text:p>2593.64</text:p>
          </table:table-cell>
          <table:table-cell office:value-type="float" office:value="2955.5099999999902" table:style-name="ce1">
            <text:p>2955.51</text:p>
          </table:table-cell>
          <table:table-cell office:value-type="string" table:style-name="ce1">
            <text:p>Retur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date" office:date-value="2023-04-06T00:00:00" table:style-name="ce2">
            <text:p>06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927.19" table:style-name="ce1">
            <text:p>927.19</text:p>
          </table:table-cell>
          <table:table-cell office:value-type="string" office:string-value="Low" table:formula="of:=IF([.E577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float" office:value="3993.39" table:style-name="ce1">
            <text:p>3993.39</text:p>
          </table:table-cell>
          <table:table-cell office:value-type="float" office:value="4288.3" table:style-name="ce1">
            <text:p>4288.3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08-15T00:00:00" table:style-name="ce2">
            <text:p>15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289.38" table:style-name="ce1">
            <text:p>289.38</text:p>
          </table:table-cell>
          <table:table-cell office:value-type="string" office:string-value="Low" table:formula="of:=IF([.E578]&gt;[.$E$1003];&quot;High&quot;;&quot;Low&quot;)" table:style-name="ce1">
            <text:p>Low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urniture</text:p>
          </table:table-cell>
          <table:table-cell office:value-type="float" office:value="1723.01" table:style-name="ce1">
            <text:p>1723.01</text:p>
          </table:table-cell>
          <table:table-cell office:value-type="float" office:value="2197.42" table:style-name="ce1">
            <text:p>2197.42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2-08T00:00:00" table:style-name="ce2">
            <text:p>08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1740.91" table:style-name="ce1">
            <text:p>1740.91</text:p>
          </table:table-cell>
          <table:table-cell office:value-type="string" office:string-value="Low" table:formula="of:=IF([.E579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lothing</text:p>
          </table:table-cell>
          <table:table-cell office:value-type="float" office:value="3542.18" table:style-name="ce1">
            <text:p>3542.18</text:p>
          </table:table-cell>
          <table:table-cell office:value-type="float" office:value="3578.49" table:style-name="ce1">
            <text:p>3578.49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date" office:date-value="2023-10-29T00:00:00" table:style-name="ce2">
            <text:p>29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8919.4699999999993" table:style-name="ce1">
            <text:p>8919.47</text:p>
          </table:table-cell>
          <table:table-cell office:value-type="string" office:string-value="High" table:formula="of:=IF([.E580]&gt;[.$E$1003];&quot;High&quot;;&quot;Low&quot;)" table:style-name="ce1">
            <text:p>High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ood</text:p>
          </table:table-cell>
          <table:table-cell office:value-type="float" office:value="978.15" table:style-name="ce1">
            <text:p>978.15</text:p>
          </table:table-cell>
          <table:table-cell office:value-type="float" office:value="1040.21" table:style-name="ce1">
            <text:p>1040.21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date" office:date-value="2023-01-29T00:00:00" table:style-name="ce2">
            <text:p>29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2491.21" table:style-name="ce1">
            <text:p>2491.21</text:p>
          </table:table-cell>
          <table:table-cell office:value-type="string" office:string-value="Low" table:formula="of:=IF([.E581]&gt;[.$E$1003];&quot;High&quot;;&quot;Low&quot;)" table:style-name="ce1">
            <text:p>Low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urniture</text:p>
          </table:table-cell>
          <table:table-cell office:value-type="float" office:value="3765.46" table:style-name="ce1">
            <text:p>3765.46</text:p>
          </table:table-cell>
          <table:table-cell office:value-type="float" office:value="3860.56" table:style-name="ce1">
            <text:p>3860.56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3607.29" table:style-name="ce1">
            <text:p>3607.29</text:p>
          </table:table-cell>
          <table:table-cell office:value-type="string" office:string-value="Low" table:formula="of:=IF([.E582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lothing</text:p>
          </table:table-cell>
          <table:table-cell office:value-type="float" office:value="1218.18" table:style-name="ce1">
            <text:p>1218.18</text:p>
          </table:table-cell>
          <table:table-cell office:value-type="float" office:value="1566.36" table:style-name="ce1">
            <text:p>1566.36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9-02T00:00:00" table:style-name="ce2">
            <text:p>02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1142.92" table:style-name="ce1">
            <text:p>1142.92</text:p>
          </table:table-cell>
          <table:table-cell office:value-type="string" office:string-value="Low" table:formula="of:=IF([.E583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urniture</text:p>
          </table:table-cell>
          <table:table-cell office:value-type="float" office:value="760.55" table:style-name="ce1">
            <text:p>760.55</text:p>
          </table:table-cell>
          <table:table-cell office:value-type="float" office:value="1086.8899999999901" table:style-name="ce1">
            <text:p>1086.89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8-24T00:00:00" table:style-name="ce2">
            <text:p>24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2301.38" table:style-name="ce1">
            <text:p>2301.38</text:p>
          </table:table-cell>
          <table:table-cell office:value-type="string" office:string-value="Low" table:formula="of:=IF([.E584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lothing</text:p>
          </table:table-cell>
          <table:table-cell office:value-type="float" office:value="967.77" table:style-name="ce1">
            <text:p>967.77</text:p>
          </table:table-cell>
          <table:table-cell office:value-type="float" office:value="1414.88" table:style-name="ce1">
            <text:p>1414.88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date" office:date-value="2023-07-04T00:00:00" table:style-name="ce2">
            <text:p>04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5240.32" table:style-name="ce1">
            <text:p>5240.32</text:p>
          </table:table-cell>
          <table:table-cell office:value-type="string" office:string-value="High" table:formula="of:=IF([.E585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urniture</text:p>
          </table:table-cell>
          <table:table-cell office:value-type="float" office:value="951.21" table:style-name="ce1">
            <text:p>951.21</text:p>
          </table:table-cell>
          <table:table-cell office:value-type="float" office:value="1320.32" table:style-name="ce1">
            <text:p>1320.32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09-29T00:00:00" table:style-name="ce2">
            <text:p>29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6116.75" table:style-name="ce1">
            <text:p>6116.75</text:p>
          </table:table-cell>
          <table:table-cell office:value-type="string" office:string-value="High" table:formula="of:=IF([.E586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othing</text:p>
          </table:table-cell>
          <table:table-cell office:value-type="float" office:value="2588.67" table:style-name="ce1">
            <text:p>2588.67</text:p>
          </table:table-cell>
          <table:table-cell office:value-type="float" office:value="2847.76" table:style-name="ce1">
            <text:p>2847.76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08-24T00:00:00" table:style-name="ce2">
            <text:p>24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528.9899999999998" table:style-name="ce1">
            <text:p>2528.99</text:p>
          </table:table-cell>
          <table:table-cell office:value-type="string" office:string-value="Low" table:formula="of:=IF([.E587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urniture</text:p>
          </table:table-cell>
          <table:table-cell office:value-type="float" office:value="4231.75" table:style-name="ce1">
            <text:p>4231.75</text:p>
          </table:table-cell>
          <table:table-cell office:value-type="float" office:value="4727.75" table:style-name="ce1">
            <text:p>4727.75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08-27T00:00:00" table:style-name="ce2">
            <text:p>27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671.55" table:style-name="ce1">
            <text:p>671.55</text:p>
          </table:table-cell>
          <table:table-cell office:value-type="string" office:string-value="Low" table:formula="of:=IF([.E588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lothing</text:p>
          </table:table-cell>
          <table:table-cell office:value-type="float" office:value="444.05" table:style-name="ce1">
            <text:p>444.05</text:p>
          </table:table-cell>
          <table:table-cell office:value-type="float" office:value="584.44000000000005" table:style-name="ce1">
            <text:p>584.44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09-23T00:00:00" table:style-name="ce2">
            <text:p>23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3971.23" table:style-name="ce1">
            <text:p>3971.23</text:p>
          </table:table-cell>
          <table:table-cell office:value-type="string" office:string-value="Low" table:formula="of:=IF([.E589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urniture</text:p>
          </table:table-cell>
          <table:table-cell office:value-type="float" office:value="3549.43" table:style-name="ce1">
            <text:p>3549.43</text:p>
          </table:table-cell>
          <table:table-cell office:value-type="float" office:value="3967.6899999999901" table:style-name="ce1">
            <text:p>3967.69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date" office:date-value="2023-12-25T00:00:00" table:style-name="ce2">
            <text:p>25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2418.61" table:style-name="ce1">
            <text:p>2418.61</text:p>
          </table:table-cell>
          <table:table-cell office:value-type="string" office:string-value="Low" table:formula="of:=IF([.E590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ood</text:p>
          </table:table-cell>
          <table:table-cell office:value-type="float" office:value="3289.01" table:style-name="ce1">
            <text:p>3289.01</text:p>
          </table:table-cell>
          <table:table-cell office:value-type="float" office:value="3508.14" table:style-name="ce1">
            <text:p>3508.14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date" office:date-value="2023-12-06T00:00:00" table:style-name="ce2">
            <text:p>06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2273.58" table:style-name="ce1">
            <text:p>2273.58</text:p>
          </table:table-cell>
          <table:table-cell office:value-type="string" office:string-value="Low" table:formula="of:=IF([.E591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ood</text:p>
          </table:table-cell>
          <table:table-cell office:value-type="float" office:value="4368.97" table:style-name="ce1">
            <text:p>4368.97</text:p>
          </table:table-cell>
          <table:table-cell office:value-type="float" office:value="4696.8500000000004" table:style-name="ce1">
            <text:p>4696.85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3-06T00:00:00" table:style-name="ce2">
            <text:p>06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9602.64" table:style-name="ce1">
            <text:p>9602.64</text:p>
          </table:table-cell>
          <table:table-cell office:value-type="string" office:string-value="High" table:formula="of:=IF([.E592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lectronics</text:p>
          </table:table-cell>
          <table:table-cell office:value-type="float" office:value="1258.53" table:style-name="ce1">
            <text:p>1258.53</text:p>
          </table:table-cell>
          <table:table-cell office:value-type="float" office:value="1624.8899999999901" table:style-name="ce1">
            <text:p>1624.89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date" office:date-value="2023-06-26T00:00:00" table:style-name="ce2">
            <text:p>26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6201.37" table:style-name="ce1">
            <text:p>6201.37</text:p>
          </table:table-cell>
          <table:table-cell office:value-type="string" office:string-value="High" table:formula="of:=IF([.E593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lothing</text:p>
          </table:table-cell>
          <table:table-cell office:value-type="float" office:value="2278.04" table:style-name="ce1">
            <text:p>2278.04</text:p>
          </table:table-cell>
          <table:table-cell office:value-type="float" office:value="2598.58" table:style-name="ce1">
            <text:p>2598.58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1-03T00:00:00" table:style-name="ce2">
            <text:p>03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5613.1" table:style-name="ce1">
            <text:p>5613.1</text:p>
          </table:table-cell>
          <table:table-cell office:value-type="string" office:string-value="High" table:formula="of:=IF([.E594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urniture</text:p>
          </table:table-cell>
          <table:table-cell office:value-type="float" office:value="4632.8500000000004" table:style-name="ce1">
            <text:p>4632.85</text:p>
          </table:table-cell>
          <table:table-cell office:value-type="float" office:value="4711.7" table:style-name="ce1">
            <text:p>4711.7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date" office:date-value="2023-05-22T00:00:00" table:style-name="ce2">
            <text:p>22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4216.17" table:style-name="ce1">
            <text:p>4216.17</text:p>
          </table:table-cell>
          <table:table-cell office:value-type="string" office:string-value="Low" table:formula="of:=IF([.E595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lothing</text:p>
          </table:table-cell>
          <table:table-cell office:value-type="float" office:value="3316.97" table:style-name="ce1">
            <text:p>3316.97</text:p>
          </table:table-cell>
          <table:table-cell office:value-type="float" office:value="3544.02" table:style-name="ce1">
            <text:p>3544.02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6-07T00:00:00" table:style-name="ce2">
            <text:p>07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4346.55" table:style-name="ce1">
            <text:p>4346.55</text:p>
          </table:table-cell>
          <table:table-cell office:value-type="string" office:string-value="Low" table:formula="of:=IF([.E596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ood</text:p>
          </table:table-cell>
          <table:table-cell office:value-type="float" office:value="1974.4" table:style-name="ce1">
            <text:p>1974.4</text:p>
          </table:table-cell>
          <table:table-cell office:value-type="float" office:value="2259.5" table:style-name="ce1">
            <text:p>2259.5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11-20T00:00:00" table:style-name="ce2">
            <text:p>20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5454.96" table:style-name="ce1">
            <text:p>5454.96</text:p>
          </table:table-cell>
          <table:table-cell office:value-type="string" office:string-value="High" table:formula="of:=IF([.E597]&gt;[.$E$1003];&quot;High&quot;;&quot;Low&quot;)" table:style-name="ce1">
            <text:p>High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lothing</text:p>
          </table:table-cell>
          <table:table-cell office:value-type="float" office:value="700.49" table:style-name="ce1">
            <text:p>700.49</text:p>
          </table:table-cell>
          <table:table-cell office:value-type="float" office:value="1126.52" table:style-name="ce1">
            <text:p>1126.52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date" office:date-value="2023-05-26T00:00:00" table:style-name="ce2">
            <text:p>26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6994.66" table:style-name="ce1">
            <text:p>6994.66</text:p>
          </table:table-cell>
          <table:table-cell office:value-type="string" office:string-value="High" table:formula="of:=IF([.E598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rniture</text:p>
          </table:table-cell>
          <table:table-cell office:value-type="float" office:value="1349.3" table:style-name="ce1">
            <text:p>1349.3</text:p>
          </table:table-cell>
          <table:table-cell office:value-type="float" office:value="1576.69" table:style-name="ce1">
            <text:p>1576.69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7051.25" table:style-name="ce1">
            <text:p>7051.25</text:p>
          </table:table-cell>
          <table:table-cell office:value-type="string" office:string-value="High" table:formula="of:=IF([.E599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lothing</text:p>
          </table:table-cell>
          <table:table-cell office:value-type="float" office:value="2927.02" table:style-name="ce1">
            <text:p>2927.02</text:p>
          </table:table-cell>
          <table:table-cell office:value-type="float" office:value="3387.21" table:style-name="ce1">
            <text:p>3387.21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06-02T00:00:00" table:style-name="ce2">
            <text:p>02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799.77" table:style-name="ce1">
            <text:p>1799.77</text:p>
          </table:table-cell>
          <table:table-cell office:value-type="string" office:string-value="Low" table:formula="of:=IF([.E600]&gt;[.$E$1003];&quot;High&quot;;&quot;Low&quot;)" table:style-name="ce1">
            <text:p>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rniture</text:p>
          </table:table-cell>
          <table:table-cell office:value-type="float" office:value="3604.93" table:style-name="ce1">
            <text:p>3604.93</text:p>
          </table:table-cell>
          <table:table-cell office:value-type="float" office:value="3830.71" table:style-name="ce1">
            <text:p>3830.71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7-12T00:00:00" table:style-name="ce2">
            <text:p>12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5051.12" table:style-name="ce1">
            <text:p>5051.12</text:p>
          </table:table-cell>
          <table:table-cell office:value-type="string" office:string-value="High" table:formula="of:=IF([.E601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od</text:p>
          </table:table-cell>
          <table:table-cell office:value-type="float" office:value="665.89" table:style-name="ce1">
            <text:p>665.89</text:p>
          </table:table-cell>
          <table:table-cell office:value-type="float" office:value="944.79" table:style-name="ce1">
            <text:p>944.79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3-14T00:00:00" table:style-name="ce2">
            <text:p>14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4178.3900000000003" table:style-name="ce1">
            <text:p>4178.39</text:p>
          </table:table-cell>
          <table:table-cell office:value-type="string" office:string-value="Low" table:formula="of:=IF([.E602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ood</text:p>
          </table:table-cell>
          <table:table-cell office:value-type="float" office:value="3018.01" table:style-name="ce1">
            <text:p>3018.01</text:p>
          </table:table-cell>
          <table:table-cell office:value-type="float" office:value="3418.19" table:style-name="ce1">
            <text:p>3418.19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8718.2199999999993" table:style-name="ce1">
            <text:p>8718.22</text:p>
          </table:table-cell>
          <table:table-cell office:value-type="string" office:string-value="High" table:formula="of:=IF([.E603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ood</text:p>
          </table:table-cell>
          <table:table-cell office:value-type="float" office:value="2774.24" table:style-name="ce1">
            <text:p>2774.24</text:p>
          </table:table-cell>
          <table:table-cell office:value-type="float" office:value="3069.9399999999901" table:style-name="ce1">
            <text:p>3069.94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date" office:date-value="2023-12-10T00:00:00" table:style-name="ce2">
            <text:p>10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6351.05" table:style-name="ce1">
            <text:p>6351.05</text:p>
          </table:table-cell>
          <table:table-cell office:value-type="string" office:string-value="High" table:formula="of:=IF([.E604]&gt;[.$E$1003];&quot;High&quot;;&quot;Low&quot;)" table:style-name="ce1">
            <text:p>High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onics</text:p>
          </table:table-cell>
          <table:table-cell office:value-type="float" office:value="2594.08" table:style-name="ce1">
            <text:p>2594.08</text:p>
          </table:table-cell>
          <table:table-cell office:value-type="float" office:value="3074.59" table:style-name="ce1">
            <text:p>3074.59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05-20T00:00:00" table:style-name="ce2">
            <text:p>20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5371.79" table:style-name="ce1">
            <text:p>5371.79</text:p>
          </table:table-cell>
          <table:table-cell office:value-type="string" office:string-value="High" table:formula="of:=IF([.E605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ood</text:p>
          </table:table-cell>
          <table:table-cell office:value-type="float" office:value="3466.11" table:style-name="ce1">
            <text:p>3466.11</text:p>
          </table:table-cell>
          <table:table-cell office:value-type="float" office:value="3799.67" table:style-name="ce1">
            <text:p>3799.67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date" office:date-value="2023-07-06T00:00:00" table:style-name="ce2">
            <text:p>06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1242.4100000000001" table:style-name="ce1">
            <text:p>1242.41</text:p>
          </table:table-cell>
          <table:table-cell office:value-type="string" office:string-value="Low" table:formula="of:=IF([.E606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4195.38" table:style-name="ce1">
            <text:p>4195.38</text:p>
          </table:table-cell>
          <table:table-cell office:value-type="float" office:value="4461.51" table:style-name="ce1">
            <text:p>4461.51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095.82" table:style-name="ce1">
            <text:p>6095.82</text:p>
          </table:table-cell>
          <table:table-cell office:value-type="string" office:string-value="High" table:formula="of:=IF([.E607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lectronics</text:p>
          </table:table-cell>
          <table:table-cell office:value-type="float" office:value="1648.8" table:style-name="ce1">
            <text:p>1648.8</text:p>
          </table:table-cell>
          <table:table-cell office:value-type="float" office:value="1670.36" table:style-name="ce1">
            <text:p>1670.36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3-02T00:00:00" table:style-name="ce2">
            <text:p>02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1260.32" table:style-name="ce1">
            <text:p>1260.32</text:p>
          </table:table-cell>
          <table:table-cell office:value-type="string" office:string-value="Low" table:formula="of:=IF([.E608]&gt;[.$E$1003];&quot;High&quot;;&quot;Low&quot;)" table:style-name="ce1">
            <text:p>Low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ood</text:p>
          </table:table-cell>
          <table:table-cell office:value-type="float" office:value="4450.6099999999997" table:style-name="ce1">
            <text:p>4450.61</text:p>
          </table:table-cell>
          <table:table-cell office:value-type="float" office:value="4663.3399999999901" table:style-name="ce1">
            <text:p>4663.34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07-17T00:00:00" table:style-name="ce2">
            <text:p>17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3438.35" table:style-name="ce1">
            <text:p>3438.35</text:p>
          </table:table-cell>
          <table:table-cell office:value-type="string" office:string-value="Low" table:formula="of:=IF([.E609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lothing</text:p>
          </table:table-cell>
          <table:table-cell office:value-type="float" office:value="845.14" table:style-name="ce1">
            <text:p>845.14</text:p>
          </table:table-cell>
          <table:table-cell office:value-type="float" office:value="1001.77" table:style-name="ce1">
            <text:p>1001.77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10-22T00:00:00" table:style-name="ce2">
            <text:p>22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1514.14" table:style-name="ce1">
            <text:p>1514.14</text:p>
          </table:table-cell>
          <table:table-cell office:value-type="string" office:string-value="Low" table:formula="of:=IF([.E610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lothing</text:p>
          </table:table-cell>
          <table:table-cell office:value-type="float" office:value="906.47" table:style-name="ce1">
            <text:p>906.47</text:p>
          </table:table-cell>
          <table:table-cell office:value-type="float" office:value="1283.04" table:style-name="ce1">
            <text:p>1283.04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11-15T00:00:00" table:style-name="ce2">
            <text:p>15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6951.53" table:style-name="ce1">
            <text:p>6951.53</text:p>
          </table:table-cell>
          <table:table-cell office:value-type="string" office:string-value="High" table:formula="of:=IF([.E611]&gt;[.$E$1003];&quot;High&quot;;&quot;Low&quot;)" table:style-name="ce1">
            <text:p>High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lothing</text:p>
          </table:table-cell>
          <table:table-cell office:value-type="float" office:value="1370.52" table:style-name="ce1">
            <text:p>1370.52</text:p>
          </table:table-cell>
          <table:table-cell office:value-type="float" office:value="1482.58" table:style-name="ce1">
            <text:p>1482.58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10-29T00:00:00" table:style-name="ce2">
            <text:p>29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141.9" table:style-name="ce1">
            <text:p>2141.9</text:p>
          </table:table-cell>
          <table:table-cell office:value-type="string" office:string-value="Low" table:formula="of:=IF([.E612]&gt;[.$E$1003];&quot;High&quot;;&quot;Low&quot;)" table:style-name="ce1">
            <text:p>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rniture</text:p>
          </table:table-cell>
          <table:table-cell office:value-type="float" office:value="641.67999999999995" table:style-name="ce1">
            <text:p>641.68</text:p>
          </table:table-cell>
          <table:table-cell office:value-type="float" office:value="752.24" table:style-name="ce1">
            <text:p>752.24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12-10T00:00:00" table:style-name="ce2">
            <text:p>10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3979.41" table:style-name="ce1">
            <text:p>3979.41</text:p>
          </table:table-cell>
          <table:table-cell office:value-type="string" office:string-value="Low" table:formula="of:=IF([.E613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lectronics</text:p>
          </table:table-cell>
          <table:table-cell office:value-type="float" office:value="1190.08" table:style-name="ce1">
            <text:p>1190.08</text:p>
          </table:table-cell>
          <table:table-cell office:value-type="float" office:value="1292.9399999999901" table:style-name="ce1">
            <text:p>1292.94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date" office:date-value="2023-01-11T00:00:00" table:style-name="ce2">
            <text:p>11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8967.18" table:style-name="ce1">
            <text:p>8967.18</text:p>
          </table:table-cell>
          <table:table-cell office:value-type="string" office:string-value="High" table:formula="of:=IF([.E614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lothing</text:p>
          </table:table-cell>
          <table:table-cell office:value-type="float" office:value="576.74" table:style-name="ce1">
            <text:p>576.74</text:p>
          </table:table-cell>
          <table:table-cell office:value-type="float" office:value="648.29" table:style-name="ce1">
            <text:p>648.29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03-03T00:00:00" table:style-name="ce2">
            <text:p>03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2122.73" table:style-name="ce1">
            <text:p>2122.73</text:p>
          </table:table-cell>
          <table:table-cell office:value-type="string" office:string-value="Low" table:formula="of:=IF([.E615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urniture</text:p>
          </table:table-cell>
          <table:table-cell office:value-type="float" office:value="4117.67" table:style-name="ce1">
            <text:p>4117.67</text:p>
          </table:table-cell>
          <table:table-cell office:value-type="float" office:value="4280.0600000000004" table:style-name="ce1">
            <text:p>4280.06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11-29T00:00:00" table:style-name="ce2">
            <text:p>29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5127.2700000000004" table:style-name="ce1">
            <text:p>5127.27</text:p>
          </table:table-cell>
          <table:table-cell office:value-type="string" office:string-value="High" table:formula="of:=IF([.E616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ood</text:p>
          </table:table-cell>
          <table:table-cell office:value-type="float" office:value="737.9" table:style-name="ce1">
            <text:p>737.9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08-14T00:00:00" table:style-name="ce2">
            <text:p>14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4250.79" table:style-name="ce1">
            <text:p>4250.79</text:p>
          </table:table-cell>
          <table:table-cell office:value-type="string" office:string-value="Low" table:formula="of:=IF([.E617]&gt;[.$E$1003];&quot;High&quot;;&quot;Low&quot;)" table:style-name="ce1">
            <text:p>Low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lothing</text:p>
          </table:table-cell>
          <table:table-cell office:value-type="float" office:value="3749.12" table:style-name="ce1">
            <text:p>3749.12</text:p>
          </table:table-cell>
          <table:table-cell office:value-type="float" office:value="4138.83" table:style-name="ce1">
            <text:p>4138.83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06-02T00:00:00" table:style-name="ce2">
            <text:p>02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279.43" table:style-name="ce1">
            <text:p>279.43</text:p>
          </table:table-cell>
          <table:table-cell office:value-type="string" office:string-value="Low" table:formula="of:=IF([.E618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287.17" table:style-name="ce1">
            <text:p>287.17</text:p>
          </table:table-cell>
          <table:table-cell office:value-type="float" office:value="657.44" table:style-name="ce1">
            <text:p>657.44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07-18T00:00:00" table:style-name="ce2">
            <text:p>18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7948.31" table:style-name="ce1">
            <text:p>7948.31</text:p>
          </table:table-cell>
          <table:table-cell office:value-type="string" office:string-value="High" table:formula="of:=IF([.E619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lothing</text:p>
          </table:table-cell>
          <table:table-cell office:value-type="float" office:value="4745.18" table:style-name="ce1">
            <text:p>4745.18</text:p>
          </table:table-cell>
          <table:table-cell office:value-type="float" office:value="5145.88" table:style-name="ce1">
            <text:p>5145.88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date" office:date-value="2023-02-21T00:00:00" table:style-name="ce2">
            <text:p>21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783.55" table:style-name="ce1">
            <text:p>783.55</text:p>
          </table:table-cell>
          <table:table-cell office:value-type="string" office:string-value="Low" table:formula="of:=IF([.E620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lectronics</text:p>
          </table:table-cell>
          <table:table-cell office:value-type="float" office:value="3570.24" table:style-name="ce1">
            <text:p>3570.24</text:p>
          </table:table-cell>
          <table:table-cell office:value-type="float" office:value="3712.25" table:style-name="ce1">
            <text:p>3712.25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date" office:date-value="2023-09-17T00:00:00" table:style-name="ce2">
            <text:p>17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4795.12" table:style-name="ce1">
            <text:p>4795.12</text:p>
          </table:table-cell>
          <table:table-cell office:value-type="string" office:string-value="Low" table:formula="of:=IF([.E621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ctronics</text:p>
          </table:table-cell>
          <table:table-cell office:value-type="float" office:value="83.64" table:style-name="ce1">
            <text:p>83.64</text:p>
          </table:table-cell>
          <table:table-cell office:value-type="float" office:value="528.49" table:style-name="ce1">
            <text:p>528.49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02-28T00:00:00" table:style-name="ce2">
            <text:p>28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5650.72" table:style-name="ce1">
            <text:p>5650.72</text:p>
          </table:table-cell>
          <table:table-cell office:value-type="string" office:string-value="High" table:formula="of:=IF([.E622]&gt;[.$E$1003];&quot;High&quot;;&quot;Low&quot;)" table:style-name="ce1">
            <text:p>High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ood</text:p>
          </table:table-cell>
          <table:table-cell office:value-type="float" office:value="3831.09" table:style-name="ce1">
            <text:p>3831.09</text:p>
          </table:table-cell>
          <table:table-cell office:value-type="float" office:value="3908.37" table:style-name="ce1">
            <text:p>3908.37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03-13T00:00:00" table:style-name="ce2">
            <text:p>13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6321.42" table:style-name="ce1">
            <text:p>6321.42</text:p>
          </table:table-cell>
          <table:table-cell office:value-type="string" office:string-value="High" table:formula="of:=IF([.E623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othing</text:p>
          </table:table-cell>
          <table:table-cell office:value-type="float" office:value="2594.71" table:style-name="ce1">
            <text:p>2594.71</text:p>
          </table:table-cell>
          <table:table-cell office:value-type="float" office:value="2769.52" table:style-name="ce1">
            <text:p>2769.52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05-28T00:00:00" table:style-name="ce2">
            <text:p>28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6917.45" table:style-name="ce1">
            <text:p>6917.45</text:p>
          </table:table-cell>
          <table:table-cell office:value-type="string" office:string-value="High" table:formula="of:=IF([.E624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urniture</text:p>
          </table:table-cell>
          <table:table-cell office:value-type="float" office:value="3907.86" table:style-name="ce1">
            <text:p>3907.86</text:p>
          </table:table-cell>
          <table:table-cell office:value-type="float" office:value="4205.37" table:style-name="ce1">
            <text:p>4205.37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date" office:date-value="2023-12-15T00:00:00" table:style-name="ce2">
            <text:p>15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2607.4" table:style-name="ce1">
            <text:p>2607.4</text:p>
          </table:table-cell>
          <table:table-cell office:value-type="string" office:string-value="Low" table:formula="of:=IF([.E625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ood</text:p>
          </table:table-cell>
          <table:table-cell office:value-type="float" office:value="2636.36" table:style-name="ce1">
            <text:p>2636.36</text:p>
          </table:table-cell>
          <table:table-cell office:value-type="float" office:value="2696.78" table:style-name="ce1">
            <text:p>2696.78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03-04T00:00:00" table:style-name="ce2">
            <text:p>04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198.79" table:style-name="ce1">
            <text:p>198.79</text:p>
          </table:table-cell>
          <table:table-cell office:value-type="string" office:string-value="Low" table:formula="of:=IF([.E626]&gt;[.$E$1003];&quot;High&quot;;&quot;Low&quot;)" table:style-name="ce1">
            <text:p>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thing</text:p>
          </table:table-cell>
          <table:table-cell office:value-type="float" office:value="3223.07" table:style-name="ce1">
            <text:p>3223.07</text:p>
          </table:table-cell>
          <table:table-cell office:value-type="float" office:value="3590.83" table:style-name="ce1">
            <text:p>3590.83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date" office:date-value="2023-11-06T00:00:00" table:style-name="ce2">
            <text:p>06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262.09" table:style-name="ce1">
            <text:p>7262.09</text:p>
          </table:table-cell>
          <table:table-cell office:value-type="string" office:string-value="High" table:formula="of:=IF([.E627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ood</text:p>
          </table:table-cell>
          <table:table-cell office:value-type="float" office:value="3942.34" table:style-name="ce1">
            <text:p>3942.34</text:p>
          </table:table-cell>
          <table:table-cell office:value-type="float" office:value="4142.09" table:style-name="ce1">
            <text:p>4142.09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08-31T00:00:00" table:style-name="ce2">
            <text:p>31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5403" table:style-name="ce1">
            <text:p>5403</text:p>
          </table:table-cell>
          <table:table-cell office:value-type="string" office:string-value="High" table:formula="of:=IF([.E628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urniture</text:p>
          </table:table-cell>
          <table:table-cell office:value-type="float" office:value="2055.2800000000002" table:style-name="ce1">
            <text:p>2055.28</text:p>
          </table:table-cell>
          <table:table-cell office:value-type="float" office:value="2449.64" table:style-name="ce1">
            <text:p>2449.64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date" office:date-value="2024-01-01T00:00:00" table:style-name="ce2">
            <text:p>01/01/2024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8377.57" table:style-name="ce1">
            <text:p>8377.57</text:p>
          </table:table-cell>
          <table:table-cell office:value-type="string" office:string-value="High" table:formula="of:=IF([.E629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ood</text:p>
          </table:table-cell>
          <table:table-cell office:value-type="float" office:value="63.41" table:style-name="ce1">
            <text:p>63.41</text:p>
          </table:table-cell>
          <table:table-cell office:value-type="float" office:value="314.93" table:style-name="ce1">
            <text:p>314.93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11-26T00:00:00" table:style-name="ce2">
            <text:p>26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8231.74" table:style-name="ce1">
            <text:p>8231.74</text:p>
          </table:table-cell>
          <table:table-cell office:value-type="string" office:string-value="High" table:formula="of:=IF([.E630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ood</text:p>
          </table:table-cell>
          <table:table-cell office:value-type="float" office:value="4257.24" table:style-name="ce1">
            <text:p>4257.24</text:p>
          </table:table-cell>
          <table:table-cell office:value-type="float" office:value="4355.87" table:style-name="ce1">
            <text:p>4355.87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04-17T00:00:00" table:style-name="ce2">
            <text:p>17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8448.93" table:style-name="ce1">
            <text:p>8448.93</text:p>
          </table:table-cell>
          <table:table-cell office:value-type="string" office:string-value="High" table:formula="of:=IF([.E631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od</text:p>
          </table:table-cell>
          <table:table-cell office:value-type="float" office:value="1935.41" table:style-name="ce1">
            <text:p>1935.41</text:p>
          </table:table-cell>
          <table:table-cell office:value-type="float" office:value="2305.44" table:style-name="ce1">
            <text:p>2305.44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date" office:date-value="2023-08-14T00:00:00" table:style-name="ce2">
            <text:p>14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4902.4399999999996" table:style-name="ce1">
            <text:p>4902.44</text:p>
          </table:table-cell>
          <table:table-cell office:value-type="string" office:string-value="Low" table:formula="of:=IF([.E632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lothing</text:p>
          </table:table-cell>
          <table:table-cell office:value-type="float" office:value="2505.41" table:style-name="ce1">
            <text:p>2505.41</text:p>
          </table:table-cell>
          <table:table-cell office:value-type="float" office:value="2638.96" table:style-name="ce1">
            <text:p>2638.96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11-09T00:00:00" table:style-name="ce2">
            <text:p>09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3402.92" table:style-name="ce1">
            <text:p>3402.92</text:p>
          </table:table-cell>
          <table:table-cell office:value-type="string" office:string-value="Low" table:formula="of:=IF([.E633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urniture</text:p>
          </table:table-cell>
          <table:table-cell office:value-type="float" office:value="88.44" table:style-name="ce1">
            <text:p>88.44</text:p>
          </table:table-cell>
          <table:table-cell office:value-type="float" office:value="338.94" table:style-name="ce1">
            <text:p>338.94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08-06T00:00:00" table:style-name="ce2">
            <text:p>06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7936.43" table:style-name="ce1">
            <text:p>7936.43</text:p>
          </table:table-cell>
          <table:table-cell office:value-type="string" office:string-value="High" table:formula="of:=IF([.E634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float" office:value="2485.86" table:style-name="ce1">
            <text:p>2485.86</text:p>
          </table:table-cell>
          <table:table-cell office:value-type="float" office:value="2532.87" table:style-name="ce1">
            <text:p>2532.87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8-29T00:00:00" table:style-name="ce2">
            <text:p>29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4567.8100000000004" table:style-name="ce1">
            <text:p>4567.81</text:p>
          </table:table-cell>
          <table:table-cell office:value-type="string" office:string-value="Low" table:formula="of:=IF([.E635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lothing</text:p>
          </table:table-cell>
          <table:table-cell office:value-type="float" office:value="4933.1099999999997" table:style-name="ce1">
            <text:p>4933.11</text:p>
          </table:table-cell>
          <table:table-cell office:value-type="float" office:value="5245.86" table:style-name="ce1">
            <text:p>5245.86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09-16T00:00:00" table:style-name="ce2">
            <text:p>16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1916.08" table:style-name="ce1">
            <text:p>1916.08</text:p>
          </table:table-cell>
          <table:table-cell office:value-type="string" office:string-value="Low" table:formula="of:=IF([.E636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lectronics</text:p>
          </table:table-cell>
          <table:table-cell office:value-type="float" office:value="1427.42" table:style-name="ce1">
            <text:p>1427.42</text:p>
          </table:table-cell>
          <table:table-cell office:value-type="float" office:value="1763.69" table:style-name="ce1">
            <text:p>1763.69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8564.24" table:style-name="ce1">
            <text:p>8564.24</text:p>
          </table:table-cell>
          <table:table-cell office:value-type="string" office:string-value="High" table:formula="of:=IF([.E637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lectronics</text:p>
          </table:table-cell>
          <table:table-cell office:value-type="float" office:value="2007.32" table:style-name="ce1">
            <text:p>2007.32</text:p>
          </table:table-cell>
          <table:table-cell office:value-type="float" office:value="2202.87" table:style-name="ce1">
            <text:p>2202.87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01-05T00:00:00" table:style-name="ce2">
            <text:p>05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8837.34" table:style-name="ce1">
            <text:p>8837.34</text:p>
          </table:table-cell>
          <table:table-cell office:value-type="string" office:string-value="High" table:formula="of:=IF([.E638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othing</text:p>
          </table:table-cell>
          <table:table-cell office:value-type="float" office:value="3451.59" table:style-name="ce1">
            <text:p>3451.59</text:p>
          </table:table-cell>
          <table:table-cell office:value-type="float" office:value="3929.26" table:style-name="ce1">
            <text:p>3929.26</text:p>
          </table:table-cell>
          <table:table-cell office:value-type="string" table:style-name="ce1">
            <text:p>New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date" office:date-value="2023-09-18T00:00:00" table:style-name="ce2">
            <text:p>18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4716.47" table:style-name="ce1">
            <text:p>4716.47</text:p>
          </table:table-cell>
          <table:table-cell office:value-type="string" office:string-value="Low" table:formula="of:=IF([.E639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lothing</text:p>
          </table:table-cell>
          <table:table-cell office:value-type="float" office:value="4083.23" table:style-name="ce1">
            <text:p>4083.23</text:p>
          </table:table-cell>
          <table:table-cell office:value-type="float" office:value="4521.57" table:style-name="ce1">
            <text:p>4521.57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date" office:date-value="2023-02-23T00:00:00" table:style-name="ce2">
            <text:p>23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849.43" table:style-name="ce1">
            <text:p>849.43</text:p>
          </table:table-cell>
          <table:table-cell office:value-type="string" office:string-value="Low" table:formula="of:=IF([.E640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2116.09" table:style-name="ce1">
            <text:p>2116.09</text:p>
          </table:table-cell>
          <table:table-cell office:value-type="float" office:value="2472.98" table:style-name="ce1">
            <text:p>2472.98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3939.48" table:style-name="ce1">
            <text:p>3939.48</text:p>
          </table:table-cell>
          <table:table-cell office:value-type="string" office:string-value="Low" table:formula="of:=IF([.E641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urniture</text:p>
          </table:table-cell>
          <table:table-cell office:value-type="float" office:value="1582.86" table:style-name="ce1">
            <text:p>1582.86</text:p>
          </table:table-cell>
          <table:table-cell office:value-type="float" office:value="1942.55" table:style-name="ce1">
            <text:p>1942.55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8055.02" table:style-name="ce1">
            <text:p>8055.02</text:p>
          </table:table-cell>
          <table:table-cell office:value-type="string" office:string-value="High" table:formula="of:=IF([.E642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ood</text:p>
          </table:table-cell>
          <table:table-cell office:value-type="float" office:value="4692.24" table:style-name="ce1">
            <text:p>4692.24</text:p>
          </table:table-cell>
          <table:table-cell office:value-type="float" office:value="4825.92" table:style-name="ce1">
            <text:p>4825.92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6-26T00:00:00" table:style-name="ce2">
            <text:p>26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9027.56" table:style-name="ce1">
            <text:p>9027.56</text:p>
          </table:table-cell>
          <table:table-cell office:value-type="string" office:string-value="High" table:formula="of:=IF([.E643]&gt;[.$E$1003];&quot;High&quot;;&quot;Low&quot;)" table:style-name="ce1">
            <text:p>Hig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ectronics</text:p>
          </table:table-cell>
          <table:table-cell office:value-type="float" office:value="3401.87" table:style-name="ce1">
            <text:p>3401.87</text:p>
          </table:table-cell>
          <table:table-cell office:value-type="float" office:value="3733.71" table:style-name="ce1">
            <text:p>3733.71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date" office:date-value="2023-01-09T00:00:00" table:style-name="ce2">
            <text:p>09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2114.38" table:style-name="ce1">
            <text:p>2114.38</text:p>
          </table:table-cell>
          <table:table-cell office:value-type="string" office:string-value="Low" table:formula="of:=IF([.E644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urniture</text:p>
          </table:table-cell>
          <table:table-cell office:value-type="float" office:value="639.16" table:style-name="ce1">
            <text:p>639.16</text:p>
          </table:table-cell>
          <table:table-cell office:value-type="float" office:value="746.28" table:style-name="ce1">
            <text:p>746.28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4-09T00:00:00" table:style-name="ce2">
            <text:p>09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763.04" table:style-name="ce1">
            <text:p>763.04</text:p>
          </table:table-cell>
          <table:table-cell office:value-type="string" office:string-value="Low" table:formula="of:=IF([.E645]&gt;[.$E$1003];&quot;High&quot;;&quot;Low&quot;)" table:style-name="ce1">
            <text:p>Lo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od</text:p>
          </table:table-cell>
          <table:table-cell office:value-type="float" office:value="391.19" table:style-name="ce1">
            <text:p>391.19</text:p>
          </table:table-cell>
          <table:table-cell office:value-type="float" office:value="471.75" table:style-name="ce1">
            <text:p>471.75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01-20T00:00:00" table:style-name="ce2">
            <text:p>20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8785.77" table:style-name="ce1">
            <text:p>8785.77</text:p>
          </table:table-cell>
          <table:table-cell office:value-type="string" office:string-value="High" table:formula="of:=IF([.E646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urniture</text:p>
          </table:table-cell>
          <table:table-cell office:value-type="float" office:value="2443.5700000000002" table:style-name="ce1">
            <text:p>2443.57</text:p>
          </table:table-cell>
          <table:table-cell office:value-type="float" office:value="2943.31" table:style-name="ce1">
            <text:p>2943.31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date" office:date-value="2023-08-29T00:00:00" table:style-name="ce2">
            <text:p>29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3955.11" table:style-name="ce1">
            <text:p>3955.11</text:p>
          </table:table-cell>
          <table:table-cell office:value-type="string" office:string-value="Low" table:formula="of:=IF([.E647]&gt;[.$E$1003];&quot;High&quot;;&quot;Low&quot;)" table:style-name="ce1">
            <text:p>Low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lothing</text:p>
          </table:table-cell>
          <table:table-cell office:value-type="float" office:value="1139.45" table:style-name="ce1">
            <text:p>1139.45</text:p>
          </table:table-cell>
          <table:table-cell office:value-type="float" office:value="1454.41" table:style-name="ce1">
            <text:p>1454.41</text:p>
          </table:table-cell>
          <table:table-cell office:value-type="string" table:style-name="ce1">
            <text:p>Returnin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3-02T00:00:00" table:style-name="ce2">
            <text:p>02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5463.43" table:style-name="ce1">
            <text:p>5463.43</text:p>
          </table:table-cell>
          <table:table-cell office:value-type="string" office:string-value="High" table:formula="of:=IF([.E648]&gt;[.$E$1003];&quot;High&quot;;&quot;Low&quot;)" table:style-name="ce1">
            <text:p>High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urniture</text:p>
          </table:table-cell>
          <table:table-cell office:value-type="float" office:value="1307.22" table:style-name="ce1">
            <text:p>1307.22</text:p>
          </table:table-cell>
          <table:table-cell office:value-type="float" office:value="1528.4" table:style-name="ce1">
            <text:p>1528.4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6-27T00:00:00" table:style-name="ce2">
            <text:p>27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9683.85" table:style-name="ce1">
            <text:p>9683.85</text:p>
          </table:table-cell>
          <table:table-cell office:value-type="string" office:string-value="High" table:formula="of:=IF([.E649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office:value-type="float" office:value="4394.58" table:style-name="ce1">
            <text:p>4394.58</text:p>
          </table:table-cell>
          <table:table-cell office:value-type="float" office:value="4545.78" table:style-name="ce1">
            <text:p>4545.78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12-04T00:00:00" table:style-name="ce2">
            <text:p>04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758.99" table:style-name="ce1">
            <text:p>758.99</text:p>
          </table:table-cell>
          <table:table-cell office:value-type="string" office:string-value="Low" table:formula="of:=IF([.E650]&gt;[.$E$1003];&quot;High&quot;;&quot;Low&quot;)" table:style-name="ce1">
            <text:p>Low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urniture</text:p>
          </table:table-cell>
          <table:table-cell office:value-type="float" office:value="493.35" table:style-name="ce1">
            <text:p>493.35</text:p>
          </table:table-cell>
          <table:table-cell office:value-type="float" office:value="799.27" table:style-name="ce1">
            <text:p>799.27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03-03T00:00:00" table:style-name="ce2">
            <text:p>03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6518.35" table:style-name="ce1">
            <text:p>6518.35</text:p>
          </table:table-cell>
          <table:table-cell office:value-type="string" office:string-value="High" table:formula="of:=IF([.E651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lectronics</text:p>
          </table:table-cell>
          <table:table-cell office:value-type="float" office:value="3591.05" table:style-name="ce1">
            <text:p>3591.05</text:p>
          </table:table-cell>
          <table:table-cell office:value-type="float" office:value="3625.35" table:style-name="ce1">
            <text:p>3625.35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05-25T00:00:00" table:style-name="ce2">
            <text:p>25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833.64" table:style-name="ce1">
            <text:p>833.64</text:p>
          </table:table-cell>
          <table:table-cell office:value-type="string" office:string-value="Low" table:formula="of:=IF([.E652]&gt;[.$E$1003];&quot;High&quot;;&quot;Low&quot;)" table:style-name="ce1">
            <text:p>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othing</text:p>
          </table:table-cell>
          <table:table-cell office:value-type="float" office:value="1392.15" table:style-name="ce1">
            <text:p>1392.15</text:p>
          </table:table-cell>
          <table:table-cell office:value-type="float" office:value="1448.54" table:style-name="ce1">
            <text:p>1448.54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08-04T00:00:00" table:style-name="ce2">
            <text:p>04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3817.14" table:style-name="ce1">
            <text:p>3817.14</text:p>
          </table:table-cell>
          <table:table-cell office:value-type="string" office:string-value="Low" table:formula="of:=IF([.E653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lectronics</text:p>
          </table:table-cell>
          <table:table-cell office:value-type="float" office:value="3813.62" table:style-name="ce1">
            <text:p>3813.62</text:p>
          </table:table-cell>
          <table:table-cell office:value-type="float" office:value="3839.72" table:style-name="ce1">
            <text:p>3839.72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01-03T00:00:00" table:style-name="ce2">
            <text:p>03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8057.76" table:style-name="ce1">
            <text:p>8057.76</text:p>
          </table:table-cell>
          <table:table-cell office:value-type="string" office:string-value="High" table:formula="of:=IF([.E654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urniture</text:p>
          </table:table-cell>
          <table:table-cell office:value-type="float" office:value="3625.94" table:style-name="ce1">
            <text:p>3625.94</text:p>
          </table:table-cell>
          <table:table-cell office:value-type="float" office:value="3880.53" table:style-name="ce1">
            <text:p>3880.53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4391.38" table:style-name="ce1">
            <text:p>4391.38</text:p>
          </table:table-cell>
          <table:table-cell office:value-type="string" office:string-value="Low" table:formula="of:=IF([.E655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ood</text:p>
          </table:table-cell>
          <table:table-cell office:value-type="float" office:value="86.59" table:style-name="ce1">
            <text:p>86.59</text:p>
          </table:table-cell>
          <table:table-cell office:value-type="float" office:value="390.89" table:style-name="ce1">
            <text:p>390.89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8-15T00:00:00" table:style-name="ce2">
            <text:p>15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9972.11" table:style-name="ce1">
            <text:p>9972.11</text:p>
          </table:table-cell>
          <table:table-cell office:value-type="string" office:string-value="High" table:formula="of:=IF([.E656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2570.2199999999998" table:style-name="ce1">
            <text:p>2570.22</text:p>
          </table:table-cell>
          <table:table-cell office:value-type="float" office:value="2610.8399999999901" table:style-name="ce1">
            <text:p>2610.84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date" office:date-value="2023-09-26T00:00:00" table:style-name="ce2">
            <text:p>26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5634.69" table:style-name="ce1">
            <text:p>5634.69</text:p>
          </table:table-cell>
          <table:table-cell office:value-type="string" office:string-value="High" table:formula="of:=IF([.E657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rniture</text:p>
          </table:table-cell>
          <table:table-cell office:value-type="float" office:value="739.63" table:style-name="ce1">
            <text:p>739.63</text:p>
          </table:table-cell>
          <table:table-cell office:value-type="float" office:value="1103.03" table:style-name="ce1">
            <text:p>1103.03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date" office:date-value="2023-04-30T00:00:00" table:style-name="ce2">
            <text:p>30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3279.51" table:style-name="ce1">
            <text:p>3279.51</text:p>
          </table:table-cell>
          <table:table-cell office:value-type="string" office:string-value="Low" table:formula="of:=IF([.E658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lothing</text:p>
          </table:table-cell>
          <table:table-cell office:value-type="float" office:value="4337.82" table:style-name="ce1">
            <text:p>4337.82</text:p>
          </table:table-cell>
          <table:table-cell office:value-type="float" office:value="4460.71" table:style-name="ce1">
            <text:p>4460.71</text:p>
          </table:table-cell>
          <table:table-cell office:value-type="string" table:style-name="ce1">
            <text:p>Returnin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03-30T00:00:00" table:style-name="ce2">
            <text:p>30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2279.1" table:style-name="ce1">
            <text:p>2279.1</text:p>
          </table:table-cell>
          <table:table-cell office:value-type="string" office:string-value="Low" table:formula="of:=IF([.E659]&gt;[.$E$1003];&quot;High&quot;;&quot;Low&quot;)" table:style-name="ce1">
            <text:p>Lo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lothing</text:p>
          </table:table-cell>
          <table:table-cell office:value-type="float" office:value="4364.3500000000004" table:style-name="ce1">
            <text:p>4364.35</text:p>
          </table:table-cell>
          <table:table-cell office:value-type="float" office:value="4710.1000000000004" table:style-name="ce1">
            <text:p>4710.1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11-25T00:00:00" table:style-name="ce2">
            <text:p>25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3570.15" table:style-name="ce1">
            <text:p>3570.15</text:p>
          </table:table-cell>
          <table:table-cell office:value-type="string" office:string-value="Low" table:formula="of:=IF([.E660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urniture</text:p>
          </table:table-cell>
          <table:table-cell office:value-type="float" office:value="2120.81" table:style-name="ce1">
            <text:p>2120.81</text:p>
          </table:table-cell>
          <table:table-cell office:value-type="float" office:value="2611.94" table:style-name="ce1">
            <text:p>2611.94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03-09T00:00:00" table:style-name="ce2">
            <text:p>09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3788.08" table:style-name="ce1">
            <text:p>3788.08</text:p>
          </table:table-cell>
          <table:table-cell office:value-type="string" office:string-value="Low" table:formula="of:=IF([.E661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urniture</text:p>
          </table:table-cell>
          <table:table-cell office:value-type="float" office:value="2249.7600000000002" table:style-name="ce1">
            <text:p>2249.76</text:p>
          </table:table-cell>
          <table:table-cell office:value-type="float" office:value="2598.4" table:style-name="ce1">
            <text:p>2598.4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12-23T00:00:00" table:style-name="ce2">
            <text:p>23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780.27" table:style-name="ce1">
            <text:p>780.27</text:p>
          </table:table-cell>
          <table:table-cell office:value-type="string" office:string-value="Low" table:formula="of:=IF([.E662]&gt;[.$E$1003];&quot;High&quot;;&quot;Low&quot;)" table:style-name="ce1">
            <text:p>Low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ood</text:p>
          </table:table-cell>
          <table:table-cell office:value-type="float" office:value="1551.25" table:style-name="ce1">
            <text:p>1551.25</text:p>
          </table:table-cell>
          <table:table-cell office:value-type="float" office:value="1994.01" table:style-name="ce1">
            <text:p>1994.01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date" office:date-value="2023-04-08T00:00:00" table:style-name="ce2">
            <text:p>08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3758.78" table:style-name="ce1">
            <text:p>3758.78</text:p>
          </table:table-cell>
          <table:table-cell office:value-type="string" office:string-value="Low" table:formula="of:=IF([.E663]&gt;[.$E$1003];&quot;High&quot;;&quot;Low&quot;)" table:style-name="ce1">
            <text:p>Low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othing</text:p>
          </table:table-cell>
          <table:table-cell office:value-type="float" office:value="3597.2" table:style-name="ce1">
            <text:p>3597.2</text:p>
          </table:table-cell>
          <table:table-cell office:value-type="float" office:value="4071.8199999999902" table:style-name="ce1">
            <text:p>4071.82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4695.96" table:style-name="ce1">
            <text:p>4695.96</text:p>
          </table:table-cell>
          <table:table-cell office:value-type="string" office:string-value="Low" table:formula="of:=IF([.E664]&gt;[.$E$1003];&quot;High&quot;;&quot;Low&quot;)" table:style-name="ce1">
            <text:p>Low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lothing</text:p>
          </table:table-cell>
          <table:table-cell office:value-type="float" office:value="1825.37" table:style-name="ce1">
            <text:p>1825.37</text:p>
          </table:table-cell>
          <table:table-cell office:value-type="float" office:value="2073.88" table:style-name="ce1">
            <text:p>2073.88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04-15T00:00:00" table:style-name="ce2">
            <text:p>15/04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7255.1" table:style-name="ce1">
            <text:p>7255.1</text:p>
          </table:table-cell>
          <table:table-cell office:value-type="string" office:string-value="High" table:formula="of:=IF([.E665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urniture</text:p>
          </table:table-cell>
          <table:table-cell office:value-type="float" office:value="1375.57" table:style-name="ce1">
            <text:p>1375.57</text:p>
          </table:table-cell>
          <table:table-cell office:value-type="float" office:value="1729.71" table:style-name="ce1">
            <text:p>1729.71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date" office:date-value="2023-11-19T00:00:00" table:style-name="ce2">
            <text:p>19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601.62" table:style-name="ce1">
            <text:p>6601.62</text:p>
          </table:table-cell>
          <table:table-cell office:value-type="string" office:string-value="High" table:formula="of:=IF([.E666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ectronics</text:p>
          </table:table-cell>
          <table:table-cell office:value-type="float" office:value="2189.54" table:style-name="ce1">
            <text:p>2189.54</text:p>
          </table:table-cell>
          <table:table-cell office:value-type="float" office:value="2617" table:style-name="ce1">
            <text:p>2617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date" office:date-value="2023-05-03T00:00:00" table:style-name="ce2">
            <text:p>03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7116.78" table:style-name="ce1">
            <text:p>7116.78</text:p>
          </table:table-cell>
          <table:table-cell office:value-type="string" office:string-value="High" table:formula="of:=IF([.E667]&gt;[.$E$1003];&quot;High&quot;;&quot;Low&quot;)" table:style-name="ce1">
            <text:p>Hig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urniture</text:p>
          </table:table-cell>
          <table:table-cell office:value-type="float" office:value="502.86" table:style-name="ce1">
            <text:p>502.86</text:p>
          </table:table-cell>
          <table:table-cell office:value-type="float" office:value="687.6" table:style-name="ce1">
            <text:p>687.6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date" office:date-value="2023-01-29T00:00:00" table:style-name="ce2">
            <text:p>29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182.8" table:style-name="ce1">
            <text:p>182.8</text:p>
          </table:table-cell>
          <table:table-cell office:value-type="string" office:string-value="Low" table:formula="of:=IF([.E668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3745.69" table:style-name="ce1">
            <text:p>3745.69</text:p>
          </table:table-cell>
          <table:table-cell office:value-type="float" office:value="3883.77" table:style-name="ce1">
            <text:p>3883.77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date" office:date-value="2023-05-17T00:00:00" table:style-name="ce2">
            <text:p>17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2254.91" table:style-name="ce1">
            <text:p>2254.91</text:p>
          </table:table-cell>
          <table:table-cell office:value-type="string" office:string-value="Low" table:formula="of:=IF([.E669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urniture</text:p>
          </table:table-cell>
          <table:table-cell office:value-type="float" office:value="112.35" table:style-name="ce1">
            <text:p>112.35</text:p>
          </table:table-cell>
          <table:table-cell office:value-type="float" office:value="586.17999999999995" table:style-name="ce1">
            <text:p>586.18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7-14T00:00:00" table:style-name="ce2">
            <text:p>14/07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6650.67" table:style-name="ce1">
            <text:p>6650.67</text:p>
          </table:table-cell>
          <table:table-cell office:value-type="string" office:string-value="High" table:formula="of:=IF([.E670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ood</text:p>
          </table:table-cell>
          <table:table-cell office:value-type="float" office:value="3240.2" table:style-name="ce1">
            <text:p>3240.2</text:p>
          </table:table-cell>
          <table:table-cell office:value-type="float" office:value="3606.0899999999901" table:style-name="ce1">
            <text:p>3606.09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date" office:date-value="2023-08-14T00:00:00" table:style-name="ce2">
            <text:p>14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4891.49" table:style-name="ce1">
            <text:p>4891.49</text:p>
          </table:table-cell>
          <table:table-cell office:value-type="string" office:string-value="Low" table:formula="of:=IF([.E671]&gt;[.$E$1003];&quot;High&quot;;&quot;Low&quot;)" table:style-name="ce1">
            <text:p>Low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lectronics</text:p>
          </table:table-cell>
          <table:table-cell office:value-type="float" office:value="955.18" table:style-name="ce1">
            <text:p>955.18</text:p>
          </table:table-cell>
          <table:table-cell office:value-type="float" office:value="1072.82" table:style-name="ce1">
            <text:p>1072.82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11-28T00:00:00" table:style-name="ce2">
            <text:p>28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152.6" table:style-name="ce1">
            <text:p>152.6</text:p>
          </table:table-cell>
          <table:table-cell office:value-type="string" office:string-value="Low" table:formula="of:=IF([.E672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1200.4000000000001" table:style-name="ce1">
            <text:p>1200.4</text:p>
          </table:table-cell>
          <table:table-cell office:value-type="float" office:value="1430.45" table:style-name="ce1">
            <text:p>1430.45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date" office:date-value="2023-06-19T00:00:00" table:style-name="ce2">
            <text:p>19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8064.5" table:style-name="ce1">
            <text:p>8064.5</text:p>
          </table:table-cell>
          <table:table-cell office:value-type="string" office:string-value="High" table:formula="of:=IF([.E673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ood</text:p>
          </table:table-cell>
          <table:table-cell office:value-type="float" office:value="3196.38" table:style-name="ce1">
            <text:p>3196.38</text:p>
          </table:table-cell>
          <table:table-cell office:value-type="float" office:value="3596.64" table:style-name="ce1">
            <text:p>3596.64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date" office:date-value="2023-01-09T00:00:00" table:style-name="ce2">
            <text:p>09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7750.81" table:style-name="ce1">
            <text:p>7750.81</text:p>
          </table:table-cell>
          <table:table-cell office:value-type="string" office:string-value="High" table:formula="of:=IF([.E674]&gt;[.$E$1003];&quot;High&quot;;&quot;Low&quot;)" table:style-name="ce1">
            <text:p>High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lothing</text:p>
          </table:table-cell>
          <table:table-cell office:value-type="float" office:value="4965.07" table:style-name="ce1">
            <text:p>4965.07</text:p>
          </table:table-cell>
          <table:table-cell office:value-type="float" office:value="5243.13" table:style-name="ce1">
            <text:p>5243.13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02-09T00:00:00" table:style-name="ce2">
            <text:p>09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5529.35" table:style-name="ce1">
            <text:p>5529.35</text:p>
          </table:table-cell>
          <table:table-cell office:value-type="string" office:string-value="High" table:formula="of:=IF([.E675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3899.7" table:style-name="ce1">
            <text:p>3899.7</text:p>
          </table:table-cell>
          <table:table-cell office:value-type="float" office:value="4228.18" table:style-name="ce1">
            <text:p>4228.18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date" office:date-value="2023-01-25T00:00:00" table:style-name="ce2">
            <text:p>25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757.99" table:style-name="ce1">
            <text:p>757.99</text:p>
          </table:table-cell>
          <table:table-cell office:value-type="string" office:string-value="Low" table:formula="of:=IF([.E676]&gt;[.$E$1003];&quot;High&quot;;&quot;Low&quot;)" table:style-name="ce1">
            <text:p>L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lothing</text:p>
          </table:table-cell>
          <table:table-cell office:value-type="float" office:value="1167.9100000000001" table:style-name="ce1">
            <text:p>1167.91</text:p>
          </table:table-cell>
          <table:table-cell office:value-type="float" office:value="1547.26" table:style-name="ce1">
            <text:p>1547.26</text:p>
          </table:table-cell>
          <table:table-cell office:value-type="string" table:style-name="ce1">
            <text:p>New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09-18T00:00:00" table:style-name="ce2">
            <text:p>18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7688.5" table:style-name="ce1">
            <text:p>7688.5</text:p>
          </table:table-cell>
          <table:table-cell office:value-type="string" office:string-value="High" table:formula="of:=IF([.E677]&gt;[.$E$1003];&quot;High&quot;;&quot;Low&quot;)" table:style-name="ce1">
            <text:p>High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ood</text:p>
          </table:table-cell>
          <table:table-cell office:value-type="float" office:value="921.32" table:style-name="ce1">
            <text:p>921.32</text:p>
          </table:table-cell>
          <table:table-cell office:value-type="float" office:value="1236.0999999999999" table:style-name="ce1">
            <text:p>1236.1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date" office:date-value="2023-08-14T00:00:00" table:style-name="ce2">
            <text:p>14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5878.76" table:style-name="ce1">
            <text:p>5878.76</text:p>
          </table:table-cell>
          <table:table-cell office:value-type="string" office:string-value="High" table:formula="of:=IF([.E678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lothing</text:p>
          </table:table-cell>
          <table:table-cell office:value-type="float" office:value="4337.8500000000004" table:style-name="ce1">
            <text:p>4337.85</text:p>
          </table:table-cell>
          <table:table-cell office:value-type="float" office:value="4612.49" table:style-name="ce1">
            <text:p>4612.49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5-04T00:00:00" table:style-name="ce2">
            <text:p>04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7841.4" table:style-name="ce1">
            <text:p>7841.4</text:p>
          </table:table-cell>
          <table:table-cell office:value-type="string" office:string-value="High" table:formula="of:=IF([.E679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ood</text:p>
          </table:table-cell>
          <table:table-cell office:value-type="float" office:value="2248.71" table:style-name="ce1">
            <text:p>2248.71</text:p>
          </table:table-cell>
          <table:table-cell office:value-type="float" office:value="2626.02" table:style-name="ce1">
            <text:p>2626.02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2-07T00:00:00" table:style-name="ce2">
            <text:p>07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7542.3" table:style-name="ce1">
            <text:p>7542.3</text:p>
          </table:table-cell>
          <table:table-cell office:value-type="string" office:string-value="High" table:formula="of:=IF([.E680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od</text:p>
          </table:table-cell>
          <table:table-cell office:value-type="float" office:value="728.41" table:style-name="ce1">
            <text:p>728.41</text:p>
          </table:table-cell>
          <table:table-cell office:value-type="float" office:value="1094.92" table:style-name="ce1">
            <text:p>1094.92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date" office:date-value="2023-11-24T00:00:00" table:style-name="ce2">
            <text:p>24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8049.72" table:style-name="ce1">
            <text:p>8049.72</text:p>
          </table:table-cell>
          <table:table-cell office:value-type="string" office:string-value="High" table:formula="of:=IF([.E681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ood</text:p>
          </table:table-cell>
          <table:table-cell office:value-type="float" office:value="4317.95" table:style-name="ce1">
            <text:p>4317.95</text:p>
          </table:table-cell>
          <table:table-cell office:value-type="float" office:value="4636.59" table:style-name="ce1">
            <text:p>4636.59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09-08T00:00:00" table:style-name="ce2">
            <text:p>08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5228.28" table:style-name="ce1">
            <text:p>5228.28</text:p>
          </table:table-cell>
          <table:table-cell office:value-type="string" office:string-value="High" table:formula="of:=IF([.E682]&gt;[.$E$1003];&quot;High&quot;;&quot;Low&quot;)" table:style-name="ce1">
            <text:p>High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urniture</text:p>
          </table:table-cell>
          <table:table-cell office:value-type="float" office:value="4089.66" table:style-name="ce1">
            <text:p>4089.66</text:p>
          </table:table-cell>
          <table:table-cell office:value-type="float" office:value="4275.96" table:style-name="ce1">
            <text:p>4275.96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date" office:date-value="2023-06-25T00:00:00" table:style-name="ce2">
            <text:p>25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1489.21" table:style-name="ce1">
            <text:p>1489.21</text:p>
          </table:table-cell>
          <table:table-cell office:value-type="string" office:string-value="Low" table:formula="of:=IF([.E683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lothing</text:p>
          </table:table-cell>
          <table:table-cell office:value-type="float" office:value="4920.34" table:style-name="ce1">
            <text:p>4920.34</text:p>
          </table:table-cell>
          <table:table-cell office:value-type="float" office:value="5129.1899999999996" table:style-name="ce1">
            <text:p>5129.19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03-31T00:00:00" table:style-name="ce2">
            <text:p>31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6744.46" table:style-name="ce1">
            <text:p>6744.46</text:p>
          </table:table-cell>
          <table:table-cell office:value-type="string" office:string-value="High" table:formula="of:=IF([.E684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lothing</text:p>
          </table:table-cell>
          <table:table-cell office:value-type="float" office:value="4553.2299999999996" table:style-name="ce1">
            <text:p>4553.23</text:p>
          </table:table-cell>
          <table:table-cell office:value-type="float" office:value="5038.74" table:style-name="ce1">
            <text:p>5038.74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02-06T00:00:00" table:style-name="ce2">
            <text:p>06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6242.69" table:style-name="ce1">
            <text:p>6242.69</text:p>
          </table:table-cell>
          <table:table-cell office:value-type="string" office:string-value="High" table:formula="of:=IF([.E685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lectronics</text:p>
          </table:table-cell>
          <table:table-cell office:value-type="float" office:value="4266.3599999999997" table:style-name="ce1">
            <text:p>4266.36</text:p>
          </table:table-cell>
          <table:table-cell office:value-type="float" office:value="4331.4299999999903" table:style-name="ce1">
            <text:p>4331.43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date" office:date-value="2023-11-12T00:00:00" table:style-name="ce2">
            <text:p>12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7448.31" table:style-name="ce1">
            <text:p>7448.31</text:p>
          </table:table-cell>
          <table:table-cell office:value-type="string" office:string-value="High" table:formula="of:=IF([.E686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310.24" table:style-name="ce1">
            <text:p>310.24</text:p>
          </table:table-cell>
          <table:table-cell office:value-type="float" office:value="451.81" table:style-name="ce1">
            <text:p>451.81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date" office:date-value="2023-06-25T00:00:00" table:style-name="ce2">
            <text:p>25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781.82" table:style-name="ce1">
            <text:p>1781.82</text:p>
          </table:table-cell>
          <table:table-cell office:value-type="string" office:string-value="Low" table:formula="of:=IF([.E687]&gt;[.$E$1003];&quot;High&quot;;&quot;Low&quot;)" table:style-name="ce1">
            <text:p>Lo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lectronics</text:p>
          </table:table-cell>
          <table:table-cell office:value-type="float" office:value="566.86" table:style-name="ce1">
            <text:p>566.86</text:p>
          </table:table-cell>
          <table:table-cell office:value-type="float" office:value="818.14" table:style-name="ce1">
            <text:p>818.14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10-11T00:00:00" table:style-name="ce2">
            <text:p>11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2030.25" table:style-name="ce1">
            <text:p>2030.25</text:p>
          </table:table-cell>
          <table:table-cell office:value-type="string" office:string-value="Low" table:formula="of:=IF([.E688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onics</text:p>
          </table:table-cell>
          <table:table-cell office:value-type="float" office:value="2866.47" table:style-name="ce1">
            <text:p>2866.47</text:p>
          </table:table-cell>
          <table:table-cell office:value-type="float" office:value="3286.47" table:style-name="ce1">
            <text:p>3286.47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03-22T00:00:00" table:style-name="ce2">
            <text:p>22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8915.0499999999993" table:style-name="ce1">
            <text:p>8915.05</text:p>
          </table:table-cell>
          <table:table-cell office:value-type="string" office:string-value="High" table:formula="of:=IF([.E689]&gt;[.$E$1003];&quot;High&quot;;&quot;Low&quot;)" table:style-name="ce1">
            <text:p>High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lothing</text:p>
          </table:table-cell>
          <table:table-cell office:value-type="float" office:value="2680.82" table:style-name="ce1">
            <text:p>2680.82</text:p>
          </table:table-cell>
          <table:table-cell office:value-type="float" office:value="2771.02" table:style-name="ce1">
            <text:p>2771.02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04-24T00:00:00" table:style-name="ce2">
            <text:p>24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524.78" table:style-name="ce1">
            <text:p>7524.78</text:p>
          </table:table-cell>
          <table:table-cell office:value-type="string" office:string-value="High" table:formula="of:=IF([.E690]&gt;[.$E$1003];&quot;High&quot;;&quot;Low&quot;)" table:style-name="ce1">
            <text:p>Hig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ood</text:p>
          </table:table-cell>
          <table:table-cell office:value-type="float" office:value="2316.92" table:style-name="ce1">
            <text:p>2316.92</text:p>
          </table:table-cell>
          <table:table-cell office:value-type="float" office:value="2462.63" table:style-name="ce1">
            <text:p>2462.63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2-09T00:00:00" table:style-name="ce2">
            <text:p>09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9091.4599999999991" table:style-name="ce1">
            <text:p>9091.46</text:p>
          </table:table-cell>
          <table:table-cell office:value-type="string" office:string-value="High" table:formula="of:=IF([.E691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ood</text:p>
          </table:table-cell>
          <table:table-cell office:value-type="float" office:value="2014.11" table:style-name="ce1">
            <text:p>2014.11</text:p>
          </table:table-cell>
          <table:table-cell office:value-type="float" office:value="2056.35" table:style-name="ce1">
            <text:p>2056.35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date" office:date-value="2023-10-28T00:00:00" table:style-name="ce2">
            <text:p>28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7611.28" table:style-name="ce1">
            <text:p>7611.28</text:p>
          </table:table-cell>
          <table:table-cell office:value-type="string" office:string-value="High" table:formula="of:=IF([.E692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urniture</text:p>
          </table:table-cell>
          <table:table-cell office:value-type="float" office:value="2184.4899999999998" table:style-name="ce1">
            <text:p>2184.49</text:p>
          </table:table-cell>
          <table:table-cell office:value-type="float" office:value="2540.4199999999901" table:style-name="ce1">
            <text:p>2540.42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08-12T00:00:00" table:style-name="ce2">
            <text:p>12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011.84" table:style-name="ce1">
            <text:p>6011.84</text:p>
          </table:table-cell>
          <table:table-cell office:value-type="string" office:string-value="High" table:formula="of:=IF([.E693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od</text:p>
          </table:table-cell>
          <table:table-cell office:value-type="float" office:value="2868.02" table:style-name="ce1">
            <text:p>2868.02</text:p>
          </table:table-cell>
          <table:table-cell office:value-type="float" office:value="2994.74" table:style-name="ce1">
            <text:p>2994.74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575.91" table:style-name="ce1">
            <text:p>6575.91</text:p>
          </table:table-cell>
          <table:table-cell office:value-type="string" office:string-value="High" table:formula="of:=IF([.E694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thing</text:p>
          </table:table-cell>
          <table:table-cell office:value-type="float" office:value="60.28" table:style-name="ce1">
            <text:p>60.28</text:p>
          </table:table-cell>
          <table:table-cell office:value-type="float" office:value="260.73" table:style-name="ce1">
            <text:p>260.73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12-15T00:00:00" table:style-name="ce2">
            <text:p>15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8902.3700000000008" table:style-name="ce1">
            <text:p>8902.37</text:p>
          </table:table-cell>
          <table:table-cell office:value-type="string" office:string-value="High" table:formula="of:=IF([.E695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lothing</text:p>
          </table:table-cell>
          <table:table-cell office:value-type="float" office:value="1340.51" table:style-name="ce1">
            <text:p>1340.51</text:p>
          </table:table-cell>
          <table:table-cell office:value-type="float" office:value="1567.92" table:style-name="ce1">
            <text:p>1567.92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4-25T00:00:00" table:style-name="ce2">
            <text:p>25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5830.19" table:style-name="ce1">
            <text:p>5830.19</text:p>
          </table:table-cell>
          <table:table-cell office:value-type="string" office:string-value="High" table:formula="of:=IF([.E696]&gt;[.$E$1003];&quot;High&quot;;&quot;Low&quot;)" table:style-name="ce1">
            <text:p>High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lothing</text:p>
          </table:table-cell>
          <table:table-cell office:value-type="float" office:value="2615.48" table:style-name="ce1">
            <text:p>2615.48</text:p>
          </table:table-cell>
          <table:table-cell office:value-type="float" office:value="3062.22" table:style-name="ce1">
            <text:p>3062.22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7-05T00:00:00" table:style-name="ce2">
            <text:p>05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6360.67" table:style-name="ce1">
            <text:p>6360.67</text:p>
          </table:table-cell>
          <table:table-cell office:value-type="string" office:string-value="High" table:formula="of:=IF([.E697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urniture</text:p>
          </table:table-cell>
          <table:table-cell office:value-type="float" office:value="3624.97" table:style-name="ce1">
            <text:p>3624.97</text:p>
          </table:table-cell>
          <table:table-cell office:value-type="float" office:value="3836.52" table:style-name="ce1">
            <text:p>3836.52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date" office:date-value="2023-11-19T00:00:00" table:style-name="ce2">
            <text:p>19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1649.12" table:style-name="ce1">
            <text:p>1649.12</text:p>
          </table:table-cell>
          <table:table-cell office:value-type="string" office:string-value="Low" table:formula="of:=IF([.E698]&gt;[.$E$1003];&quot;High&quot;;&quot;Low&quot;)" table:style-name="ce1">
            <text:p>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office:value-type="float" office:value="912.08" table:style-name="ce1">
            <text:p>912.08</text:p>
          </table:table-cell>
          <table:table-cell office:value-type="float" office:value="993.24" table:style-name="ce1">
            <text:p>993.24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02-25T00:00:00" table:style-name="ce2">
            <text:p>25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4791.82" table:style-name="ce1">
            <text:p>4791.82</text:p>
          </table:table-cell>
          <table:table-cell office:value-type="string" office:string-value="Low" table:formula="of:=IF([.E699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ood</text:p>
          </table:table-cell>
          <table:table-cell office:value-type="float" office:value="2757.06" table:style-name="ce1">
            <text:p>2757.06</text:p>
          </table:table-cell>
          <table:table-cell office:value-type="float" office:value="3023.97" table:style-name="ce1">
            <text:p>3023.97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2-09T00:00:00" table:style-name="ce2">
            <text:p>09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7192.33" table:style-name="ce1">
            <text:p>7192.33</text:p>
          </table:table-cell>
          <table:table-cell office:value-type="string" office:string-value="High" table:formula="of:=IF([.E700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lothing</text:p>
          </table:table-cell>
          <table:table-cell office:value-type="float" office:value="3586.58" table:style-name="ce1">
            <text:p>3586.58</text:p>
          </table:table-cell>
          <table:table-cell office:value-type="float" office:value="4068.43" table:style-name="ce1">
            <text:p>4068.43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12-20T00:00:00" table:style-name="ce2">
            <text:p>20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782.33" table:style-name="ce1">
            <text:p>2782.33</text:p>
          </table:table-cell>
          <table:table-cell office:value-type="string" office:string-value="Low" table:formula="of:=IF([.E701]&gt;[.$E$1003];&quot;High&quot;;&quot;Low&quot;)" table:style-name="ce1">
            <text:p>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othing</text:p>
          </table:table-cell>
          <table:table-cell office:value-type="float" office:value="2250.91" table:style-name="ce1">
            <text:p>2250.91</text:p>
          </table:table-cell>
          <table:table-cell office:value-type="float" office:value="2558.6799999999998" table:style-name="ce1">
            <text:p>2558.68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date" office:date-value="2023-02-09T00:00:00" table:style-name="ce2">
            <text:p>09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102.3200000000002" table:style-name="ce1">
            <text:p>2102.32</text:p>
          </table:table-cell>
          <table:table-cell office:value-type="string" office:string-value="Low" table:formula="of:=IF([.E702]&gt;[.$E$1003];&quot;High&quot;;&quot;Low&quot;)" table:style-name="ce1">
            <text:p>Low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lectronics</text:p>
          </table:table-cell>
          <table:table-cell office:value-type="float" office:value="184.05" table:style-name="ce1">
            <text:p>184.05</text:p>
          </table:table-cell>
          <table:table-cell office:value-type="float" office:value="675.91" table:style-name="ce1">
            <text:p>675.91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3206.89" table:style-name="ce1">
            <text:p>3206.89</text:p>
          </table:table-cell>
          <table:table-cell office:value-type="string" office:string-value="Low" table:formula="of:=IF([.E703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othing</text:p>
          </table:table-cell>
          <table:table-cell office:value-type="float" office:value="2273.88" table:style-name="ce1">
            <text:p>2273.88</text:p>
          </table:table-cell>
          <table:table-cell office:value-type="float" office:value="2696.02" table:style-name="ce1">
            <text:p>2696.02</text:p>
          </table:table-cell>
          <table:table-cell office:value-type="string" table:style-name="ce1">
            <text:p>New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date" office:date-value="2023-08-25T00:00:00" table:style-name="ce2">
            <text:p>25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2490.86" table:style-name="ce1">
            <text:p>2490.86</text:p>
          </table:table-cell>
          <table:table-cell office:value-type="string" office:string-value="Low" table:formula="of:=IF([.E704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ood</text:p>
          </table:table-cell>
          <table:table-cell office:value-type="float" office:value="1517.4" table:style-name="ce1">
            <text:p>1517.4</text:p>
          </table:table-cell>
          <table:table-cell office:value-type="float" office:value="1545.02" table:style-name="ce1">
            <text:p>1545.02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10-16T00:00:00" table:style-name="ce2">
            <text:p>16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227.64" table:style-name="ce1">
            <text:p>2227.64</text:p>
          </table:table-cell>
          <table:table-cell office:value-type="string" office:string-value="Low" table:formula="of:=IF([.E705]&gt;[.$E$1003];&quot;High&quot;;&quot;Low&quot;)" table:style-name="ce1">
            <text:p>Low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urniture</text:p>
          </table:table-cell>
          <table:table-cell office:value-type="float" office:value="4651.7700000000004" table:style-name="ce1">
            <text:p>4651.77</text:p>
          </table:table-cell>
          <table:table-cell office:value-type="float" office:value="4984.3900000000003" table:style-name="ce1">
            <text:p>4984.39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4306.0200000000004" table:style-name="ce1">
            <text:p>4306.02</text:p>
          </table:table-cell>
          <table:table-cell office:value-type="string" office:string-value="Low" table:formula="of:=IF([.E706]&gt;[.$E$1003];&quot;High&quot;;&quot;Low&quot;)" table:style-name="ce1">
            <text:p>Low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666.84" table:style-name="ce1">
            <text:p>666.84</text:p>
          </table:table-cell>
          <table:table-cell office:value-type="float" office:value="817.36" table:style-name="ce1">
            <text:p>817.36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8-04T00:00:00" table:style-name="ce2">
            <text:p>04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9087.6" table:style-name="ce1">
            <text:p>9087.6</text:p>
          </table:table-cell>
          <table:table-cell office:value-type="string" office:string-value="High" table:formula="of:=IF([.E707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ood</text:p>
          </table:table-cell>
          <table:table-cell office:value-type="float" office:value="3279.76" table:style-name="ce1">
            <text:p>3279.76</text:p>
          </table:table-cell>
          <table:table-cell office:value-type="float" office:value="3563.97" table:style-name="ce1">
            <text:p>3563.97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05-27T00:00:00" table:style-name="ce2">
            <text:p>27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5119.8900000000003" table:style-name="ce1">
            <text:p>5119.89</text:p>
          </table:table-cell>
          <table:table-cell office:value-type="string" office:string-value="High" table:formula="of:=IF([.E708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lothing</text:p>
          </table:table-cell>
          <table:table-cell office:value-type="float" office:value="310.95999999999998" table:style-name="ce1">
            <text:p>310.96</text:p>
          </table:table-cell>
          <table:table-cell office:value-type="float" office:value="457.84" table:style-name="ce1">
            <text:p>457.84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date" office:date-value="2023-12-02T00:00:00" table:style-name="ce2">
            <text:p>02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1960.41" table:style-name="ce1">
            <text:p>1960.41</text:p>
          </table:table-cell>
          <table:table-cell office:value-type="string" office:string-value="Low" table:formula="of:=IF([.E709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ectronics</text:p>
          </table:table-cell>
          <table:table-cell office:value-type="float" office:value="2258.54" table:style-name="ce1">
            <text:p>2258.54</text:p>
          </table:table-cell>
          <table:table-cell office:value-type="float" office:value="2439.4899999999998" table:style-name="ce1">
            <text:p>2439.49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6-17T00:00:00" table:style-name="ce2">
            <text:p>17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862.02" table:style-name="ce1">
            <text:p>862.02</text:p>
          </table:table-cell>
          <table:table-cell office:value-type="string" office:string-value="Low" table:formula="of:=IF([.E710]&gt;[.$E$1003];&quot;High&quot;;&quot;Low&quot;)" table:style-name="ce1">
            <text:p>Low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lothing</text:p>
          </table:table-cell>
          <table:table-cell office:value-type="float" office:value="2792.2" table:style-name="ce1">
            <text:p>2792.2</text:p>
          </table:table-cell>
          <table:table-cell office:value-type="float" office:value="3254.5499999999902" table:style-name="ce1">
            <text:p>3254.55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4-02T00:00:00" table:style-name="ce2">
            <text:p>02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991.95" table:style-name="ce1">
            <text:p>6991.95</text:p>
          </table:table-cell>
          <table:table-cell office:value-type="string" office:string-value="High" table:formula="of:=IF([.E711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lothing</text:p>
          </table:table-cell>
          <table:table-cell office:value-type="float" office:value="1524.88" table:style-name="ce1">
            <text:p>1524.88</text:p>
          </table:table-cell>
          <table:table-cell office:value-type="float" office:value="1636.14" table:style-name="ce1">
            <text:p>1636.14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12-19T00:00:00" table:style-name="ce2">
            <text:p>19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3889.71" table:style-name="ce1">
            <text:p>3889.71</text:p>
          </table:table-cell>
          <table:table-cell office:value-type="string" office:string-value="Low" table:formula="of:=IF([.E712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rniture</text:p>
          </table:table-cell>
          <table:table-cell office:value-type="float" office:value="2302.62" table:style-name="ce1">
            <text:p>2302.62</text:p>
          </table:table-cell>
          <table:table-cell office:value-type="float" office:value="2740.93" table:style-name="ce1">
            <text:p>2740.93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02-28T00:00:00" table:style-name="ce2">
            <text:p>28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8236.1299999999992" table:style-name="ce1">
            <text:p>8236.13</text:p>
          </table:table-cell>
          <table:table-cell office:value-type="string" office:string-value="High" table:formula="of:=IF([.E713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lectronics</text:p>
          </table:table-cell>
          <table:table-cell office:value-type="float" office:value="859.59" table:style-name="ce1">
            <text:p>859.59</text:p>
          </table:table-cell>
          <table:table-cell office:value-type="float" office:value="884.51" table:style-name="ce1">
            <text:p>884.51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date" office:date-value="2023-02-28T00:00:00" table:style-name="ce2">
            <text:p>28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6629.16" table:style-name="ce1">
            <text:p>6629.16</text:p>
          </table:table-cell>
          <table:table-cell office:value-type="string" office:string-value="High" table:formula="of:=IF([.E714]&gt;[.$E$1003];&quot;High&quot;;&quot;Low&quot;)" table:style-name="ce1">
            <text:p>Hig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lectronics</text:p>
          </table:table-cell>
          <table:table-cell office:value-type="float" office:value="1555.41" table:style-name="ce1">
            <text:p>1555.41</text:p>
          </table:table-cell>
          <table:table-cell office:value-type="float" office:value="1609.94" table:style-name="ce1">
            <text:p>1609.94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10-31T00:00:00" table:style-name="ce2">
            <text:p>31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7982.79" table:style-name="ce1">
            <text:p>7982.79</text:p>
          </table:table-cell>
          <table:table-cell office:value-type="string" office:string-value="High" table:formula="of:=IF([.E715]&gt;[.$E$1003];&quot;High&quot;;&quot;Low&quot;)" table:style-name="ce1">
            <text:p>High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urniture</text:p>
          </table:table-cell>
          <table:table-cell office:value-type="float" office:value="3124.48" table:style-name="ce1">
            <text:p>3124.48</text:p>
          </table:table-cell>
          <table:table-cell office:value-type="float" office:value="3553.27" table:style-name="ce1">
            <text:p>3553.27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06-18T00:00:00" table:style-name="ce2">
            <text:p>18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2792.27" table:style-name="ce1">
            <text:p>2792.27</text:p>
          </table:table-cell>
          <table:table-cell office:value-type="string" office:string-value="Low" table:formula="of:=IF([.E716]&gt;[.$E$1003];&quot;High&quot;;&quot;Low&quot;)" table:style-name="ce1">
            <text:p>Low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lothing</text:p>
          </table:table-cell>
          <table:table-cell office:value-type="float" office:value="1543.91" table:style-name="ce1">
            <text:p>1543.91</text:p>
          </table:table-cell>
          <table:table-cell office:value-type="float" office:value="1862.88" table:style-name="ce1">
            <text:p>1862.88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date" office:date-value="2023-09-26T00:00:00" table:style-name="ce2">
            <text:p>26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954.35" table:style-name="ce1">
            <text:p>6954.35</text:p>
          </table:table-cell>
          <table:table-cell office:value-type="string" office:string-value="High" table:formula="of:=IF([.E717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ood</text:p>
          </table:table-cell>
          <table:table-cell office:value-type="float" office:value="4503.7299999999996" table:style-name="ce1">
            <text:p>4503.73</text:p>
          </table:table-cell>
          <table:table-cell office:value-type="float" office:value="4879.8799999999901" table:style-name="ce1">
            <text:p>4879.88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12-29T00:00:00" table:style-name="ce2">
            <text:p>29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714.21" table:style-name="ce1">
            <text:p>2714.21</text:p>
          </table:table-cell>
          <table:table-cell office:value-type="string" office:string-value="Low" table:formula="of:=IF([.E718]&gt;[.$E$1003];&quot;High&quot;;&quot;Low&quot;)" table:style-name="ce1">
            <text:p>L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lectronics</text:p>
          </table:table-cell>
          <table:table-cell office:value-type="float" office:value="3160.61" table:style-name="ce1">
            <text:p>3160.61</text:p>
          </table:table-cell>
          <table:table-cell office:value-type="float" office:value="3273.22" table:style-name="ce1">
            <text:p>3273.22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02-14T00:00:00" table:style-name="ce2">
            <text:p>14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9396.7800000000007" table:style-name="ce1">
            <text:p>9396.78</text:p>
          </table:table-cell>
          <table:table-cell office:value-type="string" office:string-value="High" table:formula="of:=IF([.E719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lectronics</text:p>
          </table:table-cell>
          <table:table-cell office:value-type="float" office:value="2221.31" table:style-name="ce1">
            <text:p>2221.31</text:p>
          </table:table-cell>
          <table:table-cell office:value-type="float" office:value="2494.48" table:style-name="ce1">
            <text:p>2494.48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date" office:date-value="2023-12-11T00:00:00" table:style-name="ce2">
            <text:p>11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6400.11" table:style-name="ce1">
            <text:p>6400.11</text:p>
          </table:table-cell>
          <table:table-cell office:value-type="string" office:string-value="High" table:formula="of:=IF([.E720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lothing</text:p>
          </table:table-cell>
          <table:table-cell office:value-type="float" office:value="241.85" table:style-name="ce1">
            <text:p>241.85</text:p>
          </table:table-cell>
          <table:table-cell office:value-type="float" office:value="613.09" table:style-name="ce1">
            <text:p>613.09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06-30T00:00:00" table:style-name="ce2">
            <text:p>30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3312.67" table:style-name="ce1">
            <text:p>3312.67</text:p>
          </table:table-cell>
          <table:table-cell office:value-type="string" office:string-value="Low" table:formula="of:=IF([.E721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othing</text:p>
          </table:table-cell>
          <table:table-cell office:value-type="float" office:value="2522.7600000000002" table:style-name="ce1">
            <text:p>2522.76</text:p>
          </table:table-cell>
          <table:table-cell office:value-type="float" office:value="2840.14" table:style-name="ce1">
            <text:p>2840.14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date" office:date-value="2023-06-19T00:00:00" table:style-name="ce2">
            <text:p>19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768.17" table:style-name="ce1">
            <text:p>2768.17</text:p>
          </table:table-cell>
          <table:table-cell office:value-type="string" office:string-value="Low" table:formula="of:=IF([.E722]&gt;[.$E$1003];&quot;High&quot;;&quot;Low&quot;)" table:style-name="ce1">
            <text:p>Low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lectronics</text:p>
          </table:table-cell>
          <table:table-cell office:value-type="float" office:value="3835.64" table:style-name="ce1">
            <text:p>3835.64</text:p>
          </table:table-cell>
          <table:table-cell office:value-type="float" office:value="4076.77" table:style-name="ce1">
            <text:p>4076.77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1990.17" table:style-name="ce1">
            <text:p>1990.17</text:p>
          </table:table-cell>
          <table:table-cell office:value-type="string" office:string-value="Low" table:formula="of:=IF([.E723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1364.51" table:style-name="ce1">
            <text:p>1364.51</text:p>
          </table:table-cell>
          <table:table-cell office:value-type="float" office:value="1844.8" table:style-name="ce1">
            <text:p>1844.8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7-10T00:00:00" table:style-name="ce2">
            <text:p>10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976.95" table:style-name="ce1">
            <text:p>6976.95</text:p>
          </table:table-cell>
          <table:table-cell office:value-type="string" office:string-value="High" table:formula="of:=IF([.E724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ood</text:p>
          </table:table-cell>
          <table:table-cell office:value-type="float" office:value="4043.53" table:style-name="ce1">
            <text:p>4043.53</text:p>
          </table:table-cell>
          <table:table-cell office:value-type="float" office:value="4384.8500000000004" table:style-name="ce1">
            <text:p>4384.85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06-04T00:00:00" table:style-name="ce2">
            <text:p>04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265.2800000000002" table:style-name="ce1">
            <text:p>2265.28</text:p>
          </table:table-cell>
          <table:table-cell office:value-type="string" office:string-value="Low" table:formula="of:=IF([.E725]&gt;[.$E$1003];&quot;High&quot;;&quot;Low&quot;)" table:style-name="ce1">
            <text:p>Low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ectronics</text:p>
          </table:table-cell>
          <table:table-cell office:value-type="float" office:value="1296.44" table:style-name="ce1">
            <text:p>1296.44</text:p>
          </table:table-cell>
          <table:table-cell office:value-type="float" office:value="1751.24" table:style-name="ce1">
            <text:p>1751.24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date" office:date-value="2023-07-07T00:00:00" table:style-name="ce2">
            <text:p>07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5993.5" table:style-name="ce1">
            <text:p>5993.5</text:p>
          </table:table-cell>
          <table:table-cell office:value-type="string" office:string-value="High" table:formula="of:=IF([.E726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ood</text:p>
          </table:table-cell>
          <table:table-cell office:value-type="float" office:value="4127.54" table:style-name="ce1">
            <text:p>4127.54</text:p>
          </table:table-cell>
          <table:table-cell office:value-type="float" office:value="4495.13" table:style-name="ce1">
            <text:p>4495.13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date" office:date-value="2023-01-07T00:00:00" table:style-name="ce2">
            <text:p>07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2719.89" table:style-name="ce1">
            <text:p>2719.89</text:p>
          </table:table-cell>
          <table:table-cell office:value-type="string" office:string-value="Low" table:formula="of:=IF([.E727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ood</text:p>
          </table:table-cell>
          <table:table-cell office:value-type="float" office:value="472.08" table:style-name="ce1">
            <text:p>472.08</text:p>
          </table:table-cell>
          <table:table-cell office:value-type="float" office:value="842.46" table:style-name="ce1">
            <text:p>842.46</text:p>
          </table:table-cell>
          <table:table-cell office:value-type="string" table:style-name="ce1">
            <text:p>New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5-13T00:00:00" table:style-name="ce2">
            <text:p>13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653.49" table:style-name="ce1">
            <text:p>6653.49</text:p>
          </table:table-cell>
          <table:table-cell office:value-type="string" office:string-value="High" table:formula="of:=IF([.E728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lothing</text:p>
          </table:table-cell>
          <table:table-cell office:value-type="float" office:value="4337.6099999999997" table:style-name="ce1">
            <text:p>4337.61</text:p>
          </table:table-cell>
          <table:table-cell office:value-type="float" office:value="4386.82" table:style-name="ce1">
            <text:p>4386.82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08-23T00:00:00" table:style-name="ce2">
            <text:p>23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8167.9" table:style-name="ce1">
            <text:p>8167.9</text:p>
          </table:table-cell>
          <table:table-cell office:value-type="string" office:string-value="High" table:formula="of:=IF([.E729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ood</text:p>
          </table:table-cell>
          <table:table-cell office:value-type="float" office:value="2520.9699999999998" table:style-name="ce1">
            <text:p>2520.97</text:p>
          </table:table-cell>
          <table:table-cell office:value-type="float" office:value="2707.1099999999901" table:style-name="ce1">
            <text:p>2707.11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2-14T00:00:00" table:style-name="ce2">
            <text:p>14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7802.45" table:style-name="ce1">
            <text:p>7802.45</text:p>
          </table:table-cell>
          <table:table-cell office:value-type="string" office:string-value="High" table:formula="of:=IF([.E730]&gt;[.$E$1003];&quot;High&quot;;&quot;Low&quot;)" table:style-name="ce1">
            <text:p>High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lothing</text:p>
          </table:table-cell>
          <table:table-cell office:value-type="float" office:value="1517.86" table:style-name="ce1">
            <text:p>1517.86</text:p>
          </table:table-cell>
          <table:table-cell office:value-type="float" office:value="1948.46" table:style-name="ce1">
            <text:p>1948.46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11-10T00:00:00" table:style-name="ce2">
            <text:p>10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7632.43" table:style-name="ce1">
            <text:p>7632.43</text:p>
          </table:table-cell>
          <table:table-cell office:value-type="string" office:string-value="High" table:formula="of:=IF([.E731]&gt;[.$E$1003];&quot;High&quot;;&quot;Low&quot;)" table:style-name="ce1">
            <text:p>High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urniture</text:p>
          </table:table-cell>
          <table:table-cell office:value-type="float" office:value="1362.31" table:style-name="ce1">
            <text:p>1362.31</text:p>
          </table:table-cell>
          <table:table-cell office:value-type="float" office:value="1486.29" table:style-name="ce1">
            <text:p>1486.29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date" office:date-value="2023-09-06T00:00:00" table:style-name="ce2">
            <text:p>06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1958.45" table:style-name="ce1">
            <text:p>1958.45</text:p>
          </table:table-cell>
          <table:table-cell office:value-type="string" office:string-value="Low" table:formula="of:=IF([.E732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2188.4499999999998" table:style-name="ce1">
            <text:p>2188.45</text:p>
          </table:table-cell>
          <table:table-cell office:value-type="float" office:value="2255.0499999999902" table:style-name="ce1">
            <text:p>2255.05</text:p>
          </table:table-cell>
          <table:table-cell office:value-type="string" table:style-name="ce1">
            <text:p>New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date" office:date-value="2023-01-31T00:00:00" table:style-name="ce2">
            <text:p>31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975.01" table:style-name="ce1">
            <text:p>975.01</text:p>
          </table:table-cell>
          <table:table-cell office:value-type="string" office:string-value="Low" table:formula="of:=IF([.E733]&gt;[.$E$1003];&quot;High&quot;;&quot;Low&quot;)" table:style-name="ce1">
            <text:p>Low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ood</text:p>
          </table:table-cell>
          <table:table-cell office:value-type="float" office:value="4995.3" table:style-name="ce1">
            <text:p>4995.3</text:p>
          </table:table-cell>
          <table:table-cell office:value-type="float" office:value="5165.09" table:style-name="ce1">
            <text:p>5165.09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019.59" table:style-name="ce1">
            <text:p>7019.59</text:p>
          </table:table-cell>
          <table:table-cell office:value-type="string" office:string-value="High" table:formula="of:=IF([.E734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urniture</text:p>
          </table:table-cell>
          <table:table-cell office:value-type="float" office:value="1140.6199999999999" table:style-name="ce1">
            <text:p>1140.62</text:p>
          </table:table-cell>
          <table:table-cell office:value-type="float" office:value="1258.6299999999901" table:style-name="ce1">
            <text:p>1258.63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3746.64" table:style-name="ce1">
            <text:p>3746.64</text:p>
          </table:table-cell>
          <table:table-cell office:value-type="string" office:string-value="Low" table:formula="of:=IF([.E735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lothing</text:p>
          </table:table-cell>
          <table:table-cell office:value-type="float" office:value="560.91999999999996" table:style-name="ce1">
            <text:p>560.92</text:p>
          </table:table-cell>
          <table:table-cell office:value-type="float" office:value="1024.31" table:style-name="ce1">
            <text:p>1024.31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date" office:date-value="2023-12-29T00:00:00" table:style-name="ce2">
            <text:p>29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4380.2299999999996" table:style-name="ce1">
            <text:p>4380.23</text:p>
          </table:table-cell>
          <table:table-cell office:value-type="string" office:string-value="Low" table:formula="of:=IF([.E736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ood</text:p>
          </table:table-cell>
          <table:table-cell office:value-type="float" office:value="2945.92" table:style-name="ce1">
            <text:p>2945.92</text:p>
          </table:table-cell>
          <table:table-cell office:value-type="float" office:value="3381.22" table:style-name="ce1">
            <text:p>3381.22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06-07T00:00:00" table:style-name="ce2">
            <text:p>07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408.38" table:style-name="ce1">
            <text:p>408.38</text:p>
          </table:table-cell>
          <table:table-cell office:value-type="string" office:string-value="Low" table:formula="of:=IF([.E737]&gt;[.$E$1003];&quot;High&quot;;&quot;Low&quot;)" table:style-name="ce1">
            <text:p>Lo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ectronics</text:p>
          </table:table-cell>
          <table:table-cell office:value-type="float" office:value="2468.29" table:style-name="ce1">
            <text:p>2468.29</text:p>
          </table:table-cell>
          <table:table-cell office:value-type="float" office:value="2723.13" table:style-name="ce1">
            <text:p>2723.13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02-08T00:00:00" table:style-name="ce2">
            <text:p>08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669.81" table:style-name="ce1">
            <text:p>2669.81</text:p>
          </table:table-cell>
          <table:table-cell office:value-type="string" office:string-value="Low" table:formula="of:=IF([.E738]&gt;[.$E$1003];&quot;High&quot;;&quot;Low&quot;)" table:style-name="ce1">
            <text:p>Low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2644.77" table:style-name="ce1">
            <text:p>2644.77</text:p>
          </table:table-cell>
          <table:table-cell office:value-type="float" office:value="2684.83" table:style-name="ce1">
            <text:p>2684.83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date" office:date-value="2023-03-23T00:00:00" table:style-name="ce2">
            <text:p>23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433.4" table:style-name="ce1">
            <text:p>433.4</text:p>
          </table:table-cell>
          <table:table-cell office:value-type="string" office:string-value="Low" table:formula="of:=IF([.E739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lothing</text:p>
          </table:table-cell>
          <table:table-cell office:value-type="float" office:value="3351.33" table:style-name="ce1">
            <text:p>3351.33</text:p>
          </table:table-cell>
          <table:table-cell office:value-type="float" office:value="3711.47" table:style-name="ce1">
            <text:p>3711.47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8803.94" table:style-name="ce1">
            <text:p>8803.94</text:p>
          </table:table-cell>
          <table:table-cell office:value-type="string" office:string-value="High" table:formula="of:=IF([.E740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1372.36" table:style-name="ce1">
            <text:p>1372.36</text:p>
          </table:table-cell>
          <table:table-cell office:value-type="float" office:value="1687.83" table:style-name="ce1">
            <text:p>1687.83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09-15T00:00:00" table:style-name="ce2">
            <text:p>15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2509.63" table:style-name="ce1">
            <text:p>2509.63</text:p>
          </table:table-cell>
          <table:table-cell office:value-type="string" office:string-value="Low" table:formula="of:=IF([.E741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lectronics</text:p>
          </table:table-cell>
          <table:table-cell office:value-type="float" office:value="4557.79" table:style-name="ce1">
            <text:p>4557.79</text:p>
          </table:table-cell>
          <table:table-cell office:value-type="float" office:value="5043.3599999999997" table:style-name="ce1">
            <text:p>5043.36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5617.64" table:style-name="ce1">
            <text:p>5617.64</text:p>
          </table:table-cell>
          <table:table-cell office:value-type="string" office:string-value="High" table:formula="of:=IF([.E742]&gt;[.$E$1003];&quot;High&quot;;&quot;Low&quot;)" table:style-name="ce1">
            <text:p>Hig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od</text:p>
          </table:table-cell>
          <table:table-cell office:value-type="float" office:value="2206.58" table:style-name="ce1">
            <text:p>2206.58</text:p>
          </table:table-cell>
          <table:table-cell office:value-type="float" office:value="2490.4699999999998" table:style-name="ce1">
            <text:p>2490.47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3-18T00:00:00" table:style-name="ce2">
            <text:p>18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85.9" table:style-name="ce1">
            <text:p>485.9</text:p>
          </table:table-cell>
          <table:table-cell office:value-type="string" office:string-value="Low" table:formula="of:=IF([.E743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od</text:p>
          </table:table-cell>
          <table:table-cell office:value-type="float" office:value="688.98" table:style-name="ce1">
            <text:p>688.98</text:p>
          </table:table-cell>
          <table:table-cell office:value-type="float" office:value="863.81" table:style-name="ce1">
            <text:p>863.81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01-12T00:00:00" table:style-name="ce2">
            <text:p>12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6701.79" table:style-name="ce1">
            <text:p>6701.79</text:p>
          </table:table-cell>
          <table:table-cell office:value-type="string" office:string-value="High" table:formula="of:=IF([.E744]&gt;[.$E$1003];&quot;High&quot;;&quot;Low&quot;)" table:style-name="ce1">
            <text:p>Hig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ood</text:p>
          </table:table-cell>
          <table:table-cell office:value-type="float" office:value="3724.38" table:style-name="ce1">
            <text:p>3724.38</text:p>
          </table:table-cell>
          <table:table-cell office:value-type="float" office:value="3988.7" table:style-name="ce1">
            <text:p>3988.7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date" office:date-value="2023-10-22T00:00:00" table:style-name="ce2">
            <text:p>22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3297.97" table:style-name="ce1">
            <text:p>3297.97</text:p>
          </table:table-cell>
          <table:table-cell office:value-type="string" office:string-value="Low" table:formula="of:=IF([.E745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lothing</text:p>
          </table:table-cell>
          <table:table-cell office:value-type="float" office:value="3233.37" table:style-name="ce1">
            <text:p>3233.37</text:p>
          </table:table-cell>
          <table:table-cell office:value-type="float" office:value="3723.21" table:style-name="ce1">
            <text:p>3723.21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8-12T00:00:00" table:style-name="ce2">
            <text:p>12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8989.4" table:style-name="ce1">
            <text:p>8989.4</text:p>
          </table:table-cell>
          <table:table-cell office:value-type="string" office:string-value="High" table:formula="of:=IF([.E746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urniture</text:p>
          </table:table-cell>
          <table:table-cell office:value-type="float" office:value="1612.93" table:style-name="ce1">
            <text:p>1612.93</text:p>
          </table:table-cell>
          <table:table-cell office:value-type="float" office:value="1964.15" table:style-name="ce1">
            <text:p>1964.15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01-13T00:00:00" table:style-name="ce2">
            <text:p>13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8892.3700000000008" table:style-name="ce1">
            <text:p>8892.37</text:p>
          </table:table-cell>
          <table:table-cell office:value-type="string" office:string-value="High" table:formula="of:=IF([.E747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urniture</text:p>
          </table:table-cell>
          <table:table-cell office:value-type="float" office:value="3126.52" table:style-name="ce1">
            <text:p>3126.52</text:p>
          </table:table-cell>
          <table:table-cell office:value-type="float" office:value="3465.79" table:style-name="ce1">
            <text:p>3465.79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02-15T00:00:00" table:style-name="ce2">
            <text:p>15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320.38" table:style-name="ce1">
            <text:p>3320.38</text:p>
          </table:table-cell>
          <table:table-cell office:value-type="string" office:string-value="Low" table:formula="of:=IF([.E748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urniture</text:p>
          </table:table-cell>
          <table:table-cell office:value-type="float" office:value="1138.32" table:style-name="ce1">
            <text:p>1138.32</text:p>
          </table:table-cell>
          <table:table-cell office:value-type="float" office:value="1266.25" table:style-name="ce1">
            <text:p>1266.25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6-04T00:00:00" table:style-name="ce2">
            <text:p>04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9019.51" table:style-name="ce1">
            <text:p>9019.51</text:p>
          </table:table-cell>
          <table:table-cell office:value-type="string" office:string-value="High" table:formula="of:=IF([.E749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urniture</text:p>
          </table:table-cell>
          <table:table-cell office:value-type="float" office:value="2251.9499999999998" table:style-name="ce1">
            <text:p>2251.95</text:p>
          </table:table-cell>
          <table:table-cell office:value-type="float" office:value="2626.3199999999902" table:style-name="ce1">
            <text:p>2626.32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4-23T00:00:00" table:style-name="ce2">
            <text:p>23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9961.9599999999991" table:style-name="ce1">
            <text:p>9961.96</text:p>
          </table:table-cell>
          <table:table-cell office:value-type="string" office:string-value="High" table:formula="of:=IF([.E750]&gt;[.$E$1003];&quot;High&quot;;&quot;Low&quot;)" table:style-name="ce1">
            <text:p>Hig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urniture</text:p>
          </table:table-cell>
          <table:table-cell office:value-type="float" office:value="4502.09" table:style-name="ce1">
            <text:p>4502.09</text:p>
          </table:table-cell>
          <table:table-cell office:value-type="float" office:value="4879.72" table:style-name="ce1">
            <text:p>4879.72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date" office:date-value="2023-08-21T00:00:00" table:style-name="ce2">
            <text:p>21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8271.6200000000008" table:style-name="ce1">
            <text:p>8271.62</text:p>
          </table:table-cell>
          <table:table-cell office:value-type="string" office:string-value="High" table:formula="of:=IF([.E751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lothing</text:p>
          </table:table-cell>
          <table:table-cell office:value-type="float" office:value="710.99" table:style-name="ce1">
            <text:p>710.99</text:p>
          </table:table-cell>
          <table:table-cell office:value-type="float" office:value="876.46" table:style-name="ce1">
            <text:p>876.46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date" office:date-value="2023-01-17T00:00:00" table:style-name="ce2">
            <text:p>17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8464.23" table:style-name="ce1">
            <text:p>8464.23</text:p>
          </table:table-cell>
          <table:table-cell office:value-type="string" office:string-value="High" table:formula="of:=IF([.E752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1964.15" table:style-name="ce1">
            <text:p>1964.15</text:p>
          </table:table-cell>
          <table:table-cell office:value-type="float" office:value="2211.17" table:style-name="ce1">
            <text:p>2211.17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565.19" table:style-name="ce1">
            <text:p>2565.19</text:p>
          </table:table-cell>
          <table:table-cell office:value-type="string" office:string-value="Low" table:formula="of:=IF([.E753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4114.66" table:style-name="ce1">
            <text:p>4114.66</text:p>
          </table:table-cell>
          <table:table-cell office:value-type="float" office:value="4269.0199999999904" table:style-name="ce1">
            <text:p>4269.02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08-11T00:00:00" table:style-name="ce2">
            <text:p>11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5809.35" table:style-name="ce1">
            <text:p>5809.35</text:p>
          </table:table-cell>
          <table:table-cell office:value-type="string" office:string-value="High" table:formula="of:=IF([.E754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4848.9799999999996" table:style-name="ce1">
            <text:p>4848.98</text:p>
          </table:table-cell>
          <table:table-cell office:value-type="float" office:value="4985.75" table:style-name="ce1">
            <text:p>4985.75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12-20T00:00:00" table:style-name="ce2">
            <text:p>20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765.83" table:style-name="ce1">
            <text:p>765.83</text:p>
          </table:table-cell>
          <table:table-cell office:value-type="string" office:string-value="Low" table:formula="of:=IF([.E755]&gt;[.$E$1003];&quot;High&quot;;&quot;Low&quot;)" table:style-name="ce1">
            <text:p>Low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lothing</text:p>
          </table:table-cell>
          <table:table-cell office:value-type="float" office:value="2296.9299999999998" table:style-name="ce1">
            <text:p>2296.93</text:p>
          </table:table-cell>
          <table:table-cell office:value-type="float" office:value="2319.62" table:style-name="ce1">
            <text:p>2319.62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7-07T00:00:00" table:style-name="ce2">
            <text:p>07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1039.69" table:style-name="ce1">
            <text:p>1039.69</text:p>
          </table:table-cell>
          <table:table-cell office:value-type="string" office:string-value="Low" table:formula="of:=IF([.E756]&gt;[.$E$1003];&quot;High&quot;;&quot;Low&quot;)" table:style-name="ce1">
            <text:p>Low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urniture</text:p>
          </table:table-cell>
          <table:table-cell office:value-type="float" office:value="2559.65" table:style-name="ce1">
            <text:p>2559.65</text:p>
          </table:table-cell>
          <table:table-cell office:value-type="float" office:value="2709.4" table:style-name="ce1">
            <text:p>2709.4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12-10T00:00:00" table:style-name="ce2">
            <text:p>10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9989.0400000000009" table:style-name="ce1">
            <text:p>9989.04</text:p>
          </table:table-cell>
          <table:table-cell office:value-type="string" office:string-value="High" table:formula="of:=IF([.E757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ood</text:p>
          </table:table-cell>
          <table:table-cell office:value-type="float" office:value="2882.25" table:style-name="ce1">
            <text:p>2882.25</text:p>
          </table:table-cell>
          <table:table-cell office:value-type="float" office:value="3163.7" table:style-name="ce1">
            <text:p>3163.7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12-31T00:00:00" table:style-name="ce2">
            <text:p>31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3333.73" table:style-name="ce1">
            <text:p>3333.73</text:p>
          </table:table-cell>
          <table:table-cell office:value-type="string" office:string-value="Low" table:formula="of:=IF([.E758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lothing</text:p>
          </table:table-cell>
          <table:table-cell office:value-type="float" office:value="4665.12" table:style-name="ce1">
            <text:p>4665.12</text:p>
          </table:table-cell>
          <table:table-cell office:value-type="float" office:value="4675.8999999999996" table:style-name="ce1">
            <text:p>4675.9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06-12T00:00:00" table:style-name="ce2">
            <text:p>12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7507.02" table:style-name="ce1">
            <text:p>7507.02</text:p>
          </table:table-cell>
          <table:table-cell office:value-type="string" office:string-value="High" table:formula="of:=IF([.E759]&gt;[.$E$1003];&quot;High&quot;;&quot;Low&quot;)" table:style-name="ce1">
            <text:p>High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ood</text:p>
          </table:table-cell>
          <table:table-cell office:value-type="float" office:value="4298.12" table:style-name="ce1">
            <text:p>4298.12</text:p>
          </table:table-cell>
          <table:table-cell office:value-type="float" office:value="4446.8999999999996" table:style-name="ce1">
            <text:p>4446.9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date" office:date-value="2023-11-22T00:00:00" table:style-name="ce2">
            <text:p>22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8085.98" table:style-name="ce1">
            <text:p>8085.98</text:p>
          </table:table-cell>
          <table:table-cell office:value-type="string" office:string-value="High" table:formula="of:=IF([.E760]&gt;[.$E$1003];&quot;High&quot;;&quot;Low&quot;)" table:style-name="ce1">
            <text:p>Hig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othing</text:p>
          </table:table-cell>
          <table:table-cell office:value-type="float" office:value="894.48" table:style-name="ce1">
            <text:p>894.48</text:p>
          </table:table-cell>
          <table:table-cell office:value-type="float" office:value="1336.37" table:style-name="ce1">
            <text:p>1336.37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date" office:date-value="2023-03-15T00:00:00" table:style-name="ce2">
            <text:p>15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8594.43" table:style-name="ce1">
            <text:p>8594.43</text:p>
          </table:table-cell>
          <table:table-cell office:value-type="string" office:string-value="High" table:formula="of:=IF([.E761]&gt;[.$E$1003];&quot;High&quot;;&quot;Low&quot;)" table:style-name="ce1">
            <text:p>High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lothing</text:p>
          </table:table-cell>
          <table:table-cell office:value-type="float" office:value="2211.9499999999998" table:style-name="ce1">
            <text:p>2211.95</text:p>
          </table:table-cell>
          <table:table-cell office:value-type="float" office:value="2512.8399999999901" table:style-name="ce1">
            <text:p>2512.84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date" office:date-value="2023-08-21T00:00:00" table:style-name="ce2">
            <text:p>21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9976.52" table:style-name="ce1">
            <text:p>9976.52</text:p>
          </table:table-cell>
          <table:table-cell office:value-type="string" office:string-value="High" table:formula="of:=IF([.E762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2346.8000000000002" table:style-name="ce1">
            <text:p>2346.8</text:p>
          </table:table-cell>
          <table:table-cell office:value-type="float" office:value="2654.65" table:style-name="ce1">
            <text:p>2654.65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08-12T00:00:00" table:style-name="ce2">
            <text:p>12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2490.8200000000002" table:style-name="ce1">
            <text:p>2490.82</text:p>
          </table:table-cell>
          <table:table-cell office:value-type="string" office:string-value="Low" table:formula="of:=IF([.E763]&gt;[.$E$1003];&quot;High&quot;;&quot;Low&quot;)" table:style-name="ce1">
            <text:p>Low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lothing</text:p>
          </table:table-cell>
          <table:table-cell office:value-type="float" office:value="3956.03" table:style-name="ce1">
            <text:p>3956.03</text:p>
          </table:table-cell>
          <table:table-cell office:value-type="float" office:value="4163.68" table:style-name="ce1">
            <text:p>4163.68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11-15T00:00:00" table:style-name="ce2">
            <text:p>15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499.47" table:style-name="ce1">
            <text:p>499.47</text:p>
          </table:table-cell>
          <table:table-cell office:value-type="string" office:string-value="Low" table:formula="of:=IF([.E764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ectronics</text:p>
          </table:table-cell>
          <table:table-cell office:value-type="float" office:value="3034.32" table:style-name="ce1">
            <text:p>3034.32</text:p>
          </table:table-cell>
          <table:table-cell office:value-type="float" office:value="3375.79" table:style-name="ce1">
            <text:p>3375.79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date" office:date-value="2023-03-01T00:00:00" table:style-name="ce2">
            <text:p>01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4170.8" table:style-name="ce1">
            <text:p>4170.8</text:p>
          </table:table-cell>
          <table:table-cell office:value-type="string" office:string-value="Low" table:formula="of:=IF([.E765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lectronics</text:p>
          </table:table-cell>
          <table:table-cell office:value-type="float" office:value="3288.39" table:style-name="ce1">
            <text:p>3288.39</text:p>
          </table:table-cell>
          <table:table-cell office:value-type="float" office:value="3391.46" table:style-name="ce1">
            <text:p>3391.46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date" office:date-value="2023-12-01T00:00:00" table:style-name="ce2">
            <text:p>01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1387.8" table:style-name="ce1">
            <text:p>1387.8</text:p>
          </table:table-cell>
          <table:table-cell office:value-type="string" office:string-value="Low" table:formula="of:=IF([.E766]&gt;[.$E$1003];&quot;High&quot;;&quot;Low&quot;)" table:style-name="ce1">
            <text:p>L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urniture</text:p>
          </table:table-cell>
          <table:table-cell office:value-type="float" office:value="4991.09" table:style-name="ce1">
            <text:p>4991.09</text:p>
          </table:table-cell>
          <table:table-cell office:value-type="float" office:value="5402.28" table:style-name="ce1">
            <text:p>5402.28</text:p>
          </table:table-cell>
          <table:table-cell office:value-type="string" table:style-name="ce1">
            <text:p>Retur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date" office:date-value="2023-08-10T00:00:00" table:style-name="ce2">
            <text:p>10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322.02" table:style-name="ce1">
            <text:p>322.02</text:p>
          </table:table-cell>
          <table:table-cell office:value-type="string" office:string-value="Low" table:formula="of:=IF([.E767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od</text:p>
          </table:table-cell>
          <table:table-cell office:value-type="float" office:value="421.05" table:style-name="ce1">
            <text:p>421.05</text:p>
          </table:table-cell>
          <table:table-cell office:value-type="float" office:value="488.23" table:style-name="ce1">
            <text:p>488.23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2-06T00:00:00" table:style-name="ce2">
            <text:p>06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3668.23" table:style-name="ce1">
            <text:p>3668.23</text:p>
          </table:table-cell>
          <table:table-cell office:value-type="string" office:string-value="Low" table:formula="of:=IF([.E768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ood</text:p>
          </table:table-cell>
          <table:table-cell office:value-type="float" office:value="1153.9000000000001" table:style-name="ce1">
            <text:p>1153.9</text:p>
          </table:table-cell>
          <table:table-cell office:value-type="float" office:value="1485.34" table:style-name="ce1">
            <text:p>1485.34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10-05T00:00:00" table:style-name="ce2">
            <text:p>05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7859.01" table:style-name="ce1">
            <text:p>7859.01</text:p>
          </table:table-cell>
          <table:table-cell office:value-type="string" office:string-value="High" table:formula="of:=IF([.E769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ood</text:p>
          </table:table-cell>
          <table:table-cell office:value-type="float" office:value="2069.08" table:style-name="ce1">
            <text:p>2069.08</text:p>
          </table:table-cell>
          <table:table-cell office:value-type="float" office:value="2246.2399999999998" table:style-name="ce1">
            <text:p>2246.24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7-15T00:00:00" table:style-name="ce2">
            <text:p>15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5705.19" table:style-name="ce1">
            <text:p>5705.19</text:p>
          </table:table-cell>
          <table:table-cell office:value-type="string" office:string-value="High" table:formula="of:=IF([.E770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1771.52" table:style-name="ce1">
            <text:p>1771.52</text:p>
          </table:table-cell>
          <table:table-cell office:value-type="float" office:value="2147.8000000000002" table:style-name="ce1">
            <text:p>2147.8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date" office:date-value="2023-12-18T00:00:00" table:style-name="ce2">
            <text:p>18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3196.5" table:style-name="ce1">
            <text:p>3196.5</text:p>
          </table:table-cell>
          <table:table-cell office:value-type="string" office:string-value="Low" table:formula="of:=IF([.E771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ood</text:p>
          </table:table-cell>
          <table:table-cell office:value-type="float" office:value="157.15" table:style-name="ce1">
            <text:p>157.15</text:p>
          </table:table-cell>
          <table:table-cell office:value-type="float" office:value="436.53" table:style-name="ce1">
            <text:p>436.53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8-30T00:00:00" table:style-name="ce2">
            <text:p>30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577.99" table:style-name="ce1">
            <text:p>6577.99</text:p>
          </table:table-cell>
          <table:table-cell office:value-type="string" office:string-value="High" table:formula="of:=IF([.E772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ood</text:p>
          </table:table-cell>
          <table:table-cell office:value-type="float" office:value="504.3" table:style-name="ce1">
            <text:p>504.3</text:p>
          </table:table-cell>
          <table:table-cell office:value-type="float" office:value="735.95" table:style-name="ce1">
            <text:p>735.95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date" office:date-value="2023-11-20T00:00:00" table:style-name="ce2">
            <text:p>20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2396.98" table:style-name="ce1">
            <text:p>2396.98</text:p>
          </table:table-cell>
          <table:table-cell office:value-type="string" office:string-value="Low" table:formula="of:=IF([.E773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urniture</text:p>
          </table:table-cell>
          <table:table-cell office:value-type="float" office:value="3420.72" table:style-name="ce1">
            <text:p>3420.72</text:p>
          </table:table-cell>
          <table:table-cell office:value-type="float" office:value="3513.74" table:style-name="ce1">
            <text:p>3513.74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date" office:date-value="2023-08-07T00:00:00" table:style-name="ce2">
            <text:p>07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42.38" table:style-name="ce1">
            <text:p>242.38</text:p>
          </table:table-cell>
          <table:table-cell office:value-type="string" office:string-value="Low" table:formula="of:=IF([.E774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ood</text:p>
          </table:table-cell>
          <table:table-cell office:value-type="float" office:value="4402.66" table:style-name="ce1">
            <text:p>4402.66</text:p>
          </table:table-cell>
          <table:table-cell office:value-type="float" office:value="4724.7" table:style-name="ce1">
            <text:p>4724.7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7667.1" table:style-name="ce1">
            <text:p>7667.1</text:p>
          </table:table-cell>
          <table:table-cell office:value-type="string" office:string-value="High" table:formula="of:=IF([.E775]&gt;[.$E$1003];&quot;High&quot;;&quot;Low&quot;)" table:style-name="ce1">
            <text:p>High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lectronics</text:p>
          </table:table-cell>
          <table:table-cell office:value-type="float" office:value="2595.42" table:style-name="ce1">
            <text:p>2595.42</text:p>
          </table:table-cell>
          <table:table-cell office:value-type="float" office:value="3083.06" table:style-name="ce1">
            <text:p>3083.06</text:p>
          </table:table-cell>
          <table:table-cell office:value-type="string" table:style-name="ce1">
            <text:p>New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date" office:date-value="2023-01-17T00:00:00" table:style-name="ce2">
            <text:p>17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6275.06" table:style-name="ce1">
            <text:p>6275.06</text:p>
          </table:table-cell>
          <table:table-cell office:value-type="string" office:string-value="High" table:formula="of:=IF([.E776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lectronics</text:p>
          </table:table-cell>
          <table:table-cell office:value-type="float" office:value="2719" table:style-name="ce1">
            <text:p>2719</text:p>
          </table:table-cell>
          <table:table-cell office:value-type="float" office:value="3133.55" table:style-name="ce1">
            <text:p>3133.55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01-12T00:00:00" table:style-name="ce2">
            <text:p>12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7646.8" table:style-name="ce1">
            <text:p>7646.8</text:p>
          </table:table-cell>
          <table:table-cell office:value-type="string" office:string-value="High" table:formula="of:=IF([.E777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lectronics</text:p>
          </table:table-cell>
          <table:table-cell office:value-type="float" office:value="1312.71" table:style-name="ce1">
            <text:p>1312.71</text:p>
          </table:table-cell>
          <table:table-cell office:value-type="float" office:value="1352.11" table:style-name="ce1">
            <text:p>1352.11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date" office:date-value="2023-07-12T00:00:00" table:style-name="ce2">
            <text:p>12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485.49" table:style-name="ce1">
            <text:p>485.49</text:p>
          </table:table-cell>
          <table:table-cell office:value-type="string" office:string-value="Low" table:formula="of:=IF([.E778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urniture</text:p>
          </table:table-cell>
          <table:table-cell office:value-type="float" office:value="3850.99" table:style-name="ce1">
            <text:p>3850.99</text:p>
          </table:table-cell>
          <table:table-cell office:value-type="float" office:value="4045.3399999999901" table:style-name="ce1">
            <text:p>4045.34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date" office:date-value="2023-01-22T00:00:00" table:style-name="ce2">
            <text:p>22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8387.48" table:style-name="ce1">
            <text:p>8387.48</text:p>
          </table:table-cell>
          <table:table-cell office:value-type="string" office:string-value="High" table:formula="of:=IF([.E779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urniture</text:p>
          </table:table-cell>
          <table:table-cell office:value-type="float" office:value="3771.38" table:style-name="ce1">
            <text:p>3771.38</text:p>
          </table:table-cell>
          <table:table-cell office:value-type="float" office:value="4234.92" table:style-name="ce1">
            <text:p>4234.92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date" office:date-value="2023-04-30T00:00:00" table:style-name="ce2">
            <text:p>30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6233.31" table:style-name="ce1">
            <text:p>6233.31</text:p>
          </table:table-cell>
          <table:table-cell office:value-type="string" office:string-value="High" table:formula="of:=IF([.E780]&gt;[.$E$1003];&quot;High&quot;;&quot;Low&quot;)" table:style-name="ce1">
            <text:p>Hig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lothing</text:p>
          </table:table-cell>
          <table:table-cell office:value-type="float" office:value="2962.41" table:style-name="ce1">
            <text:p>2962.41</text:p>
          </table:table-cell>
          <table:table-cell office:value-type="float" office:value="3218.8999999999901" table:style-name="ce1">
            <text:p>3218.9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date" office:date-value="2023-07-29T00:00:00" table:style-name="ce2">
            <text:p>29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5677.61" table:style-name="ce1">
            <text:p>5677.61</text:p>
          </table:table-cell>
          <table:table-cell office:value-type="string" office:string-value="High" table:formula="of:=IF([.E781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ood</text:p>
          </table:table-cell>
          <table:table-cell office:value-type="float" office:value="1102.69" table:style-name="ce1">
            <text:p>1102.69</text:p>
          </table:table-cell>
          <table:table-cell office:value-type="float" office:value="1437.12" table:style-name="ce1">
            <text:p>1437.12</text:p>
          </table:table-cell>
          <table:table-cell office:value-type="string" table:style-name="ce1">
            <text:p>New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11-02T00:00:00" table:style-name="ce2">
            <text:p>02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6283.68" table:style-name="ce1">
            <text:p>6283.68</text:p>
          </table:table-cell>
          <table:table-cell office:value-type="string" office:string-value="High" table:formula="of:=IF([.E782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urniture</text:p>
          </table:table-cell>
          <table:table-cell office:value-type="float" office:value="530.24" table:style-name="ce1">
            <text:p>530.24</text:p>
          </table:table-cell>
          <table:table-cell office:value-type="float" office:value="987.41" table:style-name="ce1">
            <text:p>987.41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9-27T00:00:00" table:style-name="ce2">
            <text:p>27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8657.89" table:style-name="ce1">
            <text:p>8657.89</text:p>
          </table:table-cell>
          <table:table-cell office:value-type="string" office:string-value="High" table:formula="of:=IF([.E783]&gt;[.$E$1003];&quot;High&quot;;&quot;Low&quot;)" table:style-name="ce1">
            <text:p>High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onics</text:p>
          </table:table-cell>
          <table:table-cell office:value-type="float" office:value="367.98" table:style-name="ce1">
            <text:p>367.98</text:p>
          </table:table-cell>
          <table:table-cell office:value-type="float" office:value="806.14" table:style-name="ce1">
            <text:p>806.14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5910.67" table:style-name="ce1">
            <text:p>5910.67</text:p>
          </table:table-cell>
          <table:table-cell office:value-type="string" office:string-value="High" table:formula="of:=IF([.E784]&gt;[.$E$1003];&quot;High&quot;;&quot;Low&quot;)" table:style-name="ce1">
            <text:p>High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lectronics</text:p>
          </table:table-cell>
          <table:table-cell office:value-type="float" office:value="2983.85" table:style-name="ce1">
            <text:p>2983.85</text:p>
          </table:table-cell>
          <table:table-cell office:value-type="float" office:value="3239.74" table:style-name="ce1">
            <text:p>3239.74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date" office:date-value="2023-06-24T00:00:00" table:style-name="ce2">
            <text:p>24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5851.41" table:style-name="ce1">
            <text:p>5851.41</text:p>
          </table:table-cell>
          <table:table-cell office:value-type="string" office:string-value="High" table:formula="of:=IF([.E785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urniture</text:p>
          </table:table-cell>
          <table:table-cell office:value-type="float" office:value="4133.92" table:style-name="ce1">
            <text:p>4133.92</text:p>
          </table:table-cell>
          <table:table-cell office:value-type="float" office:value="4358.37" table:style-name="ce1">
            <text:p>4358.37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date" office:date-value="2023-10-12T00:00:00" table:style-name="ce2">
            <text:p>12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9907.7199999999993" table:style-name="ce1">
            <text:p>9907.72</text:p>
          </table:table-cell>
          <table:table-cell office:value-type="string" office:string-value="High" table:formula="of:=IF([.E786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urniture</text:p>
          </table:table-cell>
          <table:table-cell office:value-type="float" office:value="4298.74" table:style-name="ce1">
            <text:p>4298.74</text:p>
          </table:table-cell>
          <table:table-cell office:value-type="float" office:value="4475.1899999999996" table:style-name="ce1">
            <text:p>4475.19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date" office:date-value="2023-07-23T00:00:00" table:style-name="ce2">
            <text:p>23/07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7591.63" table:style-name="ce1">
            <text:p>7591.63</text:p>
          </table:table-cell>
          <table:table-cell office:value-type="string" office:string-value="High" table:formula="of:=IF([.E787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urniture</text:p>
          </table:table-cell>
          <table:table-cell office:value-type="float" office:value="2344.9299999999998" table:style-name="ce1">
            <text:p>2344.93</text:p>
          </table:table-cell>
          <table:table-cell office:value-type="float" office:value="2707.25" table:style-name="ce1">
            <text:p>2707.25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06-13T00:00:00" table:style-name="ce2">
            <text:p>13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4478.71" table:style-name="ce1">
            <text:p>4478.71</text:p>
          </table:table-cell>
          <table:table-cell office:value-type="string" office:string-value="Low" table:formula="of:=IF([.E788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othing</text:p>
          </table:table-cell>
          <table:table-cell office:value-type="float" office:value="3932.14" table:style-name="ce1">
            <text:p>3932.14</text:p>
          </table:table-cell>
          <table:table-cell office:value-type="float" office:value="4082.7599999999902" table:style-name="ce1">
            <text:p>4082.76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09-08T00:00:00" table:style-name="ce2">
            <text:p>08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7103.23" table:style-name="ce1">
            <text:p>7103.23</text:p>
          </table:table-cell>
          <table:table-cell office:value-type="string" office:string-value="High" table:formula="of:=IF([.E789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4737.0600000000004" table:style-name="ce1">
            <text:p>4737.06</text:p>
          </table:table-cell>
          <table:table-cell office:value-type="float" office:value="4869.5" table:style-name="ce1">
            <text:p>4869.5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8-15T00:00:00" table:style-name="ce2">
            <text:p>15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3953.38" table:style-name="ce1">
            <text:p>3953.38</text:p>
          </table:table-cell>
          <table:table-cell office:value-type="string" office:string-value="Low" table:formula="of:=IF([.E790]&gt;[.$E$1003];&quot;High&quot;;&quot;Low&quot;)" table:style-name="ce1">
            <text:p>Low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lothing</text:p>
          </table:table-cell>
          <table:table-cell office:value-type="float" office:value="1412.09" table:style-name="ce1">
            <text:p>1412.09</text:p>
          </table:table-cell>
          <table:table-cell office:value-type="float" office:value="1596.6499999999901" table:style-name="ce1">
            <text:p>1596.65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date" office:date-value="2023-01-07T00:00:00" table:style-name="ce2">
            <text:p>07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365.87" table:style-name="ce1">
            <text:p>2365.87</text:p>
          </table:table-cell>
          <table:table-cell office:value-type="string" office:string-value="Low" table:formula="of:=IF([.E791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othing</text:p>
          </table:table-cell>
          <table:table-cell office:value-type="float" office:value="2019.9" table:style-name="ce1">
            <text:p>2019.9</text:p>
          </table:table-cell>
          <table:table-cell office:value-type="float" office:value="2116.7399999999998" table:style-name="ce1">
            <text:p>2116.74</text:p>
          </table:table-cell>
          <table:table-cell office:value-type="string" table:style-name="ce1">
            <text:p>New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date" office:date-value="2023-01-29T00:00:00" table:style-name="ce2">
            <text:p>29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6008.83" table:style-name="ce1">
            <text:p>6008.83</text:p>
          </table:table-cell>
          <table:table-cell office:value-type="string" office:string-value="High" table:formula="of:=IF([.E792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ood</text:p>
          </table:table-cell>
          <table:table-cell office:value-type="float" office:value="4660.82" table:style-name="ce1">
            <text:p>4660.82</text:p>
          </table:table-cell>
          <table:table-cell office:value-type="float" office:value="5011.4299999999903" table:style-name="ce1">
            <text:p>5011.43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2-02T00:00:00" table:style-name="ce2">
            <text:p>02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9289" table:style-name="ce1">
            <text:p>9289</text:p>
          </table:table-cell>
          <table:table-cell office:value-type="string" office:string-value="High" table:formula="of:=IF([.E793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lectronics</text:p>
          </table:table-cell>
          <table:table-cell office:value-type="float" office:value="1724.24" table:style-name="ce1">
            <text:p>1724.24</text:p>
          </table:table-cell>
          <table:table-cell office:value-type="float" office:value="2036.2" table:style-name="ce1">
            <text:p>2036.2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date" office:date-value="2023-05-14T00:00:00" table:style-name="ce2">
            <text:p>14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9298.48" table:style-name="ce1">
            <text:p>9298.48</text:p>
          </table:table-cell>
          <table:table-cell office:value-type="string" office:string-value="High" table:formula="of:=IF([.E794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ectronics</text:p>
          </table:table-cell>
          <table:table-cell office:value-type="float" office:value="4573.6899999999996" table:style-name="ce1">
            <text:p>4573.69</text:p>
          </table:table-cell>
          <table:table-cell office:value-type="float" office:value="4820.2999999999902" table:style-name="ce1">
            <text:p>4820.3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date" office:date-value="2023-03-20T00:00:00" table:style-name="ce2">
            <text:p>20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3484.86" table:style-name="ce1">
            <text:p>3484.86</text:p>
          </table:table-cell>
          <table:table-cell office:value-type="string" office:string-value="Low" table:formula="of:=IF([.E795]&gt;[.$E$1003];&quot;High&quot;;&quot;Low&quot;)" table:style-name="ce1">
            <text:p>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rniture</text:p>
          </table:table-cell>
          <table:table-cell office:value-type="float" office:value="4906.17" table:style-name="ce1">
            <text:p>4906.17</text:p>
          </table:table-cell>
          <table:table-cell office:value-type="float" office:value="5107.43" table:style-name="ce1">
            <text:p>5107.43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date" office:date-value="2023-02-27T00:00:00" table:style-name="ce2">
            <text:p>27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5324.01" table:style-name="ce1">
            <text:p>5324.01</text:p>
          </table:table-cell>
          <table:table-cell office:value-type="string" office:string-value="High" table:formula="of:=IF([.E796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urniture</text:p>
          </table:table-cell>
          <table:table-cell office:value-type="float" office:value="3325.96" table:style-name="ce1">
            <text:p>3325.96</text:p>
          </table:table-cell>
          <table:table-cell office:value-type="float" office:value="3781.4" table:style-name="ce1">
            <text:p>3781.4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date" office:date-value="2023-01-26T00:00:00" table:style-name="ce2">
            <text:p>26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2195.1999999999998" table:style-name="ce1">
            <text:p>2195.2</text:p>
          </table:table-cell>
          <table:table-cell office:value-type="string" office:string-value="Low" table:formula="of:=IF([.E797]&gt;[.$E$1003];&quot;High&quot;;&quot;Low&quot;)" table:style-name="ce1">
            <text:p>Lo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od</text:p>
          </table:table-cell>
          <table:table-cell office:value-type="float" office:value="4093.61" table:style-name="ce1">
            <text:p>4093.61</text:p>
          </table:table-cell>
          <table:table-cell office:value-type="float" office:value="4117.88" table:style-name="ce1">
            <text:p>4117.88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08-14T00:00:00" table:style-name="ce2">
            <text:p>14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9956.75" table:style-name="ce1">
            <text:p>9956.75</text:p>
          </table:table-cell>
          <table:table-cell office:value-type="string" office:string-value="High" table:formula="of:=IF([.E798]&gt;[.$E$1003];&quot;High&quot;;&quot;Low&quot;)" table:style-name="ce1">
            <text:p>Hig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lothing</text:p>
          </table:table-cell>
          <table:table-cell office:value-type="float" office:value="3760.25" table:style-name="ce1">
            <text:p>3760.25</text:p>
          </table:table-cell>
          <table:table-cell office:value-type="float" office:value="4147.1099999999997" table:style-name="ce1">
            <text:p>4147.11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10-12T00:00:00" table:style-name="ce2">
            <text:p>12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9813.07" table:style-name="ce1">
            <text:p>9813.07</text:p>
          </table:table-cell>
          <table:table-cell office:value-type="string" office:string-value="High" table:formula="of:=IF([.E799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rniture</text:p>
          </table:table-cell>
          <table:table-cell office:value-type="float" office:value="3512.69" table:style-name="ce1">
            <text:p>3512.69</text:p>
          </table:table-cell>
          <table:table-cell office:value-type="float" office:value="3964.63" table:style-name="ce1">
            <text:p>3964.63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1-04T00:00:00" table:style-name="ce2">
            <text:p>04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6530.14" table:style-name="ce1">
            <text:p>6530.14</text:p>
          </table:table-cell>
          <table:table-cell office:value-type="string" office:string-value="High" table:formula="of:=IF([.E800]&gt;[.$E$1003];&quot;High&quot;;&quot;Low&quot;)" table:style-name="ce1">
            <text:p>Hig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urniture</text:p>
          </table:table-cell>
          <table:table-cell office:value-type="float" office:value="1569.31" table:style-name="ce1">
            <text:p>1569.31</text:p>
          </table:table-cell>
          <table:table-cell office:value-type="float" office:value="1798.02" table:style-name="ce1">
            <text:p>1798.02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04-09T00:00:00" table:style-name="ce2">
            <text:p>09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8063.7" table:style-name="ce1">
            <text:p>8063.7</text:p>
          </table:table-cell>
          <table:table-cell office:value-type="string" office:string-value="High" table:formula="of:=IF([.E801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float" office:value="332.62" table:style-name="ce1">
            <text:p>332.62</text:p>
          </table:table-cell>
          <table:table-cell office:value-type="float" office:value="612.46" table:style-name="ce1">
            <text:p>612.46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2-08T00:00:00" table:style-name="ce2">
            <text:p>08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7179.49" table:style-name="ce1">
            <text:p>7179.49</text:p>
          </table:table-cell>
          <table:table-cell office:value-type="string" office:string-value="High" table:formula="of:=IF([.E802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lectronics</text:p>
          </table:table-cell>
          <table:table-cell office:value-type="float" office:value="1748.11" table:style-name="ce1">
            <text:p>1748.11</text:p>
          </table:table-cell>
          <table:table-cell office:value-type="float" office:value="2220.9" table:style-name="ce1">
            <text:p>2220.9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date" office:date-value="2023-09-28T00:00:00" table:style-name="ce2">
            <text:p>28/09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5972.27" table:style-name="ce1">
            <text:p>5972.27</text:p>
          </table:table-cell>
          <table:table-cell office:value-type="string" office:string-value="High" table:formula="of:=IF([.E803]&gt;[.$E$1003];&quot;High&quot;;&quot;Low&quot;)" table:style-name="ce1">
            <text:p>High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urniture</text:p>
          </table:table-cell>
          <table:table-cell office:value-type="float" office:value="3351.33" table:style-name="ce1">
            <text:p>3351.33</text:p>
          </table:table-cell>
          <table:table-cell office:value-type="float" office:value="3465.35" table:style-name="ce1">
            <text:p>3465.35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date" office:date-value="2023-10-12T00:00:00" table:style-name="ce2">
            <text:p>12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628.15" table:style-name="ce1">
            <text:p>628.15</text:p>
          </table:table-cell>
          <table:table-cell office:value-type="string" office:string-value="Low" table:formula="of:=IF([.E804]&gt;[.$E$1003];&quot;High&quot;;&quot;Low&quot;)" table:style-name="ce1">
            <text:p>Low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557.52" table:style-name="ce1">
            <text:p>557.52</text:p>
          </table:table-cell>
          <table:table-cell office:value-type="float" office:value="822.39" table:style-name="ce1">
            <text:p>822.39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date" office:date-value="2023-06-06T00:00:00" table:style-name="ce2">
            <text:p>06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4602.17" table:style-name="ce1">
            <text:p>4602.17</text:p>
          </table:table-cell>
          <table:table-cell office:value-type="string" office:string-value="Low" table:formula="of:=IF([.E805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ood</text:p>
          </table:table-cell>
          <table:table-cell office:value-type="float" office:value="108.99" table:style-name="ce1">
            <text:p>108.99</text:p>
          </table:table-cell>
          <table:table-cell office:value-type="float" office:value="351.6" table:style-name="ce1">
            <text:p>351.6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date" office:date-value="2023-03-16T00:00:00" table:style-name="ce2">
            <text:p>16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6780.38" table:style-name="ce1">
            <text:p>6780.38</text:p>
          </table:table-cell>
          <table:table-cell office:value-type="string" office:string-value="High" table:formula="of:=IF([.E806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urniture</text:p>
          </table:table-cell>
          <table:table-cell office:value-type="float" office:value="741.48" table:style-name="ce1">
            <text:p>741.48</text:p>
          </table:table-cell>
          <table:table-cell office:value-type="float" office:value="878.09" table:style-name="ce1">
            <text:p>878.09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10-15T00:00:00" table:style-name="ce2">
            <text:p>15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6807.56" table:style-name="ce1">
            <text:p>6807.56</text:p>
          </table:table-cell>
          <table:table-cell office:value-type="string" office:string-value="High" table:formula="of:=IF([.E807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lectronics</text:p>
          </table:table-cell>
          <table:table-cell office:value-type="float" office:value="3592.89" table:style-name="ce1">
            <text:p>3592.89</text:p>
          </table:table-cell>
          <table:table-cell office:value-type="float" office:value="4004" table:style-name="ce1">
            <text:p>4004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3793.91" table:style-name="ce1">
            <text:p>3793.91</text:p>
          </table:table-cell>
          <table:table-cell office:value-type="string" office:string-value="Low" table:formula="of:=IF([.E808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ood</text:p>
          </table:table-cell>
          <table:table-cell office:value-type="float" office:value="4865.33" table:style-name="ce1">
            <text:p>4865.33</text:p>
          </table:table-cell>
          <table:table-cell office:value-type="float" office:value="5316.13" table:style-name="ce1">
            <text:p>5316.13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06-24T00:00:00" table:style-name="ce2">
            <text:p>24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9422.75" table:style-name="ce1">
            <text:p>9422.75</text:p>
          </table:table-cell>
          <table:table-cell office:value-type="string" office:string-value="High" table:formula="of:=IF([.E809]&gt;[.$E$1003];&quot;High&quot;;&quot;Low&quot;)" table:style-name="ce1">
            <text:p>High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ectronics</text:p>
          </table:table-cell>
          <table:table-cell office:value-type="float" office:value="4916.17" table:style-name="ce1">
            <text:p>4916.17</text:p>
          </table:table-cell>
          <table:table-cell office:value-type="float" office:value="5309.32" table:style-name="ce1">
            <text:p>5309.32</text:p>
          </table:table-cell>
          <table:table-cell office:value-type="string" table:style-name="ce1">
            <text:p>Returning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date" office:date-value="2023-03-25T00:00:00" table:style-name="ce2">
            <text:p>25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1756.83" table:style-name="ce1">
            <text:p>1756.83</text:p>
          </table:table-cell>
          <table:table-cell office:value-type="string" office:string-value="Low" table:formula="of:=IF([.E810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lectronics</text:p>
          </table:table-cell>
          <table:table-cell office:value-type="float" office:value="2495.1999999999998" table:style-name="ce1">
            <text:p>2495.2</text:p>
          </table:table-cell>
          <table:table-cell office:value-type="float" office:value="2600.9299999999998" table:style-name="ce1">
            <text:p>2600.93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date" office:date-value="2023-01-22T00:00:00" table:style-name="ce2">
            <text:p>22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5053.5600000000004" table:style-name="ce1">
            <text:p>5053.56</text:p>
          </table:table-cell>
          <table:table-cell office:value-type="string" office:string-value="High" table:formula="of:=IF([.E811]&gt;[.$E$1003];&quot;High&quot;;&quot;Low&quot;)" table:style-name="ce1">
            <text:p>High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lectronics</text:p>
          </table:table-cell>
          <table:table-cell office:value-type="float" office:value="4353.29" table:style-name="ce1">
            <text:p>4353.29</text:p>
          </table:table-cell>
          <table:table-cell office:value-type="float" office:value="4405.8" table:style-name="ce1">
            <text:p>4405.8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1-27T00:00:00" table:style-name="ce2">
            <text:p>27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6939.75" table:style-name="ce1">
            <text:p>6939.75</text:p>
          </table:table-cell>
          <table:table-cell office:value-type="string" office:string-value="High" table:formula="of:=IF([.E812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urniture</text:p>
          </table:table-cell>
          <table:table-cell office:value-type="float" office:value="3697.29" table:style-name="ce1">
            <text:p>3697.29</text:p>
          </table:table-cell>
          <table:table-cell office:value-type="float" office:value="4003.96" table:style-name="ce1">
            <text:p>4003.96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date" office:date-value="2023-07-14T00:00:00" table:style-name="ce2">
            <text:p>14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7001.64" table:style-name="ce1">
            <text:p>7001.64</text:p>
          </table:table-cell>
          <table:table-cell office:value-type="string" office:string-value="High" table:formula="of:=IF([.E813]&gt;[.$E$1003];&quot;High&quot;;&quot;Low&quot;)" table:style-name="ce1">
            <text:p>Hig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2530.15" table:style-name="ce1">
            <text:p>2530.15</text:p>
          </table:table-cell>
          <table:table-cell office:value-type="float" office:value="2568.13" table:style-name="ce1">
            <text:p>2568.13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12-03T00:00:00" table:style-name="ce2">
            <text:p>03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521.53" table:style-name="ce1">
            <text:p>6521.53</text:p>
          </table:table-cell>
          <table:table-cell office:value-type="string" office:string-value="High" table:formula="of:=IF([.E814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lectronics</text:p>
          </table:table-cell>
          <table:table-cell office:value-type="float" office:value="2885.16" table:style-name="ce1">
            <text:p>2885.16</text:p>
          </table:table-cell>
          <table:table-cell office:value-type="float" office:value="3224.8399999999901" table:style-name="ce1">
            <text:p>3224.84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08-24T00:00:00" table:style-name="ce2">
            <text:p>24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2825.35" table:style-name="ce1">
            <text:p>2825.35</text:p>
          </table:table-cell>
          <table:table-cell office:value-type="string" office:string-value="Low" table:formula="of:=IF([.E815]&gt;[.$E$1003];&quot;High&quot;;&quot;Low&quot;)" table:style-name="ce1">
            <text:p>Low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ood</text:p>
          </table:table-cell>
          <table:table-cell office:value-type="float" office:value="729.27" table:style-name="ce1">
            <text:p>729.27</text:p>
          </table:table-cell>
          <table:table-cell office:value-type="float" office:value="999.18" table:style-name="ce1">
            <text:p>999.18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04-02T00:00:00" table:style-name="ce2">
            <text:p>02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1646.45" table:style-name="ce1">
            <text:p>1646.45</text:p>
          </table:table-cell>
          <table:table-cell office:value-type="string" office:string-value="Low" table:formula="of:=IF([.E816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rniture</text:p>
          </table:table-cell>
          <table:table-cell office:value-type="float" office:value="4691.42" table:style-name="ce1">
            <text:p>4691.42</text:p>
          </table:table-cell>
          <table:table-cell office:value-type="float" office:value="5026.1899999999996" table:style-name="ce1">
            <text:p>5026.19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01-21T00:00:00" table:style-name="ce2">
            <text:p>21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6395.81" table:style-name="ce1">
            <text:p>6395.81</text:p>
          </table:table-cell>
          <table:table-cell office:value-type="string" office:string-value="High" table:formula="of:=IF([.E817]&gt;[.$E$1003];&quot;High&quot;;&quot;Low&quot;)" table:style-name="ce1">
            <text:p>Hig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urniture</text:p>
          </table:table-cell>
          <table:table-cell office:value-type="float" office:value="1792.05" table:style-name="ce1">
            <text:p>1792.05</text:p>
          </table:table-cell>
          <table:table-cell office:value-type="float" office:value="2091.23" table:style-name="ce1">
            <text:p>2091.23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033.09" table:style-name="ce1">
            <text:p>6033.09</text:p>
          </table:table-cell>
          <table:table-cell office:value-type="string" office:string-value="High" table:formula="of:=IF([.E818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od</text:p>
          </table:table-cell>
          <table:table-cell office:value-type="float" office:value="2258.44" table:style-name="ce1">
            <text:p>2258.44</text:p>
          </table:table-cell>
          <table:table-cell office:value-type="float" office:value="2475.56" table:style-name="ce1">
            <text:p>2475.56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12-23T00:00:00" table:style-name="ce2">
            <text:p>23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1875.62" table:style-name="ce1">
            <text:p>1875.62</text:p>
          </table:table-cell>
          <table:table-cell office:value-type="string" office:string-value="Low" table:formula="of:=IF([.E819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ectronics</text:p>
          </table:table-cell>
          <table:table-cell office:value-type="float" office:value="3374.72" table:style-name="ce1">
            <text:p>3374.72</text:p>
          </table:table-cell>
          <table:table-cell office:value-type="float" office:value="3483.1499999999901" table:style-name="ce1">
            <text:p>3483.15</text:p>
          </table:table-cell>
          <table:table-cell office:value-type="string" table:style-name="ce1">
            <text:p>Returning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03-25T00:00:00" table:style-name="ce2">
            <text:p>25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7080.88" table:style-name="ce1">
            <text:p>7080.88</text:p>
          </table:table-cell>
          <table:table-cell office:value-type="string" office:string-value="High" table:formula="of:=IF([.E820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thing</text:p>
          </table:table-cell>
          <table:table-cell office:value-type="float" office:value="1702.82" table:style-name="ce1">
            <text:p>1702.82</text:p>
          </table:table-cell>
          <table:table-cell office:value-type="float" office:value="1862.61" table:style-name="ce1">
            <text:p>1862.61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4606.2" table:style-name="ce1">
            <text:p>4606.2</text:p>
          </table:table-cell>
          <table:table-cell office:value-type="string" office:string-value="Low" table:formula="of:=IF([.E821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ctronics</text:p>
          </table:table-cell>
          <table:table-cell office:value-type="float" office:value="1308.58" table:style-name="ce1">
            <text:p>1308.58</text:p>
          </table:table-cell>
          <table:table-cell office:value-type="float" office:value="1575.59" table:style-name="ce1">
            <text:p>1575.59</text:p>
          </table:table-cell>
          <table:table-cell office:value-type="string" table:style-name="ce1">
            <text:p>New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05-27T00:00:00" table:style-name="ce2">
            <text:p>27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6710.83" table:style-name="ce1">
            <text:p>6710.83</text:p>
          </table:table-cell>
          <table:table-cell office:value-type="string" office:string-value="High" table:formula="of:=IF([.E822]&gt;[.$E$1003];&quot;High&quot;;&quot;Low&quot;)" table:style-name="ce1">
            <text:p>Hig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od</text:p>
          </table:table-cell>
          <table:table-cell office:value-type="float" office:value="3173.69" table:style-name="ce1">
            <text:p>3173.69</text:p>
          </table:table-cell>
          <table:table-cell office:value-type="float" office:value="3503.11" table:style-name="ce1">
            <text:p>3503.11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09-14T00:00:00" table:style-name="ce2">
            <text:p>14/09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8389.93" table:style-name="ce1">
            <text:p>8389.93</text:p>
          </table:table-cell>
          <table:table-cell office:value-type="string" office:string-value="High" table:formula="of:=IF([.E823]&gt;[.$E$1003];&quot;High&quot;;&quot;Low&quot;)" table:style-name="ce1">
            <text:p>High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urniture</text:p>
          </table:table-cell>
          <table:table-cell office:value-type="float" office:value="173.67" table:style-name="ce1">
            <text:p>173.67</text:p>
          </table:table-cell>
          <table:table-cell office:value-type="float" office:value="565.62" table:style-name="ce1">
            <text:p>565.62</text:p>
          </table:table-cell>
          <table:table-cell office:value-type="string" table:style-name="ce1">
            <text:p>Returnin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date" office:date-value="2023-02-27T00:00:00" table:style-name="ce2">
            <text:p>27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780.31" table:style-name="ce1">
            <text:p>1780.31</text:p>
          </table:table-cell>
          <table:table-cell office:value-type="string" office:string-value="Low" table:formula="of:=IF([.E824]&gt;[.$E$1003];&quot;High&quot;;&quot;Low&quot;)" table:style-name="ce1">
            <text:p>Low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othing</text:p>
          </table:table-cell>
          <table:table-cell office:value-type="float" office:value="3617.59" table:style-name="ce1">
            <text:p>3617.59</text:p>
          </table:table-cell>
          <table:table-cell office:value-type="float" office:value="4003.5" table:style-name="ce1">
            <text:p>4003.5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1-15T00:00:00" table:style-name="ce2">
            <text:p>15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89.52999999999997" table:style-name="ce1">
            <text:p>289.53</text:p>
          </table:table-cell>
          <table:table-cell office:value-type="string" office:string-value="Low" table:formula="of:=IF([.E825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urniture</text:p>
          </table:table-cell>
          <table:table-cell office:value-type="float" office:value="2594.42" table:style-name="ce1">
            <text:p>2594.42</text:p>
          </table:table-cell>
          <table:table-cell office:value-type="float" office:value="3081.04" table:style-name="ce1">
            <text:p>3081.04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date" office:date-value="2023-06-11T00:00:00" table:style-name="ce2">
            <text:p>11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7813.12" table:style-name="ce1">
            <text:p>7813.12</text:p>
          </table:table-cell>
          <table:table-cell office:value-type="string" office:string-value="High" table:formula="of:=IF([.E826]&gt;[.$E$1003];&quot;High&quot;;&quot;Low&quot;)" table:style-name="ce1">
            <text:p>Hig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ood</text:p>
          </table:table-cell>
          <table:table-cell office:value-type="float" office:value="3048.48" table:style-name="ce1">
            <text:p>3048.48</text:p>
          </table:table-cell>
          <table:table-cell office:value-type="float" office:value="3198.54" table:style-name="ce1">
            <text:p>3198.54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date" office:date-value="2023-06-12T00:00:00" table:style-name="ce2">
            <text:p>12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6136" table:style-name="ce1">
            <text:p>6136</text:p>
          </table:table-cell>
          <table:table-cell office:value-type="string" office:string-value="High" table:formula="of:=IF([.E827]&gt;[.$E$1003];&quot;High&quot;;&quot;Low&quot;)" table:style-name="ce1">
            <text:p>High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lectronics</text:p>
          </table:table-cell>
          <table:table-cell office:value-type="float" office:value="3177.81" table:style-name="ce1">
            <text:p>3177.81</text:p>
          </table:table-cell>
          <table:table-cell office:value-type="float" office:value="3222.65" table:style-name="ce1">
            <text:p>3222.65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date" office:date-value="2023-11-16T00:00:00" table:style-name="ce2">
            <text:p>16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7026.43" table:style-name="ce1">
            <text:p>7026.43</text:p>
          </table:table-cell>
          <table:table-cell office:value-type="string" office:string-value="High" table:formula="of:=IF([.E828]&gt;[.$E$1003];&quot;High&quot;;&quot;Low&quot;)" table:style-name="ce1">
            <text:p>Hig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lothing</text:p>
          </table:table-cell>
          <table:table-cell office:value-type="float" office:value="2658.9" table:style-name="ce1">
            <text:p>2658.9</text:p>
          </table:table-cell>
          <table:table-cell office:value-type="float" office:value="2838.27" table:style-name="ce1">
            <text:p>2838.27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10-08T00:00:00" table:style-name="ce2">
            <text:p>08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8397.73" table:style-name="ce1">
            <text:p>8397.73</text:p>
          </table:table-cell>
          <table:table-cell office:value-type="string" office:string-value="High" table:formula="of:=IF([.E829]&gt;[.$E$1003];&quot;High&quot;;&quot;Low&quot;)" table:style-name="ce1">
            <text:p>High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urniture</text:p>
          </table:table-cell>
          <table:table-cell office:value-type="float" office:value="2933.54" table:style-name="ce1">
            <text:p>2933.54</text:p>
          </table:table-cell>
          <table:table-cell office:value-type="float" office:value="3307.75" table:style-name="ce1">
            <text:p>3307.75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10-07T00:00:00" table:style-name="ce2">
            <text:p>07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8047.83" table:style-name="ce1">
            <text:p>8047.83</text:p>
          </table:table-cell>
          <table:table-cell office:value-type="string" office:string-value="High" table:formula="of:=IF([.E830]&gt;[.$E$1003];&quot;High&quot;;&quot;Low&quot;)" table:style-name="ce1">
            <text:p>Hig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urniture</text:p>
          </table:table-cell>
          <table:table-cell office:value-type="float" office:value="3434.75" table:style-name="ce1">
            <text:p>3434.75</text:p>
          </table:table-cell>
          <table:table-cell office:value-type="float" office:value="3659.42" table:style-name="ce1">
            <text:p>3659.42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date" office:date-value="2023-01-12T00:00:00" table:style-name="ce2">
            <text:p>12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9613.11" table:style-name="ce1">
            <text:p>9613.11</text:p>
          </table:table-cell>
          <table:table-cell office:value-type="string" office:string-value="High" table:formula="of:=IF([.E831]&gt;[.$E$1003];&quot;High&quot;;&quot;Low&quot;)" table:style-name="ce1">
            <text:p>High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urniture</text:p>
          </table:table-cell>
          <table:table-cell office:value-type="float" office:value="3777.94" table:style-name="ce1">
            <text:p>3777.94</text:p>
          </table:table-cell>
          <table:table-cell office:value-type="float" office:value="4188.66" table:style-name="ce1">
            <text:p>4188.66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date" office:date-value="2023-10-01T00:00:00" table:style-name="ce2">
            <text:p>01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5405.76" table:style-name="ce1">
            <text:p>5405.76</text:p>
          </table:table-cell>
          <table:table-cell office:value-type="string" office:string-value="High" table:formula="of:=IF([.E832]&gt;[.$E$1003];&quot;High&quot;;&quot;Low&quot;)" table:style-name="ce1">
            <text:p>Hig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lectronics</text:p>
          </table:table-cell>
          <table:table-cell office:value-type="float" office:value="3650.89" table:style-name="ce1">
            <text:p>3650.89</text:p>
          </table:table-cell>
          <table:table-cell office:value-type="float" office:value="3930.06" table:style-name="ce1">
            <text:p>3930.06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09-28T00:00:00" table:style-name="ce2">
            <text:p>28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4936.1099999999997" table:style-name="ce1">
            <text:p>4936.11</text:p>
          </table:table-cell>
          <table:table-cell office:value-type="string" office:string-value="Low" table:formula="of:=IF([.E833]&gt;[.$E$1003];&quot;High&quot;;&quot;Low&quot;)" table:style-name="ce1">
            <text:p>Low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lothing</text:p>
          </table:table-cell>
          <table:table-cell office:value-type="float" office:value="4354.6000000000004" table:style-name="ce1">
            <text:p>4354.6</text:p>
          </table:table-cell>
          <table:table-cell office:value-type="float" office:value="4820.2" table:style-name="ce1">
            <text:p>4820.2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date" office:date-value="2023-07-27T00:00:00" table:style-name="ce2">
            <text:p>27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078.68" table:style-name="ce1">
            <text:p>4078.68</text:p>
          </table:table-cell>
          <table:table-cell office:value-type="string" office:string-value="Low" table:formula="of:=IF([.E834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lectronics</text:p>
          </table:table-cell>
          <table:table-cell office:value-type="float" office:value="987.74" table:style-name="ce1">
            <text:p>987.74</text:p>
          </table:table-cell>
          <table:table-cell office:value-type="float" office:value="1462.19" table:style-name="ce1">
            <text:p>1462.19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date" office:date-value="2023-01-27T00:00:00" table:style-name="ce2">
            <text:p>27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1621.54" table:style-name="ce1">
            <text:p>1621.54</text:p>
          </table:table-cell>
          <table:table-cell office:value-type="string" office:string-value="Low" table:formula="of:=IF([.E835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lectronics</text:p>
          </table:table-cell>
          <table:table-cell office:value-type="float" office:value="2035.68" table:style-name="ce1">
            <text:p>2035.68</text:p>
          </table:table-cell>
          <table:table-cell office:value-type="float" office:value="2079.64" table:style-name="ce1">
            <text:p>2079.64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03-13T00:00:00" table:style-name="ce2">
            <text:p>13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5768.81" table:style-name="ce1">
            <text:p>5768.81</text:p>
          </table:table-cell>
          <table:table-cell office:value-type="string" office:string-value="High" table:formula="of:=IF([.E836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lectronics</text:p>
          </table:table-cell>
          <table:table-cell office:value-type="float" office:value="4741.59" table:style-name="ce1">
            <text:p>4741.59</text:p>
          </table:table-cell>
          <table:table-cell office:value-type="float" office:value="4975.2299999999996" table:style-name="ce1">
            <text:p>4975.23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date" office:date-value="2023-03-01T00:00:00" table:style-name="ce2">
            <text:p>01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2842.42" table:style-name="ce1">
            <text:p>2842.42</text:p>
          </table:table-cell>
          <table:table-cell office:value-type="string" office:string-value="Low" table:formula="of:=IF([.E837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ood</text:p>
          </table:table-cell>
          <table:table-cell office:value-type="float" office:value="2013.12" table:style-name="ce1">
            <text:p>2013.12</text:p>
          </table:table-cell>
          <table:table-cell office:value-type="float" office:value="2321.87" table:style-name="ce1">
            <text:p>2321.87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5-25T00:00:00" table:style-name="ce2">
            <text:p>25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9220.94" table:style-name="ce1">
            <text:p>9220.94</text:p>
          </table:table-cell>
          <table:table-cell office:value-type="string" office:string-value="High" table:formula="of:=IF([.E838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ood</text:p>
          </table:table-cell>
          <table:table-cell office:value-type="float" office:value="668.11" table:style-name="ce1">
            <text:p>668.11</text:p>
          </table:table-cell>
          <table:table-cell office:value-type="float" office:value="803.49" table:style-name="ce1">
            <text:p>803.49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04-03T00:00:00" table:style-name="ce2">
            <text:p>03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5873.59" table:style-name="ce1">
            <text:p>5873.59</text:p>
          </table:table-cell>
          <table:table-cell office:value-type="string" office:string-value="High" table:formula="of:=IF([.E839]&gt;[.$E$1003];&quot;High&quot;;&quot;Low&quot;)" table:style-name="ce1">
            <text:p>Hig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ood</text:p>
          </table:table-cell>
          <table:table-cell office:value-type="float" office:value="2650.95" table:style-name="ce1">
            <text:p>2650.95</text:p>
          </table:table-cell>
          <table:table-cell office:value-type="float" office:value="2860.4199999999901" table:style-name="ce1">
            <text:p>2860.42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date" office:date-value="2023-11-05T00:00:00" table:style-name="ce2">
            <text:p>05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5969.12" table:style-name="ce1">
            <text:p>5969.12</text:p>
          </table:table-cell>
          <table:table-cell office:value-type="string" office:string-value="High" table:formula="of:=IF([.E840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lothing</text:p>
          </table:table-cell>
          <table:table-cell office:value-type="float" office:value="591.98" table:style-name="ce1">
            <text:p>591.98</text:p>
          </table:table-cell>
          <table:table-cell office:value-type="float" office:value="934.04" table:style-name="ce1">
            <text:p>934.04</text:p>
          </table:table-cell>
          <table:table-cell office:value-type="string" table:style-name="ce1">
            <text:p>New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1-08T00:00:00" table:style-name="ce2">
            <text:p>08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3613.75" table:style-name="ce1">
            <text:p>3613.75</text:p>
          </table:table-cell>
          <table:table-cell office:value-type="string" office:string-value="Low" table:formula="of:=IF([.E841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float" office:value="1054.1199999999999" table:style-name="ce1">
            <text:p>1054.12</text:p>
          </table:table-cell>
          <table:table-cell office:value-type="float" office:value="1175.21999999999" table:style-name="ce1">
            <text:p>1175.22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date" office:date-value="2023-03-20T00:00:00" table:style-name="ce2">
            <text:p>20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14.69000000000005" table:style-name="ce1">
            <text:p>614.69</text:p>
          </table:table-cell>
          <table:table-cell office:value-type="string" office:string-value="Low" table:formula="of:=IF([.E842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lectronics</text:p>
          </table:table-cell>
          <table:table-cell office:value-type="float" office:value="4991.68" table:style-name="ce1">
            <text:p>4991.68</text:p>
          </table:table-cell>
          <table:table-cell office:value-type="float" office:value="5296.65" table:style-name="ce1">
            <text:p>5296.65</text:p>
          </table:table-cell>
          <table:table-cell office:value-type="string" table:style-name="ce1">
            <text:p>New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date" office:date-value="2023-01-27T00:00:00" table:style-name="ce2">
            <text:p>27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414.26" table:style-name="ce1">
            <text:p>414.26</text:p>
          </table:table-cell>
          <table:table-cell office:value-type="string" office:string-value="Low" table:formula="of:=IF([.E843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ood</text:p>
          </table:table-cell>
          <table:table-cell office:value-type="float" office:value="2729.75" table:style-name="ce1">
            <text:p>2729.75</text:p>
          </table:table-cell>
          <table:table-cell office:value-type="float" office:value="3081.5" table:style-name="ce1">
            <text:p>3081.5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06-23T00:00:00" table:style-name="ce2">
            <text:p>23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291.0200000000004" table:style-name="ce1">
            <text:p>4291.02</text:p>
          </table:table-cell>
          <table:table-cell office:value-type="string" office:string-value="Low" table:formula="of:=IF([.E844]&gt;[.$E$1003];&quot;High&quot;;&quot;Low&quot;)" table:style-name="ce1">
            <text:p>Low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lectronics</text:p>
          </table:table-cell>
          <table:table-cell office:value-type="float" office:value="1456.09" table:style-name="ce1">
            <text:p>1456.09</text:p>
          </table:table-cell>
          <table:table-cell office:value-type="float" office:value="1510.4299999999901" table:style-name="ce1">
            <text:p>1510.43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02-19T00:00:00" table:style-name="ce2">
            <text:p>19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937.2" table:style-name="ce1">
            <text:p>937.2</text:p>
          </table:table-cell>
          <table:table-cell office:value-type="string" office:string-value="Low" table:formula="of:=IF([.E845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lectronics</text:p>
          </table:table-cell>
          <table:table-cell office:value-type="float" office:value="4974.1400000000003" table:style-name="ce1">
            <text:p>4974.14</text:p>
          </table:table-cell>
          <table:table-cell office:value-type="float" office:value="5227.93" table:style-name="ce1">
            <text:p>5227.93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date" office:date-value="2023-07-18T00:00:00" table:style-name="ce2">
            <text:p>18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6107.78" table:style-name="ce1">
            <text:p>6107.78</text:p>
          </table:table-cell>
          <table:table-cell office:value-type="string" office:string-value="High" table:formula="of:=IF([.E846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4834.47" table:style-name="ce1">
            <text:p>4834.47</text:p>
          </table:table-cell>
          <table:table-cell office:value-type="float" office:value="4973.38" table:style-name="ce1">
            <text:p>4973.38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12-15T00:00:00" table:style-name="ce2">
            <text:p>15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8821.6299999999992" table:style-name="ce1">
            <text:p>8821.63</text:p>
          </table:table-cell>
          <table:table-cell office:value-type="string" office:string-value="High" table:formula="of:=IF([.E847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lectronics</text:p>
          </table:table-cell>
          <table:table-cell office:value-type="float" office:value="2231.66" table:style-name="ce1">
            <text:p>2231.66</text:p>
          </table:table-cell>
          <table:table-cell office:value-type="float" office:value="2596.6099999999901" table:style-name="ce1">
            <text:p>2596.61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date" office:date-value="2023-06-30T00:00:00" table:style-name="ce2">
            <text:p>30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8840.86" table:style-name="ce1">
            <text:p>8840.86</text:p>
          </table:table-cell>
          <table:table-cell office:value-type="string" office:string-value="High" table:formula="of:=IF([.E848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urniture</text:p>
          </table:table-cell>
          <table:table-cell office:value-type="float" office:value="1339" table:style-name="ce1">
            <text:p>1339</text:p>
          </table:table-cell>
          <table:table-cell office:value-type="float" office:value="1441.88" table:style-name="ce1">
            <text:p>1441.88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date" office:date-value="2023-01-24T00:00:00" table:style-name="ce2">
            <text:p>24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6624.55" table:style-name="ce1">
            <text:p>6624.55</text:p>
          </table:table-cell>
          <table:table-cell office:value-type="string" office:string-value="High" table:formula="of:=IF([.E849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ectronics</text:p>
          </table:table-cell>
          <table:table-cell office:value-type="float" office:value="4200.08" table:style-name="ce1">
            <text:p>4200.08</text:p>
          </table:table-cell>
          <table:table-cell office:value-type="float" office:value="4647.28" table:style-name="ce1">
            <text:p>4647.28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11-12T00:00:00" table:style-name="ce2">
            <text:p>12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191.1999999999998" table:style-name="ce1">
            <text:p>2191.2</text:p>
          </table:table-cell>
          <table:table-cell office:value-type="string" office:string-value="Low" table:formula="of:=IF([.E850]&gt;[.$E$1003];&quot;High&quot;;&quot;Low&quot;)" table:style-name="ce1">
            <text:p>Low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3592.32" table:style-name="ce1">
            <text:p>3592.32</text:p>
          </table:table-cell>
          <table:table-cell office:value-type="float" office:value="3813.48" table:style-name="ce1">
            <text:p>3813.48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date" office:date-value="2023-02-15T00:00:00" table:style-name="ce2">
            <text:p>15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8643.67" table:style-name="ce1">
            <text:p>8643.67</text:p>
          </table:table-cell>
          <table:table-cell office:value-type="string" office:string-value="High" table:formula="of:=IF([.E851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ood</text:p>
          </table:table-cell>
          <table:table-cell office:value-type="float" office:value="3450.36" table:style-name="ce1">
            <text:p>3450.36</text:p>
          </table:table-cell>
          <table:table-cell office:value-type="float" office:value="3557.38" table:style-name="ce1">
            <text:p>3557.38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date" office:date-value="2023-01-15T00:00:00" table:style-name="ce2">
            <text:p>15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8872.33" table:style-name="ce1">
            <text:p>8872.33</text:p>
          </table:table-cell>
          <table:table-cell office:value-type="string" office:string-value="High" table:formula="of:=IF([.E852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urniture</text:p>
          </table:table-cell>
          <table:table-cell office:value-type="float" office:value="4470.91" table:style-name="ce1">
            <text:p>4470.91</text:p>
          </table:table-cell>
          <table:table-cell office:value-type="float" office:value="4695.54" table:style-name="ce1">
            <text:p>4695.54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date" office:date-value="2023-06-02T00:00:00" table:style-name="ce2">
            <text:p>02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046.87" table:style-name="ce1">
            <text:p>2046.87</text:p>
          </table:table-cell>
          <table:table-cell office:value-type="string" office:string-value="Low" table:formula="of:=IF([.E853]&gt;[.$E$1003];&quot;High&quot;;&quot;Low&quot;)" table:style-name="ce1">
            <text:p>Low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ood</text:p>
          </table:table-cell>
          <table:table-cell office:value-type="float" office:value="3462.61" table:style-name="ce1">
            <text:p>3462.61</text:p>
          </table:table-cell>
          <table:table-cell office:value-type="float" office:value="3672.89" table:style-name="ce1">
            <text:p>3672.89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8-10T00:00:00" table:style-name="ce2">
            <text:p>10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7400.52" table:style-name="ce1">
            <text:p>7400.52</text:p>
          </table:table-cell>
          <table:table-cell office:value-type="string" office:string-value="High" table:formula="of:=IF([.E854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1454.8" table:style-name="ce1">
            <text:p>1454.8</text:p>
          </table:table-cell>
          <table:table-cell office:value-type="float" office:value="1674.97" table:style-name="ce1">
            <text:p>1674.97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936.54" table:style-name="ce1">
            <text:p>2936.54</text:p>
          </table:table-cell>
          <table:table-cell office:value-type="string" office:string-value="Low" table:formula="of:=IF([.E855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urniture</text:p>
          </table:table-cell>
          <table:table-cell office:value-type="float" office:value="3484.62" table:style-name="ce1">
            <text:p>3484.62</text:p>
          </table:table-cell>
          <table:table-cell office:value-type="float" office:value="3781.5499999999902" table:style-name="ce1">
            <text:p>3781.55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9-30T00:00:00" table:style-name="ce2">
            <text:p>30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8046.14" table:style-name="ce1">
            <text:p>8046.14</text:p>
          </table:table-cell>
          <table:table-cell office:value-type="string" office:string-value="High" table:formula="of:=IF([.E856]&gt;[.$E$1003];&quot;High&quot;;&quot;Low&quot;)" table:style-name="ce1">
            <text:p>Hig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urniture</text:p>
          </table:table-cell>
          <table:table-cell office:value-type="float" office:value="1563.78" table:style-name="ce1">
            <text:p>1563.78</text:p>
          </table:table-cell>
          <table:table-cell office:value-type="float" office:value="1829.1599999999901" table:style-name="ce1">
            <text:p>1829.16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date" office:date-value="2023-08-24T00:00:00" table:style-name="ce2">
            <text:p>24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9972.66" table:style-name="ce1">
            <text:p>9972.66</text:p>
          </table:table-cell>
          <table:table-cell office:value-type="string" office:string-value="High" table:formula="of:=IF([.E857]&gt;[.$E$1003];&quot;High&quot;;&quot;Low&quot;)" table:style-name="ce1">
            <text:p>Hig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lothing</text:p>
          </table:table-cell>
          <table:table-cell office:value-type="float" office:value="3808.23" table:style-name="ce1">
            <text:p>3808.23</text:p>
          </table:table-cell>
          <table:table-cell office:value-type="float" office:value="3891.62" table:style-name="ce1">
            <text:p>3891.62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date" office:date-value="2023-12-06T00:00:00" table:style-name="ce2">
            <text:p>06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397.26" table:style-name="ce1">
            <text:p>397.26</text:p>
          </table:table-cell>
          <table:table-cell office:value-type="string" office:string-value="Low" table:formula="of:=IF([.E858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lectronics</text:p>
          </table:table-cell>
          <table:table-cell office:value-type="float" office:value="3117.75" table:style-name="ce1">
            <text:p>3117.75</text:p>
          </table:table-cell>
          <table:table-cell office:value-type="float" office:value="3159.88" table:style-name="ce1">
            <text:p>3159.88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08-16T00:00:00" table:style-name="ce2">
            <text:p>16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8983.92" table:style-name="ce1">
            <text:p>8983.92</text:p>
          </table:table-cell>
          <table:table-cell office:value-type="string" office:string-value="High" table:formula="of:=IF([.E859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urniture</text:p>
          </table:table-cell>
          <table:table-cell office:value-type="float" office:value="433.19" table:style-name="ce1">
            <text:p>433.19</text:p>
          </table:table-cell>
          <table:table-cell office:value-type="float" office:value="800.6" table:style-name="ce1">
            <text:p>800.6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date" office:date-value="2023-01-09T00:00:00" table:style-name="ce2">
            <text:p>09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6264.04" table:style-name="ce1">
            <text:p>6264.04</text:p>
          </table:table-cell>
          <table:table-cell office:value-type="string" office:string-value="High" table:formula="of:=IF([.E860]&gt;[.$E$1003];&quot;High&quot;;&quot;Low&quot;)" table:style-name="ce1">
            <text:p>Hig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lothing</text:p>
          </table:table-cell>
          <table:table-cell office:value-type="float" office:value="2588.54" table:style-name="ce1">
            <text:p>2588.54</text:p>
          </table:table-cell>
          <table:table-cell office:value-type="float" office:value="2872.8" table:style-name="ce1">
            <text:p>2872.8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6-15T00:00:00" table:style-name="ce2">
            <text:p>15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9736.49" table:style-name="ce1">
            <text:p>9736.49</text:p>
          </table:table-cell>
          <table:table-cell office:value-type="string" office:string-value="High" table:formula="of:=IF([.E861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urniture</text:p>
          </table:table-cell>
          <table:table-cell office:value-type="float" office:value="1749.34" table:style-name="ce1">
            <text:p>1749.34</text:p>
          </table:table-cell>
          <table:table-cell office:value-type="float" office:value="1935.25" table:style-name="ce1">
            <text:p>1935.25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11-15T00:00:00" table:style-name="ce2">
            <text:p>15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4703.59" table:style-name="ce1">
            <text:p>4703.59</text:p>
          </table:table-cell>
          <table:table-cell office:value-type="string" office:string-value="Low" table:formula="of:=IF([.E862]&gt;[.$E$1003];&quot;High&quot;;&quot;Low&quot;)" table:style-name="ce1">
            <text:p>Low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ectronics</text:p>
          </table:table-cell>
          <table:table-cell office:value-type="float" office:value="1676.42" table:style-name="ce1">
            <text:p>1676.42</text:p>
          </table:table-cell>
          <table:table-cell office:value-type="float" office:value="2082.52" table:style-name="ce1">
            <text:p>2082.52</text:p>
          </table:table-cell>
          <table:table-cell office:value-type="string" table:style-name="ce1">
            <text:p>New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08-02T00:00:00" table:style-name="ce2">
            <text:p>02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8489.14" table:style-name="ce1">
            <text:p>8489.14</text:p>
          </table:table-cell>
          <table:table-cell office:value-type="string" office:string-value="High" table:formula="of:=IF([.E863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3031.17" table:style-name="ce1">
            <text:p>3031.17</text:p>
          </table:table-cell>
          <table:table-cell office:value-type="float" office:value="3231.32" table:style-name="ce1">
            <text:p>3231.32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date" office:date-value="2023-04-27T00:00:00" table:style-name="ce2">
            <text:p>27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717.7" table:style-name="ce1">
            <text:p>717.7</text:p>
          </table:table-cell>
          <table:table-cell office:value-type="string" office:string-value="Low" table:formula="of:=IF([.E864]&gt;[.$E$1003];&quot;High&quot;;&quot;Low&quot;)" table:style-name="ce1">
            <text:p>Low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othing</text:p>
          </table:table-cell>
          <table:table-cell office:value-type="float" office:value="1645.51" table:style-name="ce1">
            <text:p>1645.51</text:p>
          </table:table-cell>
          <table:table-cell office:value-type="float" office:value="2045.53" table:style-name="ce1">
            <text:p>2045.53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date" office:date-value="2023-12-10T00:00:00" table:style-name="ce2">
            <text:p>10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3419.26" table:style-name="ce1">
            <text:p>3419.26</text:p>
          </table:table-cell>
          <table:table-cell office:value-type="string" office:string-value="Low" table:formula="of:=IF([.E865]&gt;[.$E$1003];&quot;High&quot;;&quot;Low&quot;)" table:style-name="ce1">
            <text:p>Low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lectronics</text:p>
          </table:table-cell>
          <table:table-cell office:value-type="float" office:value="3895.62" table:style-name="ce1">
            <text:p>3895.62</text:p>
          </table:table-cell>
          <table:table-cell office:value-type="float" office:value="4055.44" table:style-name="ce1">
            <text:p>4055.44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03-13T00:00:00" table:style-name="ce2">
            <text:p>13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763.46" table:style-name="ce1">
            <text:p>763.46</text:p>
          </table:table-cell>
          <table:table-cell office:value-type="string" office:string-value="Low" table:formula="of:=IF([.E866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lothing</text:p>
          </table:table-cell>
          <table:table-cell office:value-type="float" office:value="400.42" table:style-name="ce1">
            <text:p>400.42</text:p>
          </table:table-cell>
          <table:table-cell office:value-type="float" office:value="446.11" table:style-name="ce1">
            <text:p>446.11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date" office:date-value="2023-03-05T00:00:00" table:style-name="ce2">
            <text:p>05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9755.9" table:style-name="ce1">
            <text:p>9755.9</text:p>
          </table:table-cell>
          <table:table-cell office:value-type="string" office:string-value="High" table:formula="of:=IF([.E867]&gt;[.$E$1003];&quot;High&quot;;&quot;Low&quot;)" table:style-name="ce1">
            <text:p>Hig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lectronics</text:p>
          </table:table-cell>
          <table:table-cell office:value-type="float" office:value="3318.92" table:style-name="ce1">
            <text:p>3318.92</text:p>
          </table:table-cell>
          <table:table-cell office:value-type="float" office:value="3785.91" table:style-name="ce1">
            <text:p>3785.91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date" office:date-value="2023-07-24T00:00:00" table:style-name="ce2">
            <text:p>24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8188.04" table:style-name="ce1">
            <text:p>8188.04</text:p>
          </table:table-cell>
          <table:table-cell office:value-type="string" office:string-value="High" table:formula="of:=IF([.E868]&gt;[.$E$1003];&quot;High&quot;;&quot;Low&quot;)" table:style-name="ce1">
            <text:p>Hig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lectronics</text:p>
          </table:table-cell>
          <table:table-cell office:value-type="float" office:value="4055.51" table:style-name="ce1">
            <text:p>4055.51</text:p>
          </table:table-cell>
          <table:table-cell office:value-type="float" office:value="4258.84" table:style-name="ce1">
            <text:p>4258.84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date" office:date-value="2023-07-28T00:00:00" table:style-name="ce2">
            <text:p>28/07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8540.2199999999993" table:style-name="ce1">
            <text:p>8540.22</text:p>
          </table:table-cell>
          <table:table-cell office:value-type="string" office:string-value="High" table:formula="of:=IF([.E869]&gt;[.$E$1003];&quot;High&quot;;&quot;Low&quot;)" table:style-name="ce1">
            <text:p>Hig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ood</text:p>
          </table:table-cell>
          <table:table-cell office:value-type="float" office:value="3380.52" table:style-name="ce1">
            <text:p>3380.52</text:p>
          </table:table-cell>
          <table:table-cell office:value-type="float" office:value="3778.94" table:style-name="ce1">
            <text:p>3778.94</text:p>
          </table:table-cell>
          <table:table-cell office:value-type="string" table:style-name="ce1">
            <text:p>Returnin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03-13T00:00:00" table:style-name="ce2">
            <text:p>13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9385.86" table:style-name="ce1">
            <text:p>9385.86</text:p>
          </table:table-cell>
          <table:table-cell office:value-type="string" office:string-value="High" table:formula="of:=IF([.E870]&gt;[.$E$1003];&quot;High&quot;;&quot;Low&quot;)" table:style-name="ce1">
            <text:p>High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ood</text:p>
          </table:table-cell>
          <table:table-cell office:value-type="float" office:value="2511.2800000000002" table:style-name="ce1">
            <text:p>2511.28</text:p>
          </table:table-cell>
          <table:table-cell office:value-type="float" office:value="2658.06" table:style-name="ce1">
            <text:p>2658.06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date" office:date-value="2023-10-04T00:00:00" table:style-name="ce2">
            <text:p>04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942.52" table:style-name="ce1">
            <text:p>942.52</text:p>
          </table:table-cell>
          <table:table-cell office:value-type="string" office:string-value="Low" table:formula="of:=IF([.E871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ood</text:p>
          </table:table-cell>
          <table:table-cell office:value-type="float" office:value="4754.0200000000004" table:style-name="ce1">
            <text:p>4754.02</text:p>
          </table:table-cell>
          <table:table-cell office:value-type="float" office:value="5080.74" table:style-name="ce1">
            <text:p>5080.74</text:p>
          </table:table-cell>
          <table:table-cell office:value-type="string" table:style-name="ce1">
            <text:p>New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date" office:date-value="2023-10-01T00:00:00" table:style-name="ce2">
            <text:p>01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3917.42" table:style-name="ce1">
            <text:p>3917.42</text:p>
          </table:table-cell>
          <table:table-cell office:value-type="string" office:string-value="Low" table:formula="of:=IF([.E872]&gt;[.$E$1003];&quot;High&quot;;&quot;Low&quot;)" table:style-name="ce1">
            <text:p>Low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lectronics</text:p>
          </table:table-cell>
          <table:table-cell office:value-type="float" office:value="1534.7" table:style-name="ce1">
            <text:p>1534.7</text:p>
          </table:table-cell>
          <table:table-cell office:value-type="float" office:value="1972.62" table:style-name="ce1">
            <text:p>1972.62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11-16T00:00:00" table:style-name="ce2">
            <text:p>16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803.25" table:style-name="ce1">
            <text:p>803.25</text:p>
          </table:table-cell>
          <table:table-cell office:value-type="string" office:string-value="Low" table:formula="of:=IF([.E873]&gt;[.$E$1003];&quot;High&quot;;&quot;Low&quot;)" table:style-name="ce1">
            <text:p>Low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urniture</text:p>
          </table:table-cell>
          <table:table-cell office:value-type="float" office:value="144.88" table:style-name="ce1">
            <text:p>144.88</text:p>
          </table:table-cell>
          <table:table-cell office:value-type="float" office:value="175.29" table:style-name="ce1">
            <text:p>175.29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12-04T00:00:00" table:style-name="ce2">
            <text:p>04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2186.85" table:style-name="ce1">
            <text:p>2186.85</text:p>
          </table:table-cell>
          <table:table-cell office:value-type="string" office:string-value="Low" table:formula="of:=IF([.E874]&gt;[.$E$1003];&quot;High&quot;;&quot;Low&quot;)" table:style-name="ce1">
            <text:p>Low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lothing</text:p>
          </table:table-cell>
          <table:table-cell office:value-type="float" office:value="2188.35" table:style-name="ce1">
            <text:p>2188.35</text:p>
          </table:table-cell>
          <table:table-cell office:value-type="float" office:value="2605.3599999999901" table:style-name="ce1">
            <text:p>2605.36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date" office:date-value="2024-01-01T00:00:00" table:style-name="ce2">
            <text:p>01/01/2024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2370.7199999999998" table:style-name="ce1">
            <text:p>2370.72</text:p>
          </table:table-cell>
          <table:table-cell office:value-type="string" office:string-value="Low" table:formula="of:=IF([.E875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othing</text:p>
          </table:table-cell>
          <table:table-cell office:value-type="float" office:value="213.41" table:style-name="ce1">
            <text:p>213.41</text:p>
          </table:table-cell>
          <table:table-cell office:value-type="float" office:value="503.36" table:style-name="ce1">
            <text:p>503.36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04-05T00:00:00" table:style-name="ce2">
            <text:p>05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4744.16" table:style-name="ce1">
            <text:p>4744.16</text:p>
          </table:table-cell>
          <table:table-cell office:value-type="string" office:string-value="Low" table:formula="of:=IF([.E876]&gt;[.$E$1003];&quot;High&quot;;&quot;Low&quot;)" table:style-name="ce1">
            <text:p>Low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lothing</text:p>
          </table:table-cell>
          <table:table-cell office:value-type="float" office:value="4771.99" table:style-name="ce1">
            <text:p>4771.99</text:p>
          </table:table-cell>
          <table:table-cell office:value-type="float" office:value="5079.6499999999996" table:style-name="ce1">
            <text:p>5079.65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06-15T00:00:00" table:style-name="ce2">
            <text:p>15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2758.77" table:style-name="ce1">
            <text:p>2758.77</text:p>
          </table:table-cell>
          <table:table-cell office:value-type="string" office:string-value="Low" table:formula="of:=IF([.E877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ood</text:p>
          </table:table-cell>
          <table:table-cell office:value-type="float" office:value="1089.0899999999999" table:style-name="ce1">
            <text:p>1089.09</text:p>
          </table:table-cell>
          <table:table-cell office:value-type="float" office:value="1355.44" table:style-name="ce1">
            <text:p>1355.44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date" office:date-value="2023-02-01T00:00:00" table:style-name="ce2">
            <text:p>01/0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099.68" table:style-name="ce1">
            <text:p>1099.68</text:p>
          </table:table-cell>
          <table:table-cell office:value-type="string" office:string-value="Low" table:formula="of:=IF([.E878]&gt;[.$E$1003];&quot;High&quot;;&quot;Low&quot;)" table:style-name="ce1">
            <text:p>Low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lectronics</text:p>
          </table:table-cell>
          <table:table-cell office:value-type="float" office:value="3955.19" table:style-name="ce1">
            <text:p>3955.19</text:p>
          </table:table-cell>
          <table:table-cell office:value-type="float" office:value="4393.68" table:style-name="ce1">
            <text:p>4393.68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date" office:date-value="2023-01-11T00:00:00" table:style-name="ce2">
            <text:p>11/0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1758.16" table:style-name="ce1">
            <text:p>1758.16</text:p>
          </table:table-cell>
          <table:table-cell office:value-type="string" office:string-value="Low" table:formula="of:=IF([.E879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ood</text:p>
          </table:table-cell>
          <table:table-cell office:value-type="float" office:value="3884.13" table:style-name="ce1">
            <text:p>3884.13</text:p>
          </table:table-cell>
          <table:table-cell office:value-type="float" office:value="3915.41" table:style-name="ce1">
            <text:p>3915.41</text:p>
          </table:table-cell>
          <table:table-cell office:value-type="string" table:style-name="ce1">
            <text:p>Returning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date" office:date-value="2023-10-28T00:00:00" table:style-name="ce2">
            <text:p>28/10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1558.03" table:style-name="ce1">
            <text:p>1558.03</text:p>
          </table:table-cell>
          <table:table-cell office:value-type="string" office:string-value="Low" table:formula="of:=IF([.E880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urniture</text:p>
          </table:table-cell>
          <table:table-cell office:value-type="float" office:value="1127.76" table:style-name="ce1">
            <text:p>1127.76</text:p>
          </table:table-cell>
          <table:table-cell office:value-type="float" office:value="1265.6600000000001" table:style-name="ce1">
            <text:p>1265.66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date" office:date-value="2023-08-05T00:00:00" table:style-name="ce2">
            <text:p>05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9733.4599999999991" table:style-name="ce1">
            <text:p>9733.46</text:p>
          </table:table-cell>
          <table:table-cell office:value-type="string" office:string-value="High" table:formula="of:=IF([.E881]&gt;[.$E$1003];&quot;High&quot;;&quot;Low&quot;)" table:style-name="ce1">
            <text:p>High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lectronics</text:p>
          </table:table-cell>
          <table:table-cell office:value-type="float" office:value="3125.07" table:style-name="ce1">
            <text:p>3125.07</text:p>
          </table:table-cell>
          <table:table-cell office:value-type="float" office:value="3564.19" table:style-name="ce1">
            <text:p>3564.19</text:p>
          </table:table-cell>
          <table:table-cell office:value-type="string" table:style-name="ce1">
            <text:p>Returning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10-16T00:00:00" table:style-name="ce2">
            <text:p>16/10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7617" table:style-name="ce1">
            <text:p>7617</text:p>
          </table:table-cell>
          <table:table-cell office:value-type="string" office:string-value="High" table:formula="of:=IF([.E882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lothing</text:p>
          </table:table-cell>
          <table:table-cell office:value-type="float" office:value="287.99" table:style-name="ce1">
            <text:p>287.99</text:p>
          </table:table-cell>
          <table:table-cell office:value-type="float" office:value="666.64" table:style-name="ce1">
            <text:p>666.64</text:p>
          </table:table-cell>
          <table:table-cell office:value-type="string" table:style-name="ce1">
            <text:p>Retur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date" office:date-value="2023-04-12T00:00:00" table:style-name="ce2">
            <text:p>12/04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9680.84" table:style-name="ce1">
            <text:p>9680.84</text:p>
          </table:table-cell>
          <table:table-cell office:value-type="string" office:string-value="High" table:formula="of:=IF([.E883]&gt;[.$E$1003];&quot;High&quot;;&quot;Low&quot;)" table:style-name="ce1">
            <text:p>Hig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ood</text:p>
          </table:table-cell>
          <table:table-cell office:value-type="float" office:value="2443.69" table:style-name="ce1">
            <text:p>2443.69</text:p>
          </table:table-cell>
          <table:table-cell office:value-type="float" office:value="2462.34" table:style-name="ce1">
            <text:p>2462.34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4453.43" table:style-name="ce1">
            <text:p>4453.43</text:p>
          </table:table-cell>
          <table:table-cell office:value-type="string" office:string-value="Low" table:formula="of:=IF([.E884]&gt;[.$E$1003];&quot;High&quot;;&quot;Low&quot;)" table:style-name="ce1">
            <text:p>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ood</text:p>
          </table:table-cell>
          <table:table-cell office:value-type="float" office:value="122.5" table:style-name="ce1">
            <text:p>122.5</text:p>
          </table:table-cell>
          <table:table-cell office:value-type="float" office:value="385.83" table:style-name="ce1">
            <text:p>385.83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date" office:date-value="2023-08-02T00:00:00" table:style-name="ce2">
            <text:p>02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2855.85" table:style-name="ce1">
            <text:p>2855.85</text:p>
          </table:table-cell>
          <table:table-cell office:value-type="string" office:string-value="Low" table:formula="of:=IF([.E885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rniture</text:p>
          </table:table-cell>
          <table:table-cell office:value-type="float" office:value="4609.66" table:style-name="ce1">
            <text:p>4609.66</text:p>
          </table:table-cell>
          <table:table-cell office:value-type="float" office:value="4879.1499999999996" table:style-name="ce1">
            <text:p>4879.15</text:p>
          </table:table-cell>
          <table:table-cell office:value-type="string" table:style-name="ce1">
            <text:p>Returnin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06-28T00:00:00" table:style-name="ce2">
            <text:p>28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8003.1" table:style-name="ce1">
            <text:p>8003.1</text:p>
          </table:table-cell>
          <table:table-cell office:value-type="string" office:string-value="High" table:formula="of:=IF([.E886]&gt;[.$E$1003];&quot;High&quot;;&quot;Low&quot;)" table:style-name="ce1">
            <text:p>High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urniture</text:p>
          </table:table-cell>
          <table:table-cell office:value-type="float" office:value="4881.63" table:style-name="ce1">
            <text:p>4881.63</text:p>
          </table:table-cell>
          <table:table-cell office:value-type="float" office:value="5088.0600000000004" table:style-name="ce1">
            <text:p>5088.06</text:p>
          </table:table-cell>
          <table:table-cell office:value-type="string" table:style-name="ce1">
            <text:p>Returning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date" office:date-value="2023-03-29T00:00:00" table:style-name="ce2">
            <text:p>29/03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3329.91" table:style-name="ce1">
            <text:p>3329.91</text:p>
          </table:table-cell>
          <table:table-cell office:value-type="string" office:string-value="Low" table:formula="of:=IF([.E887]&gt;[.$E$1003];&quot;High&quot;;&quot;Low&quot;)" table:style-name="ce1">
            <text:p>Low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ood</text:p>
          </table:table-cell>
          <table:table-cell office:value-type="float" office:value="1150.3" table:style-name="ce1">
            <text:p>1150.3</text:p>
          </table:table-cell>
          <table:table-cell office:value-type="float" office:value="1306.02" table:style-name="ce1">
            <text:p>1306.02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date" office:date-value="2023-02-10T00:00:00" table:style-name="ce2">
            <text:p>10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3063.9" table:style-name="ce1">
            <text:p>3063.9</text:p>
          </table:table-cell>
          <table:table-cell office:value-type="string" office:string-value="Low" table:formula="of:=IF([.E888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urniture</text:p>
          </table:table-cell>
          <table:table-cell office:value-type="float" office:value="1080.1199999999999" table:style-name="ce1">
            <text:p>1080.12</text:p>
          </table:table-cell>
          <table:table-cell office:value-type="float" office:value="1424.1699999999901" table:style-name="ce1">
            <text:p>1424.17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3-17T00:00:00" table:style-name="ce2">
            <text:p>17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2401.81" table:style-name="ce1">
            <text:p>2401.81</text:p>
          </table:table-cell>
          <table:table-cell office:value-type="string" office:string-value="Low" table:formula="of:=IF([.E889]&gt;[.$E$1003];&quot;High&quot;;&quot;Low&quot;)" table:style-name="ce1">
            <text:p>Low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lothing</text:p>
          </table:table-cell>
          <table:table-cell office:value-type="float" office:value="3780.91" table:style-name="ce1">
            <text:p>3780.91</text:p>
          </table:table-cell>
          <table:table-cell office:value-type="float" office:value="3892.73" table:style-name="ce1">
            <text:p>3892.73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02-15T00:00:00" table:style-name="ce2">
            <text:p>15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1383.82" table:style-name="ce1">
            <text:p>1383.82</text:p>
          </table:table-cell>
          <table:table-cell office:value-type="string" office:string-value="Low" table:formula="of:=IF([.E890]&gt;[.$E$1003];&quot;High&quot;;&quot;Low&quot;)" table:style-name="ce1">
            <text:p>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rniture</text:p>
          </table:table-cell>
          <table:table-cell office:value-type="float" office:value="1304.23" table:style-name="ce1">
            <text:p>1304.23</text:p>
          </table:table-cell>
          <table:table-cell office:value-type="float" office:value="1705.71" table:style-name="ce1">
            <text:p>1705.71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638.98" table:style-name="ce1">
            <text:p>2638.98</text:p>
          </table:table-cell>
          <table:table-cell office:value-type="string" office:string-value="Low" table:formula="of:=IF([.E891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urniture</text:p>
          </table:table-cell>
          <table:table-cell office:value-type="float" office:value="4480.63" table:style-name="ce1">
            <text:p>4480.63</text:p>
          </table:table-cell>
          <table:table-cell office:value-type="float" office:value="4884.12" table:style-name="ce1">
            <text:p>4884.12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date" office:date-value="2023-03-21T00:00:00" table:style-name="ce2">
            <text:p>21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3617.67" table:style-name="ce1">
            <text:p>3617.67</text:p>
          </table:table-cell>
          <table:table-cell office:value-type="string" office:string-value="Low" table:formula="of:=IF([.E892]&gt;[.$E$1003];&quot;High&quot;;&quot;Low&quot;)" table:style-name="ce1">
            <text:p>Low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ood</text:p>
          </table:table-cell>
          <table:table-cell office:value-type="float" office:value="2890.95" table:style-name="ce1">
            <text:p>2890.95</text:p>
          </table:table-cell>
          <table:table-cell office:value-type="float" office:value="3104.43" table:style-name="ce1">
            <text:p>3104.43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date" office:date-value="2023-11-06T00:00:00" table:style-name="ce2">
            <text:p>06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6772.54" table:style-name="ce1">
            <text:p>6772.54</text:p>
          </table:table-cell>
          <table:table-cell office:value-type="string" office:string-value="High" table:formula="of:=IF([.E893]&gt;[.$E$1003];&quot;High&quot;;&quot;Low&quot;)" table:style-name="ce1">
            <text:p>Hig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ood</text:p>
          </table:table-cell>
          <table:table-cell office:value-type="float" office:value="1786.35" table:style-name="ce1">
            <text:p>1786.35</text:p>
          </table:table-cell>
          <table:table-cell office:value-type="float" office:value="1935.29" table:style-name="ce1">
            <text:p>1935.29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date" office:date-value="2023-03-27T00:00:00" table:style-name="ce2">
            <text:p>27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719.39" table:style-name="ce1">
            <text:p>719.39</text:p>
          </table:table-cell>
          <table:table-cell office:value-type="string" office:string-value="Low" table:formula="of:=IF([.E894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ectronics</text:p>
          </table:table-cell>
          <table:table-cell office:value-type="float" office:value="4171.83" table:style-name="ce1">
            <text:p>4171.83</text:p>
          </table:table-cell>
          <table:table-cell office:value-type="float" office:value="4320.93" table:style-name="ce1">
            <text:p>4320.93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date" office:date-value="2023-04-02T00:00:00" table:style-name="ce2">
            <text:p>02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2184.02" table:style-name="ce1">
            <text:p>2184.02</text:p>
          </table:table-cell>
          <table:table-cell office:value-type="string" office:string-value="Low" table:formula="of:=IF([.E895]&gt;[.$E$1003];&quot;High&quot;;&quot;Low&quot;)" table:style-name="ce1">
            <text:p>Lo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lectronics</text:p>
          </table:table-cell>
          <table:table-cell office:value-type="float" office:value="2492.36" table:style-name="ce1">
            <text:p>2492.36</text:p>
          </table:table-cell>
          <table:table-cell office:value-type="float" office:value="2738.68" table:style-name="ce1">
            <text:p>2738.68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date" office:date-value="2023-05-28T00:00:00" table:style-name="ce2">
            <text:p>28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8109.33" table:style-name="ce1">
            <text:p>8109.33</text:p>
          </table:table-cell>
          <table:table-cell office:value-type="string" office:string-value="High" table:formula="of:=IF([.E896]&gt;[.$E$1003];&quot;High&quot;;&quot;Low&quot;)" table:style-name="ce1">
            <text:p>Hig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ood</text:p>
          </table:table-cell>
          <table:table-cell office:value-type="float" office:value="4562.58" table:style-name="ce1">
            <text:p>4562.58</text:p>
          </table:table-cell>
          <table:table-cell office:value-type="float" office:value="4925.17" table:style-name="ce1">
            <text:p>4925.17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date" office:date-value="2023-06-10T00:00:00" table:style-name="ce2">
            <text:p>10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1554.53" table:style-name="ce1">
            <text:p>1554.53</text:p>
          </table:table-cell>
          <table:table-cell office:value-type="string" office:string-value="Low" table:formula="of:=IF([.E897]&gt;[.$E$1003];&quot;High&quot;;&quot;Low&quot;)" table:style-name="ce1">
            <text:p>Low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urniture</text:p>
          </table:table-cell>
          <table:table-cell office:value-type="float" office:value="4643.67" table:style-name="ce1">
            <text:p>4643.67</text:p>
          </table:table-cell>
          <table:table-cell office:value-type="float" office:value="4829.5200000000004" table:style-name="ce1">
            <text:p>4829.52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date" office:date-value="2023-07-21T00:00:00" table:style-name="ce2">
            <text:p>21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3492.19" table:style-name="ce1">
            <text:p>3492.19</text:p>
          </table:table-cell>
          <table:table-cell office:value-type="string" office:string-value="Low" table:formula="of:=IF([.E898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urniture</text:p>
          </table:table-cell>
          <table:table-cell office:value-type="float" office:value="868.83" table:style-name="ce1">
            <text:p>868.83</text:p>
          </table:table-cell>
          <table:table-cell office:value-type="float" office:value="1177.75" table:style-name="ce1">
            <text:p>1177.75</text:p>
          </table:table-cell>
          <table:table-cell office:value-type="string" table:style-name="ce1">
            <text:p>Returning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date" office:date-value="2023-08-30T00:00:00" table:style-name="ce2">
            <text:p>30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8660.1200000000008" table:style-name="ce1">
            <text:p>8660.12</text:p>
          </table:table-cell>
          <table:table-cell office:value-type="string" office:string-value="High" table:formula="of:=IF([.E899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nics</text:p>
          </table:table-cell>
          <table:table-cell office:value-type="float" office:value="61.5" table:style-name="ce1">
            <text:p>61.5</text:p>
          </table:table-cell>
          <table:table-cell office:value-type="float" office:value="258.91999999999899" table:style-name="ce1">
            <text:p>258.92</text:p>
          </table:table-cell>
          <table:table-cell office:value-type="string" table:style-name="ce1">
            <text:p>New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date" office:date-value="2023-12-19T00:00:00" table:style-name="ce2">
            <text:p>19/1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1633.76" table:style-name="ce1">
            <text:p>1633.76</text:p>
          </table:table-cell>
          <table:table-cell office:value-type="string" office:string-value="Low" table:formula="of:=IF([.E900]&gt;[.$E$1003];&quot;High&quot;;&quot;Low&quot;)" table:style-name="ce1">
            <text:p>Lo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lectronics</text:p>
          </table:table-cell>
          <table:table-cell office:value-type="float" office:value="4920.46" table:style-name="ce1">
            <text:p>4920.46</text:p>
          </table:table-cell>
          <table:table-cell office:value-type="float" office:value="5079.68" table:style-name="ce1">
            <text:p>5079.68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1-02T00:00:00" table:style-name="ce2">
            <text:p>02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919.09" table:style-name="ce1">
            <text:p>919.09</text:p>
          </table:table-cell>
          <table:table-cell office:value-type="string" office:string-value="Low" table:formula="of:=IF([.E901]&gt;[.$E$1003];&quot;High&quot;;&quot;Low&quot;)" table:style-name="ce1">
            <text:p>Low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lectronics</text:p>
          </table:table-cell>
          <table:table-cell office:value-type="float" office:value="4535.38" table:style-name="ce1">
            <text:p>4535.38</text:p>
          </table:table-cell>
          <table:table-cell office:value-type="float" office:value="4557.5600000000004" table:style-name="ce1">
            <text:p>4557.56</text:p>
          </table:table-cell>
          <table:table-cell office:value-type="string" table:style-name="ce1">
            <text:p>New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8-13T00:00:00" table:style-name="ce2">
            <text:p>13/08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4896.93" table:style-name="ce1">
            <text:p>4896.93</text:p>
          </table:table-cell>
          <table:table-cell office:value-type="string" office:string-value="Low" table:formula="of:=IF([.E902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lothing</text:p>
          </table:table-cell>
          <table:table-cell office:value-type="float" office:value="324.45" table:style-name="ce1">
            <text:p>324.45</text:p>
          </table:table-cell>
          <table:table-cell office:value-type="float" office:value="336.37" table:style-name="ce1">
            <text:p>336.37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date" office:date-value="2023-10-16T00:00:00" table:style-name="ce2">
            <text:p>16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3093.95" table:style-name="ce1">
            <text:p>3093.95</text:p>
          </table:table-cell>
          <table:table-cell office:value-type="string" office:string-value="Low" table:formula="of:=IF([.E903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lothing</text:p>
          </table:table-cell>
          <table:table-cell office:value-type="float" office:value="4173.5200000000004" table:style-name="ce1">
            <text:p>4173.52</text:p>
          </table:table-cell>
          <table:table-cell office:value-type="float" office:value="4294.8500000000004" table:style-name="ce1">
            <text:p>4294.85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date" office:date-value="2023-08-21T00:00:00" table:style-name="ce2">
            <text:p>21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5677.74" table:style-name="ce1">
            <text:p>5677.74</text:p>
          </table:table-cell>
          <table:table-cell office:value-type="string" office:string-value="High" table:formula="of:=IF([.E904]&gt;[.$E$1003];&quot;High&quot;;&quot;Low&quot;)" table:style-name="ce1">
            <text:p>Hig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lectronics</text:p>
          </table:table-cell>
          <table:table-cell office:value-type="float" office:value="2316.13" table:style-name="ce1">
            <text:p>2316.13</text:p>
          </table:table-cell>
          <table:table-cell office:value-type="float" office:value="2525.27" table:style-name="ce1">
            <text:p>2525.27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date" office:date-value="2023-03-18T00:00:00" table:style-name="ce2">
            <text:p>18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South</text:p>
          </table:table-cell>
          <table:table-cell office:value-type="float" office:value="8057.67" table:style-name="ce1">
            <text:p>8057.67</text:p>
          </table:table-cell>
          <table:table-cell office:value-type="string" office:string-value="High" table:formula="of:=IF([.E905]&gt;[.$E$1003];&quot;High&quot;;&quot;Low&quot;)" table:style-name="ce1">
            <text:p>High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1331.86" table:style-name="ce1">
            <text:p>1331.86</text:p>
          </table:table-cell>
          <table:table-cell office:value-type="float" office:value="1758.98" table:style-name="ce1">
            <text:p>1758.98</text:p>
          </table:table-cell>
          <table:table-cell office:value-type="string" table:style-name="ce1">
            <text:p>Returning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Eve</text:p>
          </table:table-cell>
          <table:table-cell table:number-columns-repeated="1636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date" office:date-value="2023-04-26T00:00:00" table:style-name="ce2">
            <text:p>26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1457.77" table:style-name="ce1">
            <text:p>1457.77</text:p>
          </table:table-cell>
          <table:table-cell office:value-type="string" office:string-value="Low" table:formula="of:=IF([.E906]&gt;[.$E$1003];&quot;High&quot;;&quot;Low&quot;)" table:style-name="ce1">
            <text:p>Low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lectronics</text:p>
          </table:table-cell>
          <table:table-cell office:value-type="float" office:value="4399.8" table:style-name="ce1">
            <text:p>4399.8</text:p>
          </table:table-cell>
          <table:table-cell office:value-type="float" office:value="4801.0600000000004" table:style-name="ce1">
            <text:p>4801.06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date" office:date-value="2023-06-03T00:00:00" table:style-name="ce2">
            <text:p>03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5848.92" table:style-name="ce1">
            <text:p>5848.92</text:p>
          </table:table-cell>
          <table:table-cell office:value-type="string" office:string-value="High" table:formula="of:=IF([.E907]&gt;[.$E$1003];&quot;High&quot;;&quot;Low&quot;)" table:style-name="ce1">
            <text:p>High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lothing</text:p>
          </table:table-cell>
          <table:table-cell office:value-type="float" office:value="1023.5" table:style-name="ce1">
            <text:p>1023.5</text:p>
          </table:table-cell>
          <table:table-cell office:value-type="float" office:value="1164.4100000000001" table:style-name="ce1">
            <text:p>1164.41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04-13T00:00:00" table:style-name="ce2">
            <text:p>13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5104.54" table:style-name="ce1">
            <text:p>5104.54</text:p>
          </table:table-cell>
          <table:table-cell office:value-type="string" office:string-value="High" table:formula="of:=IF([.E908]&gt;[.$E$1003];&quot;High&quot;;&quot;Low&quot;)" table:style-name="ce1">
            <text:p>High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urniture</text:p>
          </table:table-cell>
          <table:table-cell office:value-type="float" office:value="4739.13" table:style-name="ce1">
            <text:p>4739.13</text:p>
          </table:table-cell>
          <table:table-cell office:value-type="float" office:value="4868.95" table:style-name="ce1">
            <text:p>4868.95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07-13T00:00:00" table:style-name="ce2">
            <text:p>13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1526.38" table:style-name="ce1">
            <text:p>1526.38</text:p>
          </table:table-cell>
          <table:table-cell office:value-type="string" office:string-value="Low" table:formula="of:=IF([.E909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1067.83" table:style-name="ce1">
            <text:p>1067.83</text:p>
          </table:table-cell>
          <table:table-cell office:value-type="float" office:value="1189.22" table:style-name="ce1">
            <text:p>1189.22</text:p>
          </table:table-cell>
          <table:table-cell office:value-type="string" table:style-name="ce1">
            <text:p>Returning</text:p>
          </table:table-cell>
          <table:table-cell office:value-type="float" office:value="0.26" table:style-name="ce1">
            <text:p>0.2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3-06-15T00:00:00" table:style-name="ce2">
            <text:p>15/06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6277.59" table:style-name="ce1">
            <text:p>6277.59</text:p>
          </table:table-cell>
          <table:table-cell office:value-type="string" office:string-value="High" table:formula="of:=IF([.E910]&gt;[.$E$1003];&quot;High&quot;;&quot;Low&quot;)" table:style-name="ce1">
            <text:p>Hig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urniture</text:p>
          </table:table-cell>
          <table:table-cell office:value-type="float" office:value="3087.73" table:style-name="ce1">
            <text:p>3087.73</text:p>
          </table:table-cell>
          <table:table-cell office:value-type="float" office:value="3263.96" table:style-name="ce1">
            <text:p>3263.96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date" office:date-value="2023-12-25T00:00:00" table:style-name="ce2">
            <text:p>25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2809.04" table:style-name="ce1">
            <text:p>2809.04</text:p>
          </table:table-cell>
          <table:table-cell office:value-type="string" office:string-value="Low" table:formula="of:=IF([.E911]&gt;[.$E$1003];&quot;High&quot;;&quot;Low&quot;)" table:style-name="ce1">
            <text:p>Lo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lothing</text:p>
          </table:table-cell>
          <table:table-cell office:value-type="float" office:value="1154.28" table:style-name="ce1">
            <text:p>1154.28</text:p>
          </table:table-cell>
          <table:table-cell office:value-type="float" office:value="1408.4" table:style-name="ce1">
            <text:p>1408.4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03-31T00:00:00" table:style-name="ce2">
            <text:p>31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929.5600000000004" table:style-name="ce1">
            <text:p>4929.56</text:p>
          </table:table-cell>
          <table:table-cell office:value-type="string" office:string-value="Low" table:formula="of:=IF([.E912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urniture</text:p>
          </table:table-cell>
          <table:table-cell office:value-type="float" office:value="2751.06" table:style-name="ce1">
            <text:p>2751.06</text:p>
          </table:table-cell>
          <table:table-cell office:value-type="float" office:value="2976.0099999999902" table:style-name="ce1">
            <text:p>2976.01</text:p>
          </table:table-cell>
          <table:table-cell office:value-type="string" table:style-name="ce1">
            <text:p>Returning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6-23T00:00:00" table:style-name="ce2">
            <text:p>23/06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914.5" table:style-name="ce1">
            <text:p>914.5</text:p>
          </table:table-cell>
          <table:table-cell office:value-type="string" office:string-value="Low" table:formula="of:=IF([.E913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urniture</text:p>
          </table:table-cell>
          <table:table-cell office:value-type="float" office:value="3435.68" table:style-name="ce1">
            <text:p>3435.68</text:p>
          </table:table-cell>
          <table:table-cell office:value-type="float" office:value="3552.6299999999901" table:style-name="ce1">
            <text:p>3552.63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date" office:date-value="2023-05-02T00:00:00" table:style-name="ce2">
            <text:p>02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4649.88" table:style-name="ce1">
            <text:p>4649.88</text:p>
          </table:table-cell>
          <table:table-cell office:value-type="string" office:string-value="Low" table:formula="of:=IF([.E914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urniture</text:p>
          </table:table-cell>
          <table:table-cell office:value-type="float" office:value="991.63" table:style-name="ce1">
            <text:p>991.63</text:p>
          </table:table-cell>
          <table:table-cell office:value-type="float" office:value="1065.55" table:style-name="ce1">
            <text:p>1065.55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5-23T00:00:00" table:style-name="ce2">
            <text:p>23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3133.99" table:style-name="ce1">
            <text:p>3133.99</text:p>
          </table:table-cell>
          <table:table-cell office:value-type="string" office:string-value="Low" table:formula="of:=IF([.E915]&gt;[.$E$1003];&quot;High&quot;;&quot;Low&quot;)" table:style-name="ce1">
            <text:p>Low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urniture</text:p>
          </table:table-cell>
          <table:table-cell office:value-type="float" office:value="2628.38" table:style-name="ce1">
            <text:p>2628.38</text:p>
          </table:table-cell>
          <table:table-cell office:value-type="float" office:value="2644.54" table:style-name="ce1">
            <text:p>2644.54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4-16T00:00:00" table:style-name="ce2">
            <text:p>16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8241.57" table:style-name="ce1">
            <text:p>8241.57</text:p>
          </table:table-cell>
          <table:table-cell office:value-type="string" office:string-value="High" table:formula="of:=IF([.E916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ood</text:p>
          </table:table-cell>
          <table:table-cell office:value-type="float" office:value="2371.85" table:style-name="ce1">
            <text:p>2371.85</text:p>
          </table:table-cell>
          <table:table-cell office:value-type="float" office:value="2457.29" table:style-name="ce1">
            <text:p>2457.29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664.09" table:style-name="ce1">
            <text:p>664.09</text:p>
          </table:table-cell>
          <table:table-cell office:value-type="string" office:string-value="Low" table:formula="of:=IF([.E917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lothing</text:p>
          </table:table-cell>
          <table:table-cell office:value-type="float" office:value="401.64" table:style-name="ce1">
            <text:p>401.64</text:p>
          </table:table-cell>
          <table:table-cell office:value-type="float" office:value="757.26" table:style-name="ce1">
            <text:p>757.26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4244.21" table:style-name="ce1">
            <text:p>4244.21</text:p>
          </table:table-cell>
          <table:table-cell office:value-type="string" office:string-value="Low" table:formula="of:=IF([.E918]&gt;[.$E$1003];&quot;High&quot;;&quot;Low&quot;)" table:style-name="ce1">
            <text:p>Lo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othing</text:p>
          </table:table-cell>
          <table:table-cell office:value-type="float" office:value="4100.62" table:style-name="ce1">
            <text:p>4100.62</text:p>
          </table:table-cell>
          <table:table-cell office:value-type="float" office:value="4230" table:style-name="ce1">
            <text:p>4230</text:p>
          </table:table-cell>
          <table:table-cell office:value-type="string" table:style-name="ce1">
            <text:p>New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date" office:date-value="2023-11-13T00:00:00" table:style-name="ce2">
            <text:p>13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4638.47" table:style-name="ce1">
            <text:p>4638.47</text:p>
          </table:table-cell>
          <table:table-cell office:value-type="string" office:string-value="Low" table:formula="of:=IF([.E919]&gt;[.$E$1003];&quot;High&quot;;&quot;Low&quot;)" table:style-name="ce1">
            <text:p>Low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ood</text:p>
          </table:table-cell>
          <table:table-cell office:value-type="float" office:value="1711.63" table:style-name="ce1">
            <text:p>1711.63</text:p>
          </table:table-cell>
          <table:table-cell office:value-type="float" office:value="1951.24" table:style-name="ce1">
            <text:p>1951.24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05-03T00:00:00" table:style-name="ce2">
            <text:p>03/05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South</text:p>
          </table:table-cell>
          <table:table-cell office:value-type="float" office:value="7277.56" table:style-name="ce1">
            <text:p>7277.56</text:p>
          </table:table-cell>
          <table:table-cell office:value-type="string" office:string-value="High" table:formula="of:=IF([.E920]&gt;[.$E$1003];&quot;High&quot;;&quot;Low&quot;)" table:style-name="ce1">
            <text:p>High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urniture</text:p>
          </table:table-cell>
          <table:table-cell office:value-type="float" office:value="2894.18" table:style-name="ce1">
            <text:p>2894.18</text:p>
          </table:table-cell>
          <table:table-cell office:value-type="float" office:value="3193.92" table:style-name="ce1">
            <text:p>3193.92</text:p>
          </table:table-cell>
          <table:table-cell office:value-type="string" table:style-name="ce1">
            <text:p>New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Bob</text:p>
          </table:table-cell>
          <table:table-cell table:number-columns-repeated="1636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date" office:date-value="2023-01-09T00:00:00" table:style-name="ce2">
            <text:p>09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5785.45" table:style-name="ce1">
            <text:p>5785.45</text:p>
          </table:table-cell>
          <table:table-cell office:value-type="string" office:string-value="High" table:formula="of:=IF([.E921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urniture</text:p>
          </table:table-cell>
          <table:table-cell office:value-type="float" office:value="2598.1799999999998" table:style-name="ce1">
            <text:p>2598.18</text:p>
          </table:table-cell>
          <table:table-cell office:value-type="float" office:value="3042.73" table:style-name="ce1">
            <text:p>3042.73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6705.4" table:style-name="ce1">
            <text:p>6705.4</text:p>
          </table:table-cell>
          <table:table-cell office:value-type="string" office:string-value="High" table:formula="of:=IF([.E922]&gt;[.$E$1003];&quot;High&quot;;&quot;Low&quot;)" table:style-name="ce1">
            <text:p>High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lothing</text:p>
          </table:table-cell>
          <table:table-cell office:value-type="float" office:value="2590.64" table:style-name="ce1">
            <text:p>2590.64</text:p>
          </table:table-cell>
          <table:table-cell office:value-type="float" office:value="3036.18" table:style-name="ce1">
            <text:p>3036.18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03-14T00:00:00" table:style-name="ce2">
            <text:p>14/03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7792.79" table:style-name="ce1">
            <text:p>7792.79</text:p>
          </table:table-cell>
          <table:table-cell office:value-type="string" office:string-value="High" table:formula="of:=IF([.E923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ood</text:p>
          </table:table-cell>
          <table:table-cell office:value-type="float" office:value="580.75" table:style-name="ce1">
            <text:p>580.75</text:p>
          </table:table-cell>
          <table:table-cell office:value-type="float" office:value="956.16" table:style-name="ce1">
            <text:p>956.16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12-25T00:00:00" table:style-name="ce2">
            <text:p>25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8635.81" table:style-name="ce1">
            <text:p>8635.81</text:p>
          </table:table-cell>
          <table:table-cell office:value-type="string" office:string-value="High" table:formula="of:=IF([.E924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urniture</text:p>
          </table:table-cell>
          <table:table-cell office:value-type="float" office:value="2146.2399999999998" table:style-name="ce1">
            <text:p>2146.24</text:p>
          </table:table-cell>
          <table:table-cell office:value-type="float" office:value="2173.4699999999998" table:style-name="ce1">
            <text:p>2173.47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date" office:date-value="2023-08-11T00:00:00" table:style-name="ce2">
            <text:p>11/08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3207.37" table:style-name="ce1">
            <text:p>3207.37</text:p>
          </table:table-cell>
          <table:table-cell office:value-type="string" office:string-value="Low" table:formula="of:=IF([.E925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2289.2199999999998" table:style-name="ce1">
            <text:p>2289.22</text:p>
          </table:table-cell>
          <table:table-cell office:value-type="float" office:value="2581" table:style-name="ce1">
            <text:p>2581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date" office:date-value="2023-02-10T00:00:00" table:style-name="ce2">
            <text:p>10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5426.42" table:style-name="ce1">
            <text:p>5426.42</text:p>
          </table:table-cell>
          <table:table-cell office:value-type="string" office:string-value="High" table:formula="of:=IF([.E926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3681.53" table:style-name="ce1">
            <text:p>3681.53</text:p>
          </table:table-cell>
          <table:table-cell office:value-type="float" office:value="4076.96" table:style-name="ce1">
            <text:p>4076.96</text:p>
          </table:table-cell>
          <table:table-cell office:value-type="string" table:style-name="ce1">
            <text:p>Returning</text:p>
          </table:table-cell>
          <table:table-cell office:value-type="float" office:value="0.17" table:style-name="ce1">
            <text:p>0.1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date" office:date-value="2023-07-23T00:00:00" table:style-name="ce2">
            <text:p>23/07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8417.07" table:style-name="ce1">
            <text:p>8417.07</text:p>
          </table:table-cell>
          <table:table-cell office:value-type="string" office:string-value="High" table:formula="of:=IF([.E927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lectronics</text:p>
          </table:table-cell>
          <table:table-cell office:value-type="float" office:value="4208.09" table:style-name="ce1">
            <text:p>4208.09</text:p>
          </table:table-cell>
          <table:table-cell office:value-type="float" office:value="4226.5600000000004" table:style-name="ce1">
            <text:p>4226.56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9895.57" table:style-name="ce1">
            <text:p>9895.57</text:p>
          </table:table-cell>
          <table:table-cell office:value-type="string" office:string-value="High" table:formula="of:=IF([.E928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ood</text:p>
          </table:table-cell>
          <table:table-cell office:value-type="float" office:value="2747.66" table:style-name="ce1">
            <text:p>2747.66</text:p>
          </table:table-cell>
          <table:table-cell office:value-type="float" office:value="3027.0099999999902" table:style-name="ce1">
            <text:p>3027.01</text:p>
          </table:table-cell>
          <table:table-cell office:value-type="string" table:style-name="ce1">
            <text:p>New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date" office:date-value="2023-11-24T00:00:00" table:style-name="ce2">
            <text:p>24/1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8906.24" table:style-name="ce1">
            <text:p>8906.24</text:p>
          </table:table-cell>
          <table:table-cell office:value-type="string" office:string-value="High" table:formula="of:=IF([.E929]&gt;[.$E$1003];&quot;High&quot;;&quot;Low&quot;)" table:style-name="ce1">
            <text:p>High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urniture</text:p>
          </table:table-cell>
          <table:table-cell office:value-type="float" office:value="479.58" table:style-name="ce1">
            <text:p>479.58</text:p>
          </table:table-cell>
          <table:table-cell office:value-type="float" office:value="909.88" table:style-name="ce1">
            <text:p>909.88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date" office:date-value="2023-06-27T00:00:00" table:style-name="ce2">
            <text:p>27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3777.53" table:style-name="ce1">
            <text:p>3777.53</text:p>
          </table:table-cell>
          <table:table-cell office:value-type="string" office:string-value="Low" table:formula="of:=IF([.E930]&gt;[.$E$1003];&quot;High&quot;;&quot;Low&quot;)" table:style-name="ce1">
            <text:p>Lo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lectronics</text:p>
          </table:table-cell>
          <table:table-cell office:value-type="float" office:value="1222.4000000000001" table:style-name="ce1">
            <text:p>1222.4</text:p>
          </table:table-cell>
          <table:table-cell office:value-type="float" office:value="1464.71" table:style-name="ce1">
            <text:p>1464.71</text:p>
          </table:table-cell>
          <table:table-cell office:value-type="string" table:style-name="ce1">
            <text:p>New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date" office:date-value="2023-12-14T00:00:00" table:style-name="ce2">
            <text:p>14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2032.15" table:style-name="ce1">
            <text:p>2032.15</text:p>
          </table:table-cell>
          <table:table-cell office:value-type="string" office:string-value="Low" table:formula="of:=IF([.E931]&gt;[.$E$1003];&quot;High&quot;;&quot;Low&quot;)" table:style-name="ce1">
            <text:p>Low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ood</text:p>
          </table:table-cell>
          <table:table-cell office:value-type="float" office:value="866.42" table:style-name="ce1">
            <text:p>866.42</text:p>
          </table:table-cell>
          <table:table-cell office:value-type="float" office:value="878.43" table:style-name="ce1">
            <text:p>878.43</text:p>
          </table:table-cell>
          <table:table-cell office:value-type="string" table:style-name="ce1">
            <text:p>New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4944.99" table:style-name="ce1">
            <text:p>4944.99</text:p>
          </table:table-cell>
          <table:table-cell office:value-type="string" office:string-value="Low" table:formula="of:=IF([.E932]&gt;[.$E$1003];&quot;High&quot;;&quot;Low&quot;)" table:style-name="ce1">
            <text:p>Low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urniture</text:p>
          </table:table-cell>
          <table:table-cell office:value-type="float" office:value="666.84" table:style-name="ce1">
            <text:p>666.84</text:p>
          </table:table-cell>
          <table:table-cell office:value-type="float" office:value="682.24" table:style-name="ce1">
            <text:p>682.24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3-03-25T00:00:00" table:style-name="ce2">
            <text:p>25/03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7442.25" table:style-name="ce1">
            <text:p>7442.25</text:p>
          </table:table-cell>
          <table:table-cell office:value-type="string" office:string-value="High" table:formula="of:=IF([.E933]&gt;[.$E$1003];&quot;High&quot;;&quot;Low&quot;)" table:style-name="ce1">
            <text:p>High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lothing</text:p>
          </table:table-cell>
          <table:table-cell office:value-type="float" office:value="1861.2" table:style-name="ce1">
            <text:p>1861.2</text:p>
          </table:table-cell>
          <table:table-cell office:value-type="float" office:value="2075.35" table:style-name="ce1">
            <text:p>2075.35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4976.43" table:style-name="ce1">
            <text:p>4976.43</text:p>
          </table:table-cell>
          <table:table-cell office:value-type="string" office:string-value="Low" table:formula="of:=IF([.E934]&gt;[.$E$1003];&quot;High&quot;;&quot;Low&quot;)" table:style-name="ce1">
            <text:p>Low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lectronics</text:p>
          </table:table-cell>
          <table:table-cell office:value-type="float" office:value="1185.5" table:style-name="ce1">
            <text:p>1185.5</text:p>
          </table:table-cell>
          <table:table-cell office:value-type="float" office:value="1271.45" table:style-name="ce1">
            <text:p>1271.45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4-21T00:00:00" table:style-name="ce2">
            <text:p>21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4883.49" table:style-name="ce1">
            <text:p>4883.49</text:p>
          </table:table-cell>
          <table:table-cell office:value-type="string" office:string-value="Low" table:formula="of:=IF([.E935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lectronics</text:p>
          </table:table-cell>
          <table:table-cell office:value-type="float" office:value="1130.5999999999999" table:style-name="ce1">
            <text:p>1130.6</text:p>
          </table:table-cell>
          <table:table-cell office:value-type="float" office:value="1466.1799999999901" table:style-name="ce1">
            <text:p>1466.18</text:p>
          </table:table-cell>
          <table:table-cell office:value-type="string" table:style-name="ce1">
            <text:p>Returning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date" office:date-value="2023-09-08T00:00:00" table:style-name="ce2">
            <text:p>08/09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8398.48" table:style-name="ce1">
            <text:p>8398.48</text:p>
          </table:table-cell>
          <table:table-cell office:value-type="string" office:string-value="High" table:formula="of:=IF([.E936]&gt;[.$E$1003];&quot;High&quot;;&quot;Low&quot;)" table:style-name="ce1">
            <text:p>High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urniture</text:p>
          </table:table-cell>
          <table:table-cell office:value-type="float" office:value="320.73" table:style-name="ce1">
            <text:p>320.73</text:p>
          </table:table-cell>
          <table:table-cell office:value-type="float" office:value="678.04" table:style-name="ce1">
            <text:p>678.04</text:p>
          </table:table-cell>
          <table:table-cell office:value-type="string" table:style-name="ce1">
            <text:p>Returning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date" office:date-value="2023-01-07T00:00:00" table:style-name="ce2">
            <text:p>07/0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3677.9" table:style-name="ce1">
            <text:p>3677.9</text:p>
          </table:table-cell>
          <table:table-cell office:value-type="string" office:string-value="Low" table:formula="of:=IF([.E937]&gt;[.$E$1003];&quot;High&quot;;&quot;Low&quot;)" table:style-name="ce1">
            <text:p>Low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urniture</text:p>
          </table:table-cell>
          <table:table-cell office:value-type="float" office:value="137.47" table:style-name="ce1">
            <text:p>137.47</text:p>
          </table:table-cell>
          <table:table-cell office:value-type="float" office:value="234.63" table:style-name="ce1">
            <text:p>234.63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date" office:date-value="2023-03-25T00:00:00" table:style-name="ce2">
            <text:p>25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8611.9699999999993" table:style-name="ce1">
            <text:p>8611.97</text:p>
          </table:table-cell>
          <table:table-cell office:value-type="string" office:string-value="High" table:formula="of:=IF([.E938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ctronics</text:p>
          </table:table-cell>
          <table:table-cell office:value-type="float" office:value="558.70000000000005" table:style-name="ce1">
            <text:p>558.7</text:p>
          </table:table-cell>
          <table:table-cell office:value-type="float" office:value="1004.08" table:style-name="ce1">
            <text:p>1004.08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date" office:date-value="2023-07-27T00:00:00" table:style-name="ce2">
            <text:p>27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4127.37" table:style-name="ce1">
            <text:p>4127.37</text:p>
          </table:table-cell>
          <table:table-cell office:value-type="string" office:string-value="Low" table:formula="of:=IF([.E939]&gt;[.$E$1003];&quot;High&quot;;&quot;Low&quot;)" table:style-name="ce1">
            <text:p>Lo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othing</text:p>
          </table:table-cell>
          <table:table-cell office:value-type="float" office:value="902.38" table:style-name="ce1">
            <text:p>902.38</text:p>
          </table:table-cell>
          <table:table-cell office:value-type="float" office:value="1128.9100000000001" table:style-name="ce1">
            <text:p>1128.91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11-10T00:00:00" table:style-name="ce2">
            <text:p>10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3349.51" table:style-name="ce1">
            <text:p>3349.51</text:p>
          </table:table-cell>
          <table:table-cell office:value-type="string" office:string-value="Low" table:formula="of:=IF([.E940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thing</text:p>
          </table:table-cell>
          <table:table-cell office:value-type="float" office:value="2183.37" table:style-name="ce1">
            <text:p>2183.37</text:p>
          </table:table-cell>
          <table:table-cell office:value-type="float" office:value="2263.3599999999901" table:style-name="ce1">
            <text:p>2263.36</text:p>
          </table:table-cell>
          <table:table-cell office:value-type="string" table:style-name="ce1">
            <text:p>Retur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date" office:date-value="2023-01-22T00:00:00" table:style-name="ce2">
            <text:p>22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4594.5" table:style-name="ce1">
            <text:p>4594.5</text:p>
          </table:table-cell>
          <table:table-cell office:value-type="string" office:string-value="Low" table:formula="of:=IF([.E941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ood</text:p>
          </table:table-cell>
          <table:table-cell office:value-type="float" office:value="2577.08" table:style-name="ce1">
            <text:p>2577.08</text:p>
          </table:table-cell>
          <table:table-cell office:value-type="float" office:value="2961.56" table:style-name="ce1">
            <text:p>2961.56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date" office:date-value="2023-01-03T00:00:00" table:style-name="ce2">
            <text:p>03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7648.22" table:style-name="ce1">
            <text:p>7648.22</text:p>
          </table:table-cell>
          <table:table-cell office:value-type="string" office:string-value="High" table:formula="of:=IF([.E942]&gt;[.$E$1003];&quot;High&quot;;&quot;Low&quot;)" table:style-name="ce1">
            <text:p>High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urniture</text:p>
          </table:table-cell>
          <table:table-cell office:value-type="float" office:value="745.93" table:style-name="ce1">
            <text:p>745.93</text:p>
          </table:table-cell>
          <table:table-cell office:value-type="float" office:value="1143.02" table:style-name="ce1">
            <text:p>1143.02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date" office:date-value="2023-05-07T00:00:00" table:style-name="ce2">
            <text:p>07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1347.42" table:style-name="ce1">
            <text:p>1347.42</text:p>
          </table:table-cell>
          <table:table-cell office:value-type="string" office:string-value="Low" table:formula="of:=IF([.E943]&gt;[.$E$1003];&quot;High&quot;;&quot;Low&quot;)" table:style-name="ce1">
            <text:p>Low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lothing</text:p>
          </table:table-cell>
          <table:table-cell office:value-type="float" office:value="2152.6799999999998" table:style-name="ce1">
            <text:p>2152.68</text:p>
          </table:table-cell>
          <table:table-cell office:value-type="float" office:value="2475.9299999999998" table:style-name="ce1">
            <text:p>2475.93</text:p>
          </table:table-cell>
          <table:table-cell office:value-type="string" table:style-name="ce1">
            <text:p>Returning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date" office:date-value="2023-10-24T00:00:00" table:style-name="ce2">
            <text:p>24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2044.55" table:style-name="ce1">
            <text:p>2044.55</text:p>
          </table:table-cell>
          <table:table-cell office:value-type="string" office:string-value="Low" table:formula="of:=IF([.E944]&gt;[.$E$1003];&quot;High&quot;;&quot;Low&quot;)" table:style-name="ce1">
            <text:p>Low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ood</text:p>
          </table:table-cell>
          <table:table-cell office:value-type="float" office:value="1741.66" table:style-name="ce1">
            <text:p>1741.66</text:p>
          </table:table-cell>
          <table:table-cell office:value-type="float" office:value="2169.86" table:style-name="ce1">
            <text:p>2169.86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7-07T00:00:00" table:style-name="ce2">
            <text:p>07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9519.2999999999993" table:style-name="ce1">
            <text:p>9519.3</text:p>
          </table:table-cell>
          <table:table-cell office:value-type="string" office:string-value="High" table:formula="of:=IF([.E945]&gt;[.$E$1003];&quot;High&quot;;&quot;Low&quot;)" table:style-name="ce1">
            <text:p>Hig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othing</text:p>
          </table:table-cell>
          <table:table-cell office:value-type="float" office:value="957.95" table:style-name="ce1">
            <text:p>957.95</text:p>
          </table:table-cell>
          <table:table-cell office:value-type="float" office:value="1329.26" table:style-name="ce1">
            <text:p>1329.26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12-28T00:00:00" table:style-name="ce2">
            <text:p>28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1837.37" table:style-name="ce1">
            <text:p>1837.37</text:p>
          </table:table-cell>
          <table:table-cell office:value-type="string" office:string-value="Low" table:formula="of:=IF([.E946]&gt;[.$E$1003];&quot;High&quot;;&quot;Low&quot;)" table:style-name="ce1">
            <text:p>L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rniture</text:p>
          </table:table-cell>
          <table:table-cell office:value-type="float" office:value="83.86" table:style-name="ce1">
            <text:p>83.86</text:p>
          </table:table-cell>
          <table:table-cell office:value-type="float" office:value="526.14" table:style-name="ce1">
            <text:p>526.14</text:p>
          </table:table-cell>
          <table:table-cell office:value-type="string" table:style-name="ce1">
            <text:p>Returning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date" office:date-value="2023-01-14T00:00:00" table:style-name="ce2">
            <text:p>14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5720.5" table:style-name="ce1">
            <text:p>5720.5</text:p>
          </table:table-cell>
          <table:table-cell office:value-type="string" office:string-value="High" table:formula="of:=IF([.E947]&gt;[.$E$1003];&quot;High&quot;;&quot;Low&quot;)" table:style-name="ce1">
            <text:p>Hig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ood</text:p>
          </table:table-cell>
          <table:table-cell office:value-type="float" office:value="2361.7399999999998" table:style-name="ce1">
            <text:p>2361.74</text:p>
          </table:table-cell>
          <table:table-cell office:value-type="float" office:value="2584.35" table:style-name="ce1">
            <text:p>2584.35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date" office:date-value="2023-01-12T00:00:00" table:style-name="ce2">
            <text:p>12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5835.21" table:style-name="ce1">
            <text:p>5835.21</text:p>
          </table:table-cell>
          <table:table-cell office:value-type="string" office:string-value="High" table:formula="of:=IF([.E948]&gt;[.$E$1003];&quot;High&quot;;&quot;Low&quot;)" table:style-name="ce1">
            <text:p>High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ood</text:p>
          </table:table-cell>
          <table:table-cell office:value-type="float" office:value="3443.98" table:style-name="ce1">
            <text:p>3443.98</text:p>
          </table:table-cell>
          <table:table-cell office:value-type="float" office:value="3820.3" table:style-name="ce1">
            <text:p>3820.3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date" office:date-value="2023-03-28T00:00:00" table:style-name="ce2">
            <text:p>28/03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4947.28" table:style-name="ce1">
            <text:p>4947.28</text:p>
          </table:table-cell>
          <table:table-cell office:value-type="string" office:string-value="Low" table:formula="of:=IF([.E949]&gt;[.$E$1003];&quot;High&quot;;&quot;Low&quot;)" table:style-name="ce1">
            <text:p>Low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ood</text:p>
          </table:table-cell>
          <table:table-cell office:value-type="float" office:value="1170.07" table:style-name="ce1">
            <text:p>1170.07</text:p>
          </table:table-cell>
          <table:table-cell office:value-type="float" office:value="1669.94999999999" table:style-name="ce1">
            <text:p>1669.95</text:p>
          </table:table-cell>
          <table:table-cell office:value-type="string" table:style-name="ce1">
            <text:p>Returning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date" office:date-value="2023-01-12T00:00:00" table:style-name="ce2">
            <text:p>12/01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6482.98" table:style-name="ce1">
            <text:p>6482.98</text:p>
          </table:table-cell>
          <table:table-cell office:value-type="string" office:string-value="High" table:formula="of:=IF([.E950]&gt;[.$E$1003];&quot;High&quot;;&quot;Low&quot;)" table:style-name="ce1">
            <text:p>High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lothing</text:p>
          </table:table-cell>
          <table:table-cell office:value-type="float" office:value="702.44" table:style-name="ce1">
            <text:p>702.44</text:p>
          </table:table-cell>
          <table:table-cell office:value-type="float" office:value="1067.6600000000001" table:style-name="ce1">
            <text:p>1067.66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date" office:date-value="2023-01-25T00:00:00" table:style-name="ce2">
            <text:p>25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2375.2800000000002" table:style-name="ce1">
            <text:p>2375.28</text:p>
          </table:table-cell>
          <table:table-cell office:value-type="string" office:string-value="Low" table:formula="of:=IF([.E951]&gt;[.$E$1003];&quot;High&quot;;&quot;Low&quot;)" table:style-name="ce1">
            <text:p>Low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urniture</text:p>
          </table:table-cell>
          <table:table-cell office:value-type="float" office:value="4440.8599999999997" table:style-name="ce1">
            <text:p>4440.86</text:p>
          </table:table-cell>
          <table:table-cell office:value-type="float" office:value="4506.8099999999904" table:style-name="ce1">
            <text:p>4506.81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date" office:date-value="2023-10-28T00:00:00" table:style-name="ce2">
            <text:p>28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5571.36" table:style-name="ce1">
            <text:p>5571.36</text:p>
          </table:table-cell>
          <table:table-cell office:value-type="string" office:string-value="High" table:formula="of:=IF([.E952]&gt;[.$E$1003];&quot;High&quot;;&quot;Low&quot;)" table:style-name="ce1">
            <text:p>Hig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ood</text:p>
          </table:table-cell>
          <table:table-cell office:value-type="float" office:value="1411.37" table:style-name="ce1">
            <text:p>1411.37</text:p>
          </table:table-cell>
          <table:table-cell office:value-type="float" office:value="1675.35" table:style-name="ce1">
            <text:p>1675.35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date" office:date-value="2023-08-31T00:00:00" table:style-name="ce2">
            <text:p>31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3784.52" table:style-name="ce1">
            <text:p>3784.52</text:p>
          </table:table-cell>
          <table:table-cell office:value-type="string" office:string-value="Low" table:formula="of:=IF([.E953]&gt;[.$E$1003];&quot;High&quot;;&quot;Low&quot;)" table:style-name="ce1">
            <text:p>Lo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nics</text:p>
          </table:table-cell>
          <table:table-cell office:value-type="float" office:value="1156.8800000000001" table:style-name="ce1">
            <text:p>1156.88</text:p>
          </table:table-cell>
          <table:table-cell office:value-type="float" office:value="1454.68" table:style-name="ce1">
            <text:p>1454.68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date" office:date-value="2023-05-02T00:00:00" table:style-name="ce2">
            <text:p>02/05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6650.51" table:style-name="ce1">
            <text:p>6650.51</text:p>
          </table:table-cell>
          <table:table-cell office:value-type="string" office:string-value="High" table:formula="of:=IF([.E954]&gt;[.$E$1003];&quot;High&quot;;&quot;Low&quot;)" table:style-name="ce1">
            <text:p>High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urniture</text:p>
          </table:table-cell>
          <table:table-cell office:value-type="float" office:value="4292.63" table:style-name="ce1">
            <text:p>4292.63</text:p>
          </table:table-cell>
          <table:table-cell office:value-type="float" office:value="4387.99" table:style-name="ce1">
            <text:p>4387.99</text:p>
          </table:table-cell>
          <table:table-cell office:value-type="string" table:style-name="ce1">
            <text:p>New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3-05-27T00:00:00" table:style-name="ce2">
            <text:p>27/05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1498.11" table:style-name="ce1">
            <text:p>1498.11</text:p>
          </table:table-cell>
          <table:table-cell office:value-type="string" office:string-value="Low" table:formula="of:=IF([.E955]&gt;[.$E$1003];&quot;High&quot;;&quot;Low&quot;)" table:style-name="ce1">
            <text:p>Lo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lectronics</text:p>
          </table:table-cell>
          <table:table-cell office:value-type="float" office:value="4094.68" table:style-name="ce1">
            <text:p>4094.68</text:p>
          </table:table-cell>
          <table:table-cell office:value-type="float" office:value="4576.5" table:style-name="ce1">
            <text:p>4576.5</text:p>
          </table:table-cell>
          <table:table-cell office:value-type="string" table:style-name="ce1">
            <text:p>New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date" office:date-value="2023-02-24T00:00:00" table:style-name="ce2">
            <text:p>24/02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5751.69" table:style-name="ce1">
            <text:p>5751.69</text:p>
          </table:table-cell>
          <table:table-cell office:value-type="string" office:string-value="High" table:formula="of:=IF([.E956]&gt;[.$E$1003];&quot;High&quot;;&quot;Low&quot;)" table:style-name="ce1">
            <text:p>Hig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ectronics</text:p>
          </table:table-cell>
          <table:table-cell office:value-type="float" office:value="2269.3200000000002" table:style-name="ce1">
            <text:p>2269.32</text:p>
          </table:table-cell>
          <table:table-cell office:value-type="float" office:value="2365.35" table:style-name="ce1">
            <text:p>2365.35</text:p>
          </table:table-cell>
          <table:table-cell office:value-type="string" table:style-name="ce1">
            <text:p>New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8-26T00:00:00" table:style-name="ce2">
            <text:p>26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1934.18" table:style-name="ce1">
            <text:p>1934.18</text:p>
          </table:table-cell>
          <table:table-cell office:value-type="string" office:string-value="Low" table:formula="of:=IF([.E957]&gt;[.$E$1003];&quot;High&quot;;&quot;Low&quot;)" table:style-name="ce1">
            <text:p>Low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ood</text:p>
          </table:table-cell>
          <table:table-cell office:value-type="float" office:value="2471.73" table:style-name="ce1">
            <text:p>2471.73</text:p>
          </table:table-cell>
          <table:table-cell office:value-type="float" office:value="2568.73" table:style-name="ce1">
            <text:p>2568.73</text:p>
          </table:table-cell>
          <table:table-cell office:value-type="string" table:style-name="ce1">
            <text:p>New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West</text:p>
          </table:table-cell>
          <table:table-cell office:value-type="float" office:value="2858.57" table:style-name="ce1">
            <text:p>2858.57</text:p>
          </table:table-cell>
          <table:table-cell office:value-type="string" office:string-value="Low" table:formula="of:=IF([.E958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ood</text:p>
          </table:table-cell>
          <table:table-cell office:value-type="float" office:value="1127.8599999999999" table:style-name="ce1">
            <text:p>1127.86</text:p>
          </table:table-cell>
          <table:table-cell office:value-type="float" office:value="1586.29" table:style-name="ce1">
            <text:p>1586.29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Charlie</text:p>
          </table:table-cell>
          <table:table-cell table:number-columns-repeated="1636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date" office:date-value="2023-06-22T00:00:00" table:style-name="ce2">
            <text:p>22/06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2265.23" table:style-name="ce1">
            <text:p>2265.23</text:p>
          </table:table-cell>
          <table:table-cell office:value-type="string" office:string-value="Low" table:formula="of:=IF([.E959]&gt;[.$E$1003];&quot;High&quot;;&quot;Low&quot;)" table:style-name="ce1">
            <text:p>Low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lothing</text:p>
          </table:table-cell>
          <table:table-cell office:value-type="float" office:value="437.59" table:style-name="ce1">
            <text:p>437.59</text:p>
          </table:table-cell>
          <table:table-cell office:value-type="float" office:value="675.54" table:style-name="ce1">
            <text:p>675.54</text:p>
          </table:table-cell>
          <table:table-cell office:value-type="string" table:style-name="ce1">
            <text:p>Returning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date" office:date-value="2023-08-09T00:00:00" table:style-name="ce2">
            <text:p>09/08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1910.09" table:style-name="ce1">
            <text:p>1910.09</text:p>
          </table:table-cell>
          <table:table-cell office:value-type="string" office:string-value="Low" table:formula="of:=IF([.E960]&gt;[.$E$1003];&quot;High&quot;;&quot;Low&quot;)" table:style-name="ce1">
            <text:p>Low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lothing</text:p>
          </table:table-cell>
          <table:table-cell office:value-type="float" office:value="2888.49" table:style-name="ce1">
            <text:p>2888.49</text:p>
          </table:table-cell>
          <table:table-cell office:value-type="float" office:value="2929.45" table:style-name="ce1">
            <text:p>2929.45</text:p>
          </table:table-cell>
          <table:table-cell office:value-type="string" table:style-name="ce1">
            <text:p>New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date" office:date-value="2023-04-29T00:00:00" table:style-name="ce2">
            <text:p>29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8274.5400000000009" table:style-name="ce1">
            <text:p>8274.54</text:p>
          </table:table-cell>
          <table:table-cell office:value-type="string" office:string-value="High" table:formula="of:=IF([.E961]&gt;[.$E$1003];&quot;High&quot;;&quot;Low&quot;)" table:style-name="ce1">
            <text:p>High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lothing</text:p>
          </table:table-cell>
          <table:table-cell office:value-type="float" office:value="536.80999999999995" table:style-name="ce1">
            <text:p>536.81</text:p>
          </table:table-cell>
          <table:table-cell office:value-type="float" office:value="839.92" table:style-name="ce1">
            <text:p>839.92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11-05T00:00:00" table:style-name="ce2">
            <text:p>05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2928.5" table:style-name="ce1">
            <text:p>2928.5</text:p>
          </table:table-cell>
          <table:table-cell office:value-type="string" office:string-value="Low" table:formula="of:=IF([.E962]&gt;[.$E$1003];&quot;High&quot;;&quot;Low&quot;)" table:style-name="ce1">
            <text:p>Lo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rniture</text:p>
          </table:table-cell>
          <table:table-cell office:value-type="float" office:value="2273.91" table:style-name="ce1">
            <text:p>2273.91</text:p>
          </table:table-cell>
          <table:table-cell office:value-type="float" office:value="2578.7999999999902" table:style-name="ce1">
            <text:p>2578.8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07-02T00:00:00" table:style-name="ce2">
            <text:p>02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9278.5300000000007" table:style-name="ce1">
            <text:p>9278.53</text:p>
          </table:table-cell>
          <table:table-cell office:value-type="string" office:string-value="High" table:formula="of:=IF([.E963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othing</text:p>
          </table:table-cell>
          <table:table-cell office:value-type="float" office:value="4705.46" table:style-name="ce1">
            <text:p>4705.46</text:p>
          </table:table-cell>
          <table:table-cell office:value-type="float" office:value="4747.07" table:style-name="ce1">
            <text:p>4747.07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10-15T00:00:00" table:style-name="ce2">
            <text:p>15/10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outh</text:p>
          </table:table-cell>
          <table:table-cell office:value-type="float" office:value="9702.27" table:style-name="ce1">
            <text:p>9702.27</text:p>
          </table:table-cell>
          <table:table-cell office:value-type="string" office:string-value="High" table:formula="of:=IF([.E964]&gt;[.$E$1003];&quot;High&quot;;&quot;Low&quot;)" table:style-name="ce1">
            <text:p>Hig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lectronics</text:p>
          </table:table-cell>
          <table:table-cell office:value-type="float" office:value="4766.53" table:style-name="ce1">
            <text:p>4766.53</text:p>
          </table:table-cell>
          <table:table-cell office:value-type="float" office:value="5253.07" table:style-name="ce1">
            <text:p>5253.07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Charlie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11-03T00:00:00" table:style-name="ce2">
            <text:p>03/11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5755.48" table:style-name="ce1">
            <text:p>5755.48</text:p>
          </table:table-cell>
          <table:table-cell office:value-type="string" office:string-value="High" table:formula="of:=IF([.E965]&gt;[.$E$1003];&quot;High&quot;;&quot;Low&quot;)" table:style-name="ce1">
            <text:p>High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lothing</text:p>
          </table:table-cell>
          <table:table-cell office:value-type="float" office:value="1234.69" table:style-name="ce1">
            <text:p>1234.69</text:p>
          </table:table-cell>
          <table:table-cell office:value-type="float" office:value="1511.26" table:style-name="ce1">
            <text:p>1511.26</text:p>
          </table:table-cell>
          <table:table-cell office:value-type="string" table:style-name="ce1">
            <text:p>New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date" office:date-value="2023-10-27T00:00:00" table:style-name="ce2">
            <text:p>27/10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1515.71" table:style-name="ce1">
            <text:p>1515.71</text:p>
          </table:table-cell>
          <table:table-cell office:value-type="string" office:string-value="Low" table:formula="of:=IF([.E966]&gt;[.$E$1003];&quot;High&quot;;&quot;Low&quot;)" table:style-name="ce1">
            <text:p>Low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ood</text:p>
          </table:table-cell>
          <table:table-cell office:value-type="float" office:value="3139.36" table:style-name="ce1">
            <text:p>3139.36</text:p>
          </table:table-cell>
          <table:table-cell office:value-type="float" office:value="3423.66" table:style-name="ce1">
            <text:p>3423.66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date" office:date-value="2023-03-23T00:00:00" table:style-name="ce2">
            <text:p>23/03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3808.03" table:style-name="ce1">
            <text:p>3808.03</text:p>
          </table:table-cell>
          <table:table-cell office:value-type="string" office:string-value="Low" table:formula="of:=IF([.E967]&gt;[.$E$1003];&quot;High&quot;;&quot;Low&quot;)" table:style-name="ce1">
            <text:p>Low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lothing</text:p>
          </table:table-cell>
          <table:table-cell office:value-type="float" office:value="2396.6799999999998" table:style-name="ce1">
            <text:p>2396.68</text:p>
          </table:table-cell>
          <table:table-cell office:value-type="float" office:value="2661.54" table:style-name="ce1">
            <text:p>2661.54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date" office:date-value="2023-07-30T00:00:00" table:style-name="ce2">
            <text:p>30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East</text:p>
          </table:table-cell>
          <table:table-cell office:value-type="float" office:value="7997.55" table:style-name="ce1">
            <text:p>7997.55</text:p>
          </table:table-cell>
          <table:table-cell office:value-type="string" office:string-value="High" table:formula="of:=IF([.E968]&gt;[.$E$1003];&quot;High&quot;;&quot;Low&quot;)" table:style-name="ce1">
            <text:p>Hig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rniture</text:p>
          </table:table-cell>
          <table:table-cell office:value-type="float" office:value="4384.6400000000003" table:style-name="ce1">
            <text:p>4384.64</text:p>
          </table:table-cell>
          <table:table-cell office:value-type="float" office:value="4693.8999999999996" table:style-name="ce1">
            <text:p>4693.9</text:p>
          </table:table-cell>
          <table:table-cell office:value-type="string" table:style-name="ce1">
            <text:p>New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Eve</text:p>
          </table:table-cell>
          <table:table-cell table:number-columns-repeated="1636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3-05-30T00:00:00" table:style-name="ce2">
            <text:p>30/05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3737.17" table:style-name="ce1">
            <text:p>3737.17</text:p>
          </table:table-cell>
          <table:table-cell office:value-type="string" office:string-value="Low" table:formula="of:=IF([.E969]&gt;[.$E$1003];&quot;High&quot;;&quot;Low&quot;)" table:style-name="ce1">
            <text:p>Low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urniture</text:p>
          </table:table-cell>
          <table:table-cell office:value-type="float" office:value="1393.58" table:style-name="ce1">
            <text:p>1393.58</text:p>
          </table:table-cell>
          <table:table-cell office:value-type="float" office:value="1533.09" table:style-name="ce1">
            <text:p>1533.09</text:p>
          </table:table-cell>
          <table:table-cell office:value-type="string" table:style-name="ce1">
            <text:p>Returning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date" office:date-value="2023-02-06T00:00:00" table:style-name="ce2">
            <text:p>06/0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West</text:p>
          </table:table-cell>
          <table:table-cell office:value-type="float" office:value="961.47" table:style-name="ce1">
            <text:p>961.47</text:p>
          </table:table-cell>
          <table:table-cell office:value-type="string" office:string-value="Low" table:formula="of:=IF([.E970]&gt;[.$E$1003];&quot;High&quot;;&quot;Low&quot;)" table:style-name="ce1">
            <text:p>L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lectronics</text:p>
          </table:table-cell>
          <table:table-cell office:value-type="float" office:value="68.33" table:style-name="ce1">
            <text:p>68.33</text:p>
          </table:table-cell>
          <table:table-cell office:value-type="float" office:value="219.07999999999899" table:style-name="ce1">
            <text:p>219.08</text:p>
          </table:table-cell>
          <table:table-cell office:value-type="string" table:style-name="ce1">
            <text:p>New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Bob</text:p>
          </table:table-cell>
          <table:table-cell table:number-columns-repeated="1636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date" office:date-value="2023-12-18T00:00:00" table:style-name="ce2">
            <text:p>18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ast</text:p>
          </table:table-cell>
          <table:table-cell office:value-type="float" office:value="5612.17" table:style-name="ce1">
            <text:p>5612.17</text:p>
          </table:table-cell>
          <table:table-cell office:value-type="string" office:string-value="High" table:formula="of:=IF([.E971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urniture</text:p>
          </table:table-cell>
          <table:table-cell office:value-type="float" office:value="854.68" table:style-name="ce1">
            <text:p>854.68</text:p>
          </table:table-cell>
          <table:table-cell office:value-type="float" office:value="1115.24" table:style-name="ce1">
            <text:p>1115.24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David</text:p>
          </table:table-cell>
          <table:table-cell table:number-columns-repeated="1636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date" office:date-value="2023-11-08T00:00:00" table:style-name="ce2">
            <text:p>08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8466.7000000000007" table:style-name="ce1">
            <text:p>8466.7</text:p>
          </table:table-cell>
          <table:table-cell office:value-type="string" office:string-value="High" table:formula="of:=IF([.E972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othing</text:p>
          </table:table-cell>
          <table:table-cell office:value-type="float" office:value="1780.14" table:style-name="ce1">
            <text:p>1780.14</text:p>
          </table:table-cell>
          <table:table-cell office:value-type="float" office:value="2185.42" table:style-name="ce1">
            <text:p>2185.42</text:p>
          </table:table-cell>
          <table:table-cell office:value-type="string" table:style-name="ce1">
            <text:p>Returning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date" office:date-value="2023-12-27T00:00:00" table:style-name="ce2">
            <text:p>27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7979.67" table:style-name="ce1">
            <text:p>7979.67</text:p>
          </table:table-cell>
          <table:table-cell office:value-type="string" office:string-value="High" table:formula="of:=IF([.E973]&gt;[.$E$1003];&quot;High&quot;;&quot;Low&quot;)" table:style-name="ce1">
            <text:p>Hig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od</text:p>
          </table:table-cell>
          <table:table-cell office:value-type="float" office:value="1612.82" table:style-name="ce1">
            <text:p>1612.82</text:p>
          </table:table-cell>
          <table:table-cell office:value-type="float" office:value="1647.25" table:style-name="ce1">
            <text:p>1647.25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date" office:date-value="2023-02-28T00:00:00" table:style-name="ce2">
            <text:p>28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1833.72" table:style-name="ce1">
            <text:p>1833.72</text:p>
          </table:table-cell>
          <table:table-cell office:value-type="string" office:string-value="Low" table:formula="of:=IF([.E974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3967.25" table:style-name="ce1">
            <text:p>3967.25</text:p>
          </table:table-cell>
          <table:table-cell office:value-type="float" office:value="4272.92" table:style-name="ce1">
            <text:p>4272.92</text:p>
          </table:table-cell>
          <table:table-cell office:value-type="string" table:style-name="ce1">
            <text:p>New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3-05-11T00:00:00" table:style-name="ce2">
            <text:p>11/05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6760.37" table:style-name="ce1">
            <text:p>6760.37</text:p>
          </table:table-cell>
          <table:table-cell office:value-type="string" office:string-value="High" table:formula="of:=IF([.E975]&gt;[.$E$1003];&quot;High&quot;;&quot;Low&quot;)" table:style-name="ce1">
            <text:p>Hig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lectronics</text:p>
          </table:table-cell>
          <table:table-cell office:value-type="float" office:value="3418.78" table:style-name="ce1">
            <text:p>3418.78</text:p>
          </table:table-cell>
          <table:table-cell office:value-type="float" office:value="3824.1" table:style-name="ce1">
            <text:p>3824.1</text:p>
          </table:table-cell>
          <table:table-cell office:value-type="string" table:style-name="ce1">
            <text:p>New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date" office:date-value="2023-07-21T00:00:00" table:style-name="ce2">
            <text:p>21/07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2282.9899999999998" table:style-name="ce1">
            <text:p>2282.99</text:p>
          </table:table-cell>
          <table:table-cell office:value-type="string" office:string-value="Low" table:formula="of:=IF([.E976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othing</text:p>
          </table:table-cell>
          <table:table-cell office:value-type="float" office:value="1532.8" table:style-name="ce1">
            <text:p>1532.8</text:p>
          </table:table-cell>
          <table:table-cell office:value-type="float" office:value="1619.69" table:style-name="ce1">
            <text:p>1619.69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date" office:date-value="2023-08-31T00:00:00" table:style-name="ce2">
            <text:p>31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2260.25" table:style-name="ce1">
            <text:p>2260.25</text:p>
          </table:table-cell>
          <table:table-cell office:value-type="string" office:string-value="Low" table:formula="of:=IF([.E977]&gt;[.$E$1003];&quot;High&quot;;&quot;Low&quot;)" table:style-name="ce1">
            <text:p>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float" office:value="2315.83" table:style-name="ce1">
            <text:p>2315.83</text:p>
          </table:table-cell>
          <table:table-cell office:value-type="float" office:value="2333.19" table:style-name="ce1">
            <text:p>2333.19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date" office:date-value="2023-02-04T00:00:00" table:style-name="ce2">
            <text:p>04/02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8753.31" table:style-name="ce1">
            <text:p>8753.31</text:p>
          </table:table-cell>
          <table:table-cell office:value-type="string" office:string-value="High" table:formula="of:=IF([.E978]&gt;[.$E$1003];&quot;High&quot;;&quot;Low&quot;)" table:style-name="ce1">
            <text:p>Hig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urniture</text:p>
          </table:table-cell>
          <table:table-cell office:value-type="float" office:value="523.02" table:style-name="ce1">
            <text:p>523.02</text:p>
          </table:table-cell>
          <table:table-cell office:value-type="float" office:value="686.25" table:style-name="ce1">
            <text:p>686.25</text:p>
          </table:table-cell>
          <table:table-cell office:value-type="string" table:style-name="ce1">
            <text:p>Returning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date" office:date-value="2023-04-03T00:00:00" table:style-name="ce2">
            <text:p>03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2571.7199999999998" table:style-name="ce1">
            <text:p>2571.72</text:p>
          </table:table-cell>
          <table:table-cell office:value-type="string" office:string-value="Low" table:formula="of:=IF([.E979]&gt;[.$E$1003];&quot;High&quot;;&quot;Low&quot;)" table:style-name="ce1">
            <text:p>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urniture</text:p>
          </table:table-cell>
          <table:table-cell office:value-type="float" office:value="4495.82" table:style-name="ce1">
            <text:p>4495.82</text:p>
          </table:table-cell>
          <table:table-cell office:value-type="float" office:value="4794.0099999999902" table:style-name="ce1">
            <text:p>4794.01</text:p>
          </table:table-cell>
          <table:table-cell office:value-type="string" table:style-name="ce1">
            <text:p>New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date" office:date-value="2023-07-26T00:00:00" table:style-name="ce2">
            <text:p>26/07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706.15" table:style-name="ce1">
            <text:p>2706.15</text:p>
          </table:table-cell>
          <table:table-cell office:value-type="string" office:string-value="Low" table:formula="of:=IF([.E980]&gt;[.$E$1003];&quot;High&quot;;&quot;Low&quot;)" table:style-name="ce1">
            <text:p>Lo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lectronics</text:p>
          </table:table-cell>
          <table:table-cell office:value-type="float" office:value="4680.3500000000004" table:style-name="ce1">
            <text:p>4680.35</text:p>
          </table:table-cell>
          <table:table-cell office:value-type="float" office:value="4758.1099999999997" table:style-name="ce1">
            <text:p>4758.11</text:p>
          </table:table-cell>
          <table:table-cell office:value-type="string" table:style-name="ce1">
            <text:p>Returning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date" office:date-value="2023-12-19T00:00:00" table:style-name="ce2">
            <text:p>19/12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West</text:p>
          </table:table-cell>
          <table:table-cell office:value-type="float" office:value="106.47" table:style-name="ce1">
            <text:p>106.47</text:p>
          </table:table-cell>
          <table:table-cell office:value-type="string" office:string-value="Low" table:formula="of:=IF([.E981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lothing</text:p>
          </table:table-cell>
          <table:table-cell office:value-type="float" office:value="4900.03" table:style-name="ce1">
            <text:p>4900.03</text:p>
          </table:table-cell>
          <table:table-cell office:value-type="float" office:value="5118.83" table:style-name="ce1">
            <text:p>5118.83</text:p>
          </table:table-cell>
          <table:table-cell office:value-type="string" table:style-name="ce1">
            <text:p>Returning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Alice</text:p>
          </table:table-cell>
          <table:table-cell table:number-columns-repeated="1636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date" office:date-value="2023-11-28T00:00:00" table:style-name="ce2">
            <text:p>28/11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8719.6200000000008" table:style-name="ce1">
            <text:p>8719.62</text:p>
          </table:table-cell>
          <table:table-cell office:value-type="string" office:string-value="High" table:formula="of:=IF([.E982]&gt;[.$E$1003];&quot;High&quot;;&quot;Low&quot;)" table:style-name="ce1">
            <text:p>Hig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urniture</text:p>
          </table:table-cell>
          <table:table-cell office:value-type="float" office:value="4349.34" table:style-name="ce1">
            <text:p>4349.34</text:p>
          </table:table-cell>
          <table:table-cell office:value-type="float" office:value="4629.9799999999996" table:style-name="ce1">
            <text:p>4629.98</text:p>
          </table:table-cell>
          <table:table-cell office:value-type="string" table:style-name="ce1">
            <text:p>Returning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7946.69" table:style-name="ce1">
            <text:p>7946.69</text:p>
          </table:table-cell>
          <table:table-cell office:value-type="string" office:string-value="High" table:formula="of:=IF([.E983]&gt;[.$E$1003];&quot;High&quot;;&quot;Low&quot;)" table:style-name="ce1">
            <text:p>High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ood</text:p>
          </table:table-cell>
          <table:table-cell office:value-type="float" office:value="911.11" table:style-name="ce1">
            <text:p>911.11</text:p>
          </table:table-cell>
          <table:table-cell office:value-type="float" office:value="1214.56" table:style-name="ce1">
            <text:p>1214.56</text:p>
          </table:table-cell>
          <table:table-cell office:value-type="string" table:style-name="ce1">
            <text:p>New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date" office:date-value="2023-12-16T00:00:00" table:style-name="ce2">
            <text:p>16/12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6310.56" table:style-name="ce1">
            <text:p>6310.56</text:p>
          </table:table-cell>
          <table:table-cell office:value-type="string" office:string-value="High" table:formula="of:=IF([.E984]&gt;[.$E$1003];&quot;High&quot;;&quot;Low&quot;)" table:style-name="ce1">
            <text:p>Hig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urniture</text:p>
          </table:table-cell>
          <table:table-cell office:value-type="float" office:value="278.67" table:style-name="ce1">
            <text:p>278.67</text:p>
          </table:table-cell>
          <table:table-cell office:value-type="float" office:value="423.13" table:style-name="ce1">
            <text:p>423.13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date" office:date-value="2023-08-01T00:00:00" table:style-name="ce2">
            <text:p>01/08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West</text:p>
          </table:table-cell>
          <table:table-cell office:value-type="float" office:value="7527.63" table:style-name="ce1">
            <text:p>7527.63</text:p>
          </table:table-cell>
          <table:table-cell office:value-type="string" office:string-value="High" table:formula="of:=IF([.E985]&gt;[.$E$1003];&quot;High&quot;;&quot;Low&quot;)" table:style-name="ce1">
            <text:p>High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lothing</text:p>
          </table:table-cell>
          <table:table-cell office:value-type="float" office:value="2919" table:style-name="ce1">
            <text:p>2919</text:p>
          </table:table-cell>
          <table:table-cell office:value-type="float" office:value="3125.01" table:style-name="ce1">
            <text:p>3125.01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Eve</text:p>
          </table:table-cell>
          <table:table-cell table:number-columns-repeated="1636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date" office:date-value="2023-06-08T00:00:00" table:style-name="ce2">
            <text:p>08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1605.28" table:style-name="ce1">
            <text:p>1605.28</text:p>
          </table:table-cell>
          <table:table-cell office:value-type="string" office:string-value="Low" table:formula="of:=IF([.E986]&gt;[.$E$1003];&quot;High&quot;;&quot;Low&quot;)" table:style-name="ce1">
            <text:p>Low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urniture</text:p>
          </table:table-cell>
          <table:table-cell office:value-type="float" office:value="4567.3900000000003" table:style-name="ce1">
            <text:p>4567.39</text:p>
          </table:table-cell>
          <table:table-cell office:value-type="float" office:value="4958.78" table:style-name="ce1">
            <text:p>4958.78</text:p>
          </table:table-cell>
          <table:table-cell office:value-type="string" table:style-name="ce1">
            <text:p>New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1-24T00:00:00" table:style-name="ce2">
            <text:p>24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4637.3999999999996" table:style-name="ce1">
            <text:p>4637.4</text:p>
          </table:table-cell>
          <table:table-cell office:value-type="string" office:string-value="Low" table:formula="of:=IF([.E987]&gt;[.$E$1003];&quot;High&quot;;&quot;Low&quot;)" table:style-name="ce1">
            <text:p>Low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lectronics</text:p>
          </table:table-cell>
          <table:table-cell office:value-type="float" office:value="927.89" table:style-name="ce1">
            <text:p>927.89</text:p>
          </table:table-cell>
          <table:table-cell office:value-type="float" office:value="1399.09" table:style-name="ce1">
            <text:p>1399.09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3577.07" table:style-name="ce1">
            <text:p>3577.07</text:p>
          </table:table-cell>
          <table:table-cell office:value-type="string" office:string-value="Low" table:formula="of:=IF([.E988]&gt;[.$E$1003];&quot;High&quot;;&quot;Low&quot;)" table:style-name="ce1">
            <text:p>Low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urniture</text:p>
          </table:table-cell>
          <table:table-cell office:value-type="float" office:value="84.86" table:style-name="ce1">
            <text:p>84.86</text:p>
          </table:table-cell>
          <table:table-cell office:value-type="float" office:value="517.17999999999995" table:style-name="ce1">
            <text:p>517.18</text:p>
          </table:table-cell>
          <table:table-cell office:value-type="string" table:style-name="ce1">
            <text:p>Returning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date" office:date-value="2023-01-04T00:00:00" table:style-name="ce2">
            <text:p>04/01/2023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orth</text:p>
          </table:table-cell>
          <table:table-cell office:value-type="float" office:value="1028.3900000000001" table:style-name="ce1">
            <text:p>1028.39</text:p>
          </table:table-cell>
          <table:table-cell office:value-type="string" office:string-value="Low" table:formula="of:=IF([.E989]&gt;[.$E$1003];&quot;High&quot;;&quot;Low&quot;)" table:style-name="ce1">
            <text:p>Low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urniture</text:p>
          </table:table-cell>
          <table:table-cell office:value-type="float" office:value="4037.21" table:style-name="ce1">
            <text:p>4037.21</text:p>
          </table:table-cell>
          <table:table-cell office:value-type="float" office:value="4323.71" table:style-name="ce1">
            <text:p>4323.71</text:p>
          </table:table-cell>
          <table:table-cell office:value-type="string" table:style-name="ce1">
            <text:p>Returning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Eve</text:p>
          </table:table-cell>
          <table:table-cell table:number-columns-repeated="1636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date" office:date-value="2023-08-08T00:00:00" table:style-name="ce2">
            <text:p>08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orth</text:p>
          </table:table-cell>
          <table:table-cell office:value-type="float" office:value="4912.6899999999996" table:style-name="ce1">
            <text:p>4912.69</text:p>
          </table:table-cell>
          <table:table-cell office:value-type="string" office:string-value="Low" table:formula="of:=IF([.E990]&gt;[.$E$1003];&quot;High&quot;;&quot;Low&quot;)" table:style-name="ce1">
            <text:p>Low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lothing</text:p>
          </table:table-cell>
          <table:table-cell office:value-type="float" office:value="430.14" table:style-name="ce1">
            <text:p>430.14</text:p>
          </table:table-cell>
          <table:table-cell office:value-type="float" office:value="641.17999999999995" table:style-name="ce1">
            <text:p>641.18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Alice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12-30T00:00:00" table:style-name="ce2">
            <text:p>30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9215.32" table:style-name="ce1">
            <text:p>9215.32</text:p>
          </table:table-cell>
          <table:table-cell office:value-type="string" office:string-value="High" table:formula="of:=IF([.E991]&gt;[.$E$1003];&quot;High&quot;;&quot;Low&quot;)" table:style-name="ce1">
            <text:p>High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lectronics</text:p>
          </table:table-cell>
          <table:table-cell office:value-type="float" office:value="2097.84" table:style-name="ce1">
            <text:p>2097.84</text:p>
          </table:table-cell>
          <table:table-cell office:value-type="float" office:value="2270.9899999999998" table:style-name="ce1">
            <text:p>2270.99</text:p>
          </table:table-cell>
          <table:table-cell office:value-type="string" table:style-name="ce1">
            <text:p>New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date" office:date-value="2023-01-20T00:00:00" table:style-name="ce2">
            <text:p>20/01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East</text:p>
          </table:table-cell>
          <table:table-cell office:value-type="float" office:value="496.59" table:style-name="ce1">
            <text:p>496.59</text:p>
          </table:table-cell>
          <table:table-cell office:value-type="string" office:string-value="Low" table:formula="of:=IF([.E992]&gt;[.$E$1003];&quot;High&quot;;&quot;Low&quot;)" table:style-name="ce1">
            <text:p>Low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lothing</text:p>
          </table:table-cell>
          <table:table-cell office:value-type="float" office:value="3410.49" table:style-name="ce1">
            <text:p>3410.49</text:p>
          </table:table-cell>
          <table:table-cell office:value-type="float" office:value="3481.72" table:style-name="ce1">
            <text:p>3481.72</text:p>
          </table:table-cell>
          <table:table-cell office:value-type="string" table:style-name="ce1">
            <text:p>New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Bob</text:p>
          </table:table-cell>
          <table:table-cell table:number-columns-repeated="1636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date" office:date-value="2023-06-01T00:00:00" table:style-name="ce2">
            <text:p>01/06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ast</text:p>
          </table:table-cell>
          <table:table-cell office:value-type="float" office:value="2985.46" table:style-name="ce1">
            <text:p>2985.46</text:p>
          </table:table-cell>
          <table:table-cell office:value-type="string" office:string-value="Low" table:formula="of:=IF([.E993]&gt;[.$E$1003];&quot;High&quot;;&quot;Low&quot;)" table:style-name="ce1">
            <text:p>Low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urniture</text:p>
          </table:table-cell>
          <table:table-cell office:value-type="float" office:value="1222.1500000000001" table:style-name="ce1">
            <text:p>1222.15</text:p>
          </table:table-cell>
          <table:table-cell office:value-type="float" office:value="1284.3599999999999" table:style-name="ce1">
            <text:p>1284.36</text:p>
          </table:table-cell>
          <table:table-cell office:value-type="string" table:style-name="ce1">
            <text:p>Returning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East-Charlie</text:p>
          </table:table-cell>
          <table:table-cell table:number-columns-repeated="1636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date" office:date-value="2023-02-19T00:00:00" table:style-name="ce2">
            <text:p>19/0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2154.66" table:style-name="ce1">
            <text:p>2154.66</text:p>
          </table:table-cell>
          <table:table-cell office:value-type="string" office:string-value="Low" table:formula="of:=IF([.E994]&gt;[.$E$1003];&quot;High&quot;;&quot;Low&quot;)" table:style-name="ce1">
            <text:p>Low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ood</text:p>
          </table:table-cell>
          <table:table-cell office:value-type="float" office:value="465.61" table:style-name="ce1">
            <text:p>465.61</text:p>
          </table:table-cell>
          <table:table-cell office:value-type="float" office:value="812.91" table:style-name="ce1">
            <text:p>812.91</text:p>
          </table:table-cell>
          <table:table-cell office:value-type="string" table:style-name="ce1">
            <text:p>New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date" office:date-value="2023-06-26T00:00:00" table:style-name="ce2">
            <text:p>26/06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orth</text:p>
          </table:table-cell>
          <table:table-cell office:value-type="float" office:value="2457.65" table:style-name="ce1">
            <text:p>2457.65</text:p>
          </table:table-cell>
          <table:table-cell office:value-type="string" office:string-value="Low" table:formula="of:=IF([.E995]&gt;[.$E$1003];&quot;High&quot;;&quot;Low&quot;)" table:style-name="ce1">
            <text:p>L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urniture</text:p>
          </table:table-cell>
          <table:table-cell office:value-type="float" office:value="3861.61" table:style-name="ce1">
            <text:p>3861.61</text:p>
          </table:table-cell>
          <table:table-cell office:value-type="float" office:value="3998.91" table:style-name="ce1">
            <text:p>3998.91</text:p>
          </table:table-cell>
          <table:table-cell office:value-type="string" table:style-name="ce1">
            <text:p>New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David</text:p>
          </table:table-cell>
          <table:table-cell table:number-columns-repeated="16369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date" office:date-value="2023-04-06T00:00:00" table:style-name="ce2">
            <text:p>06/04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outh</text:p>
          </table:table-cell>
          <table:table-cell office:value-type="float" office:value="9093.5" table:style-name="ce1">
            <text:p>9093.5</text:p>
          </table:table-cell>
          <table:table-cell office:value-type="string" office:string-value="High" table:formula="of:=IF([.E996]&gt;[.$E$1003];&quot;High&quot;;&quot;Low&quot;)" table:style-name="ce1">
            <text:p>High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lothing</text:p>
          </table:table-cell>
          <table:table-cell office:value-type="float" office:value="3169.37" table:style-name="ce1">
            <text:p>3169.37</text:p>
          </table:table-cell>
          <table:table-cell office:value-type="float" office:value="3304.15" table:style-name="ce1">
            <text:p>3304.15</text:p>
          </table:table-cell>
          <table:table-cell office:value-type="string" table:style-name="ce1">
            <text:p>Returning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outh-Alice</text:p>
          </table:table-cell>
          <table:table-cell table:number-columns-repeated="1636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date" office:date-value="2023-04-15T00:00:00" table:style-name="ce2">
            <text:p>15/04/2023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orth</text:p>
          </table:table-cell>
          <table:table-cell office:value-type="float" office:value="4733.88" table:style-name="ce1">
            <text:p>4733.88</text:p>
          </table:table-cell>
          <table:table-cell office:value-type="string" office:string-value="Low" table:formula="of:=IF([.E997]&gt;[.$E$1003];&quot;High&quot;;&quot;Low&quot;)" table:style-name="ce1">
            <text:p>L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od</text:p>
          </table:table-cell>
          <table:table-cell office:value-type="float" office:value="4943.03" table:style-name="ce1">
            <text:p>4943.03</text:p>
          </table:table-cell>
          <table:table-cell office:value-type="float" office:value="5442.15" table:style-name="ce1">
            <text:p>5442.15</text:p>
          </table:table-cell>
          <table:table-cell office:value-type="string" table:style-name="ce1">
            <text:p>Returning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North-Charlie</text:p>
          </table:table-cell>
          <table:table-cell table:number-columns-repeated="1636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date" office:date-value="2023-09-07T00:00:00" table:style-name="ce2">
            <text:p>07/09/2023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North</text:p>
          </table:table-cell>
          <table:table-cell office:value-type="float" office:value="4716.3599999999997" table:style-name="ce1">
            <text:p>4716.36</text:p>
          </table:table-cell>
          <table:table-cell office:value-type="string" office:string-value="Low" table:formula="of:=IF([.E998]&gt;[.$E$1003];&quot;High&quot;;&quot;Low&quot;)" table:style-name="ce1">
            <text:p>Low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lothing</text:p>
          </table:table-cell>
          <table:table-cell office:value-type="float" office:value="1754.32" table:style-name="ce1">
            <text:p>1754.32</text:p>
          </table:table-cell>
          <table:table-cell office:value-type="float" office:value="1856.3999999999901" table:style-name="ce1">
            <text:p>1856.4</text:p>
          </table:table-cell>
          <table:table-cell office:value-type="string" table:style-name="ce1">
            <text:p>New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North-Bob</text:p>
          </table:table-cell>
          <table:table-cell table:number-columns-repeated="1636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date" office:date-value="2023-04-27T00:00:00" table:style-name="ce2">
            <text:p>27/04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outh</text:p>
          </table:table-cell>
          <table:table-cell office:value-type="float" office:value="7629.7" table:style-name="ce1">
            <text:p>7629.7</text:p>
          </table:table-cell>
          <table:table-cell office:value-type="string" office:string-value="High" table:formula="of:=IF([.E999]&gt;[.$E$1003];&quot;High&quot;;&quot;Low&quot;)" table:style-name="ce1">
            <text:p>High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othing</text:p>
          </table:table-cell>
          <table:table-cell office:value-type="float" office:value="355.72" table:style-name="ce1">
            <text:p>355.72</text:p>
          </table:table-cell>
          <table:table-cell office:value-type="float" office:value="438.27" table:style-name="ce1">
            <text:p>438.27</text:p>
          </table:table-cell>
          <table:table-cell office:value-type="string" table:style-name="ce1">
            <text:p>Returning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South-David</text:p>
          </table:table-cell>
          <table:table-cell table:number-columns-repeated="1636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date" office:date-value="2023-12-20T00:00:00" table:style-name="ce2">
            <text:p>20/12/202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est</text:p>
          </table:table-cell>
          <table:table-cell office:value-type="float" office:value="1629.47" table:style-name="ce1">
            <text:p>1629.47</text:p>
          </table:table-cell>
          <table:table-cell office:value-type="string" office:string-value="Low" table:formula="of:=IF([.E1000]&gt;[.$E$1003];&quot;High&quot;;&quot;Low&quot;)" table:style-name="ce1">
            <text:p>Low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lectronics</text:p>
          </table:table-cell>
          <table:table-cell office:value-type="float" office:value="3685.03" table:style-name="ce1">
            <text:p>3685.03</text:p>
          </table:table-cell>
          <table:table-cell office:value-type="float" office:value="3743.39" table:style-name="ce1">
            <text:p>3743.39</text:p>
          </table:table-cell>
          <table:table-cell office:value-type="string" table:style-name="ce1">
            <text:p>New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Bank Transfer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West-David</text:p>
          </table:table-cell>
          <table:table-cell table:number-columns-repeated="1636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date" office:date-value="2023-08-16T00:00:00" table:style-name="ce2">
            <text:p>16/08/202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East</text:p>
          </table:table-cell>
          <table:table-cell office:value-type="float" office:value="4923.93" table:style-name="ce1">
            <text:p>4923.93</text:p>
          </table:table-cell>
          <table:table-cell office:value-type="string" office:string-value="Low" table:formula="of:=IF([.E1001]&gt;[.$E$1003];&quot;High&quot;;&quot;Low&quot;)" table:style-name="ce1">
            <text:p>Low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ood</text:p>
          </table:table-cell>
          <table:table-cell office:value-type="float" office:value="2632.58" table:style-name="ce1">
            <text:p>2632.58</text:p>
          </table:table-cell>
          <table:table-cell office:value-type="float" office:value="2926.68" table:style-name="ce1">
            <text:p>2926.68</text:p>
          </table:table-cell>
          <table:table-cell office:value-type="string" table:style-name="ce1">
            <text:p>Returning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East-Alice</text:p>
          </table:table-cell>
          <table:table-cell table:number-columns-repeated="16369"/>
        </table:table-row>
        <table:table-row table:style-name="ro1">
          <table:table-cell table:number-columns-repeated="3" table:style-name="ce1"/>
          <table:table-cell office:value-type="string" table:style-name="ce1">
            <text:p>Annual Revenue</text:p>
          </table:table-cell>
          <table:table-cell office:value-type="float" office:value="5019265.2300000023" table:formula="of:=SUM([.E2:.E1001])" table:style-name="ce1">
            <text:p>5019265.23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Average Order Value</text:p>
          </table:table-cell>
          <table:table-cell office:value-type="float" office:value="5019.2652300000027" table:formula="of:=AVERAGE([.E2:.E1001])" table:style-name="ce1">
            <text:p>5019.26523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Number Of Transaction</text:p>
          </table:table-cell>
          <table:table-cell office:value-type="float" office:value="1000" table:formula="of:=COUNT([.E2:.E1001])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Highest Sale</text:p>
          </table:table-cell>
          <table:table-cell office:value-type="float" office:value="9989.0400000000009" table:formula="of:=MAX([.E2:.E1001])" table:style-name="ce1">
            <text:p>9989.04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Lowest Sale</text:p>
          </table:table-cell>
          <table:table-cell office:value-type="float" office:value="100.12" table:formula="of:=MIN([.E2:.E1001])" table:style-name="ce1">
            <text:p>100.12</text:p>
          </table:table-cell>
          <table:table-cell table:number-columns-repeated="16379" table:style-name="ce1"/>
        </table:table-row>
        <table:table-row table:number-rows-repeated="1047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5-14T05:24:54Z</meta:creation-date>
    <dc:date>2026-06-01T00:34:58Z</dc:date>
  </office:meta>
</office:document-meta>
</file>